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text-properties fo:color="#800080"/>
    </style:style>
    <style:style style:name="P2" style:parent-style-name="Normal" style:family="paragraph">
      <style:paragraph-properties fo:text-align="justify"/>
      <style:text-properties fo:color="#800080"/>
    </style:style>
    <style:style style:name="P3" style:parent-style-name="Normal" style:family="paragraph">
      <style:paragraph-properties fo:text-align="justify"/>
      <style:text-properties fo:color="#800080"/>
    </style:style>
    <style:style style:name="P4" style:parent-style-name="Normal" style:family="paragraph">
      <style:paragraph-properties fo:text-align="justify"/>
      <style:text-properties fo:color="#800080"/>
    </style:style>
    <style:style style:name="P5" style:parent-style-name="Normal" style:family="paragraph">
      <style:paragraph-properties fo:text-align="justify"/>
      <style:text-properties fo:color="#800080"/>
    </style:style>
    <style:style style:name="P6" style:parent-style-name="Normal" style:family="paragraph">
      <style:paragraph-properties fo:text-align="justify"/>
      <style:text-properties fo:color="#800080"/>
    </style:style>
    <style:style style:name="P7" style:parent-style-name="Normal" style:family="paragraph">
      <style:paragraph-properties fo:text-align="justify"/>
      <style:text-properties fo:color="#800080"/>
    </style:style>
    <style:style style:name="P8" style:parent-style-name="Normal" style:family="paragraph">
      <style:paragraph-properties fo:text-align="justify"/>
      <style:text-properties fo:color="#800080"/>
    </style:style>
    <style:style style:name="P9" style:parent-style-name="Normal" style:family="paragraph">
      <style:paragraph-properties fo:text-align="justify"/>
      <style:text-properties fo:color="#800080"/>
    </style:style>
    <style:style style:name="P10" style:parent-style-name="Normal" style:family="paragraph">
      <style:paragraph-properties fo:text-align="justify"/>
      <style:text-properties fo:color="#800080"/>
    </style:style>
    <style:style style:name="P11" style:parent-style-name="Normal" style:family="paragraph">
      <style:paragraph-properties fo:text-align="justify"/>
      <style:text-properties fo:color="#800080"/>
    </style:style>
    <style:style style:name="P12" style:parent-style-name="Normal" style:family="paragraph">
      <style:paragraph-properties fo:text-align="justify"/>
      <style:text-properties fo:color="#800080"/>
    </style:style>
    <style:style style:name="P13" style:parent-style-name="Normal" style:family="paragraph">
      <style:paragraph-properties fo:text-align="justify"/>
      <style:text-properties fo:color="#800080"/>
    </style:style>
    <style:style style:name="P14" style:parent-style-name="Normal" style:family="paragraph">
      <style:paragraph-properties fo:text-align="justify"/>
      <style:text-properties fo:color="#800080"/>
    </style:style>
    <style:style style:name="P15" style:parent-style-name="BodyText" style:family="paragraph">
      <style:text-properties fo:color="#800080"/>
    </style:style>
    <style:style style:name="P16" style:parent-style-name="BodyText" style:family="paragraph">
      <style:text-properties fo:color="#800080"/>
    </style:style>
    <style:style style:name="P17" style:parent-style-name="BodyText" style:family="paragraph">
      <style:text-properties fo:color="#800080"/>
    </style:style>
    <style:style style:name="P18" style:parent-style-name="BodyText" style:family="paragraph">
      <style:text-properties fo:color="#800080"/>
    </style:style>
    <style:style style:name="P19" style:parent-style-name="BodyText" style:family="paragraph">
      <style:text-properties fo:color="#800080"/>
    </style:style>
    <style:style style:name="P20" style:parent-style-name="BodyText" style:family="paragraph">
      <style:paragraph-properties fo:break-before="page"/>
      <style:text-properties fo:color="#800080"/>
    </style:style>
    <style:style style:name="P21" style:parent-style-name="BodyText" style:family="paragraph">
      <style:text-properties fo:color="#800080"/>
    </style:style>
    <style:style style:name="P22" style:parent-style-name="BodyText" style:family="paragraph">
      <style:text-properties fo:color="#800080"/>
    </style:style>
    <style:style style:name="P23" style:parent-style-name="BodyText" style:family="paragraph">
      <style:text-properties fo:color="#800080"/>
    </style:style>
    <style:style style:name="P24" style:parent-style-name="BodyText" style:family="paragraph">
      <style:text-properties fo:color="#800080"/>
    </style:style>
    <style:style style:name="P25" style:parent-style-name="BodyText" style:family="paragraph">
      <style:text-properties fo:color="#800080"/>
    </style:style>
    <style:style style:name="P26" style:parent-style-name="BodyText" style:family="paragraph">
      <style:text-properties fo:color="#800080"/>
    </style:style>
    <style:style style:name="P27" style:parent-style-name="BodyText" style:family="paragraph">
      <style:text-properties fo:color="#800080"/>
    </style:style>
    <style:style style:name="P28" style:parent-style-name="BodyText" style:family="paragraph">
      <style:text-properties fo:color="#800080"/>
    </style:style>
    <style:style style:name="P29" style:parent-style-name="BodyText" style:family="paragraph">
      <style:text-properties fo:color="#800080"/>
    </style:style>
    <style:style style:name="P30" style:parent-style-name="BodyText" style:family="paragraph">
      <style:text-properties fo:color="#800080"/>
    </style:style>
    <style:style style:name="P31" style:parent-style-name="BodyText" style:family="paragraph">
      <style:text-properties fo:color="#800080"/>
    </style:style>
    <style:style style:name="P32" style:parent-style-name="BodyText" style:family="paragraph">
      <style:paragraph-properties fo:break-before="page"/>
      <style:text-properties fo:color="#800080"/>
    </style:style>
    <style:style style:name="P33" style:parent-style-name="BodyText" style:family="paragraph">
      <style:text-properties fo:color="#800080"/>
    </style:style>
    <style:style style:name="P34" style:parent-style-name="BodyText" style:family="paragraph">
      <style:text-properties fo:color="#800080"/>
    </style:style>
    <style:style style:name="P35" style:parent-style-name="BodyText" style:family="paragraph">
      <style:text-properties fo:color="#800080"/>
    </style:style>
    <style:style style:name="P36" style:parent-style-name="BodyText" style:family="paragraph">
      <style:text-properties fo:color="#800080"/>
    </style:style>
    <style:style style:name="P37" style:parent-style-name="BodyText" style:family="paragraph">
      <style:text-properties fo:color="#800080"/>
    </style:style>
    <style:style style:name="P38" style:parent-style-name="BodyText" style:family="paragraph">
      <style:text-properties fo:color="#800080"/>
    </style:style>
    <style:style style:name="P39" style:parent-style-name="BodyText" style:family="paragraph">
      <style:text-properties fo:color="#800080"/>
    </style:style>
    <style:style style:name="P40" style:parent-style-name="BodyText" style:family="paragraph">
      <style:text-properties fo:color="#800080"/>
    </style:style>
    <style:style style:name="P41" style:parent-style-name="BodyText" style:family="paragraph">
      <style:text-properties fo:color="#800080"/>
    </style:style>
    <style:style style:name="P42" style:parent-style-name="BodyText" style:family="paragraph">
      <style:text-properties fo:color="#800080"/>
    </style:style>
    <style:style style:name="P43" style:parent-style-name="BodyText" style:family="paragraph">
      <style:text-properties fo:color="#800080"/>
    </style:style>
    <style:style style:name="P44" style:parent-style-name="BodyText" style:family="paragraph">
      <style:text-properties fo:color="#800080"/>
    </style:style>
    <style:style style:name="P45" style:parent-style-name="BodyText" style:family="paragraph">
      <style:text-properties fo:color="#800080"/>
    </style:style>
    <style:style style:name="P46" style:parent-style-name="BodyText" style:family="paragraph">
      <style:text-properties fo:color="#800080"/>
    </style:style>
    <style:style style:name="P47" style:parent-style-name="BodyText" style:family="paragraph">
      <style:text-properties fo:color="#800080"/>
    </style:style>
    <style:style style:name="P48" style:parent-style-name="BodyText" style:family="paragraph">
      <style:text-properties fo:color="#800080"/>
    </style:style>
    <style:style style:name="P49" style:parent-style-name="BodyText" style:family="paragraph">
      <style:text-properties fo:color="#800080"/>
    </style:style>
    <style:style style:name="P50" style:parent-style-name="BodyText" style:family="paragraph">
      <style:text-properties fo:color="#800080"/>
    </style:style>
    <style:style style:name="P51" style:parent-style-name="BodyText" style:family="paragraph">
      <style:text-properties fo:color="#800080"/>
    </style:style>
    <style:style style:name="P52" style:parent-style-name="BodyText" style:family="paragraph">
      <style:text-properties fo:color="#800080"/>
    </style:style>
    <style:style style:name="P53" style:parent-style-name="BodyText" style:family="paragraph">
      <style:text-properties fo:color="#800080"/>
    </style:style>
    <style:style style:name="P54" style:parent-style-name="BodyText" style:family="paragraph">
      <style:text-properties fo:color="#800080"/>
    </style:style>
    <style:style style:name="P55" style:parent-style-name="BodyText" style:family="paragraph">
      <style:text-properties fo:color="#800080"/>
    </style:style>
    <style:style style:name="P56" style:parent-style-name="BodyText" style:family="paragraph">
      <style:text-properties fo:color="#800080"/>
    </style:style>
    <style:style style:name="P57" style:parent-style-name="BodyText" style:family="paragraph">
      <style:text-properties fo:color="#800080"/>
    </style:style>
    <style:style style:name="P58" style:parent-style-name="BodyText" style:family="paragraph">
      <style:text-properties fo:color="#800080"/>
    </style:style>
    <style:style style:name="P59" style:parent-style-name="BodyText" style:family="paragraph">
      <style:text-properties fo:color="#800080"/>
    </style:style>
    <style:style style:name="P60" style:parent-style-name="BodyText" style:family="paragraph">
      <style:text-properties fo:color="#800080"/>
    </style:style>
    <style:style style:name="P61" style:parent-style-name="BodyText" style:family="paragraph">
      <style:text-properties fo:color="#800080"/>
    </style:style>
    <style:style style:name="P62" style:parent-style-name="BodyText" style:family="paragraph">
      <style:text-properties fo:color="#800080"/>
    </style:style>
    <style:style style:name="P63" style:parent-style-name="BodyText" style:family="paragraph">
      <style:text-properties fo:color="#800080"/>
    </style:style>
    <style:style style:name="P64" style:parent-style-name="BodyText" style:family="paragraph">
      <style:text-properties fo:color="#800080"/>
    </style:style>
    <style:style style:name="P65" style:parent-style-name="BodyText" style:family="paragraph">
      <style:text-properties fo:color="#800080"/>
    </style:style>
    <style:style style:name="P66" style:parent-style-name="BodyText" style:family="paragraph">
      <style:text-properties fo:color="#800080"/>
    </style:style>
    <style:style style:name="P67" style:parent-style-name="BodyText" style:family="paragraph">
      <style:text-properties fo:color="#800080"/>
    </style:style>
    <style:style style:name="P68" style:parent-style-name="BodyText" style:family="paragraph">
      <style:text-properties fo:color="#800080"/>
    </style:style>
    <style:style style:name="P69" style:parent-style-name="BodyText" style:family="paragraph">
      <style:text-properties fo:color="#800080"/>
    </style:style>
    <style:style style:name="P70" style:parent-style-name="BodyText" style:family="paragraph">
      <style:text-properties fo:color="#800080"/>
    </style:style>
    <style:style style:name="P71" style:parent-style-name="BodyText" style:family="paragraph">
      <style:text-properties fo:color="#800080"/>
    </style:style>
    <style:style style:name="P72" style:parent-style-name="BodyText" style:family="paragraph">
      <style:text-properties fo:color="#800080"/>
    </style:style>
    <style:style style:name="P73" style:parent-style-name="BodyText" style:family="paragraph">
      <style:text-properties fo:color="#800080"/>
    </style:style>
    <style:style style:name="P74" style:parent-style-name="BodyText" style:family="paragraph">
      <style:text-properties fo:color="#800080"/>
    </style:style>
    <style:style style:name="P75" style:parent-style-name="BodyText" style:family="paragraph">
      <style:text-properties fo:color="#800080"/>
    </style:style>
    <style:style style:name="P76" style:parent-style-name="BodyText" style:family="paragraph">
      <style:text-properties fo:color="#800080"/>
    </style:style>
    <style:style style:name="P77" style:parent-style-name="BodyText" style:family="paragraph">
      <style:paragraph-properties fo:break-before="page"/>
      <style:text-properties fo:color="#800080"/>
    </style:style>
    <style:style style:name="P78" style:parent-style-name="BodyText" style:family="paragraph">
      <style:text-properties fo:color="#800080"/>
    </style:style>
    <style:style style:name="P79" style:parent-style-name="BodyText" style:family="paragraph">
      <style:text-properties fo:color="#800080"/>
    </style:style>
    <style:style style:name="P80" style:parent-style-name="BodyText" style:family="paragraph">
      <style:text-properties fo:color="#800080"/>
    </style:style>
    <style:style style:name="P81" style:parent-style-name="BodyText" style:family="paragraph">
      <style:text-properties fo:color="#800080"/>
    </style:style>
    <style:style style:name="P82" style:parent-style-name="BodyText" style:family="paragraph">
      <style:text-properties fo:color="#800080"/>
    </style:style>
    <style:style style:name="P83" style:parent-style-name="BodyText" style:family="paragraph">
      <style:text-properties fo:color="#800080"/>
    </style:style>
    <style:style style:name="P84" style:parent-style-name="BodyText" style:family="paragraph">
      <style:text-properties fo:color="#800080"/>
    </style:style>
    <style:style style:name="P85" style:parent-style-name="BodyText" style:family="paragraph">
      <style:text-properties fo:color="#800080"/>
    </style:style>
    <style:style style:name="P86" style:parent-style-name="BodyText" style:family="paragraph">
      <style:text-properties fo:color="#800080"/>
    </style:style>
    <style:style style:name="P87" style:parent-style-name="BodyText" style:family="paragraph">
      <style:text-properties fo:color="#800080"/>
    </style:style>
    <style:style style:name="P88" style:parent-style-name="BodyText" style:family="paragraph">
      <style:text-properties fo:color="#800080"/>
    </style:style>
    <style:style style:name="P89" style:parent-style-name="BodyText" style:family="paragraph">
      <style:text-properties fo:color="#800080"/>
    </style:style>
    <style:style style:name="P90" style:parent-style-name="BodyText" style:family="paragraph">
      <style:text-properties fo:color="#800080"/>
    </style:style>
    <style:style style:name="P91" style:parent-style-name="BodyText" style:family="paragraph">
      <style:text-properties fo:color="#800080"/>
    </style:style>
    <style:style style:name="P92" style:parent-style-name="BodyText" style:family="paragraph">
      <style:text-properties fo:color="#800080"/>
    </style:style>
    <style:style style:name="P93" style:parent-style-name="BodyText" style:family="paragraph">
      <style:text-properties fo:color="#800080"/>
    </style:style>
    <style:style style:name="P94" style:parent-style-name="BodyText" style:family="paragraph">
      <style:text-properties fo:color="#800080"/>
    </style:style>
    <style:style style:name="P95" style:parent-style-name="BodyText" style:family="paragraph">
      <style:text-properties fo:color="#800080"/>
    </style:style>
    <style:style style:name="P96" style:parent-style-name="BodyText" style:family="paragraph">
      <style:text-properties fo:color="#800080"/>
    </style:style>
    <style:style style:name="P97" style:parent-style-name="BodyText" style:family="paragraph">
      <style:text-properties fo:color="#800080"/>
    </style:style>
    <style:style style:name="P98" style:parent-style-name="BodyText" style:family="paragraph">
      <style:paragraph-properties fo:break-before="page"/>
      <style:text-properties fo:color="#800080"/>
    </style:style>
    <style:style style:name="P99" style:parent-style-name="BodyText" style:family="paragraph">
      <style:text-properties fo:color="#800080"/>
    </style:style>
    <style:style style:name="P100" style:parent-style-name="BodyText" style:family="paragraph">
      <style:text-properties fo:color="#800080"/>
    </style:style>
    <style:style style:name="P101" style:parent-style-name="BodyText" style:family="paragraph">
      <style:text-properties fo:color="#800080"/>
    </style:style>
    <style:style style:name="P102" style:parent-style-name="BodyText" style:family="paragraph">
      <style:text-properties fo:color="#800080"/>
    </style:style>
    <style:style style:name="P103" style:parent-style-name="BodyText" style:family="paragraph">
      <style:text-properties fo:color="#800080"/>
    </style:style>
    <style:style style:name="P104" style:parent-style-name="BodyText" style:family="paragraph">
      <style:text-properties fo:color="#800080"/>
    </style:style>
    <style:style style:name="P105" style:parent-style-name="BodyText" style:family="paragraph">
      <style:text-properties fo:color="#800080"/>
    </style:style>
    <style:style style:name="P106" style:parent-style-name="BodyText" style:family="paragraph">
      <style:text-properties fo:color="#800080"/>
    </style:style>
    <style:style style:name="P107" style:parent-style-name="BodyText" style:family="paragraph">
      <style:text-properties fo:color="#800080"/>
    </style:style>
    <style:style style:name="P108" style:parent-style-name="BodyText" style:family="paragraph">
      <style:text-properties fo:color="#800080"/>
    </style:style>
    <style:style style:name="P109" style:parent-style-name="BodyText" style:family="paragraph">
      <style:text-properties fo:color="#800080"/>
    </style:style>
    <style:style style:name="P110" style:parent-style-name="BodyText" style:family="paragraph">
      <style:text-properties fo:color="#800080"/>
    </style:style>
    <style:style style:name="P111" style:parent-style-name="BodyText" style:family="paragraph">
      <style:text-properties fo:color="#800080"/>
    </style:style>
    <style:style style:name="P112" style:parent-style-name="BodyText" style:family="paragraph">
      <style:text-properties fo:color="#800080"/>
    </style:style>
    <style:style style:name="P113" style:parent-style-name="BodyText" style:family="paragraph">
      <style:text-properties fo:color="#800080"/>
    </style:style>
    <style:style style:name="P114" style:parent-style-name="BodyText" style:family="paragraph">
      <style:text-properties fo:color="#800080"/>
    </style:style>
    <style:style style:name="P115" style:parent-style-name="BodyText" style:family="paragraph">
      <style:text-properties fo:color="#800080"/>
    </style:style>
    <style:style style:name="P116" style:parent-style-name="BodyText" style:family="paragraph">
      <style:text-properties fo:color="#800080"/>
    </style:style>
    <style:style style:name="P117" style:parent-style-name="BodyText" style:family="paragraph">
      <style:text-properties fo:color="#800080"/>
    </style:style>
    <style:style style:name="P118" style:parent-style-name="BodyText" style:family="paragraph">
      <style:text-properties fo:color="#800080"/>
    </style:style>
    <style:style style:name="P119" style:parent-style-name="BodyText" style:family="paragraph">
      <style:text-properties fo:color="#800080"/>
    </style:style>
    <style:style style:name="P120" style:parent-style-name="BodyText" style:family="paragraph">
      <style:text-properties fo:color="#800080"/>
    </style:style>
    <style:style style:name="T121" style:parent-style-name="DefaultParagraphFont" style:family="text">
      <style:text-properties fo:color="#800080"/>
    </style:style>
  </office:automatic-styles>
  <office:body>
    <office:text text:use-soft-page-breaks="true">
      <text:h text:style-name="P1" text:outline-level="1">De vakantie</text:h>
      <text:p text:style-name="P2"/>
      <text:p text:style-name="P3">De zon schijnt prettig en licht. Mijn vrouw voelt over haar intussen bruin getinte huid. Een prikkelend laagje schuurt plezierig onder haar handen. Onwennig zonder zonnebril, knijpt zij haar ogen tegen de felle schittering van het water. Het hete zand wordt geplet onder haar voeten. Voordat ze de pijn ervaart, hebben haar gekoelde voeten de hitte getemd. Dan verruilen haar voeten het hete zand voor koele laddertreden. De smalle houten latten breken bijna haar ondervoet. Nog even en ze kan rusten. Al starend over het strand, ervaart ze de paradijselijke rust. Het lijkt alsof alles deze kalmte met haar deelt. Ze geeft zich aan de atmosfeer over en doezelt in.</text:p>
      <text:p text:style-name="P4"/>
      <text:p text:style-name="P5">……….</text:p>
      <text:p text:style-name="P6"/>
      <text:p text:style-name="P7">De spanning is van haar gezicht af te lezen. Het schuldgevoel, de bezorgdheid, de angst om straks te missen maken dat ze twijfelt. Het zoveelste gesprek over de voors en tegens wordt gevoerd. Nu lijken echter de tegens onoverkoombaar. Dus blijft niets anders dan het stellen van het gedwongen feit; “Er is geen weg meer terug”. Zeker nu het begroetende getoeter van de auto die de dames naar het vliegveld zal brengen de straat in dreunt. <text:s/>“Ach”, is de passerende gedachte in onze hoofden, “als ze maar een maal in de lucht zijn”.</text:p>
      <text:p text:style-name="P8"/>
      <text:p text:style-name="P9">Als de geliefden uit het zicht verdwijnen, denkt mijn vrouw weer terug aan het gesprek dat tot dit alles heeft geleid. De gezellige middag samen naar een zwemplas. Wij, de mannen, die opscheppen over onze kwaliteiten als ouder. Het stoutmoedige voorstel om onze uitmuntende zorg voor de kinderen eens geheel exclusief te laten zijn. Het plan om de vrouwen eens op reis te sturen. Toen al had ze haar bedenkingen. Nu weet ze het zeker, het zal haar niet gemakkelijk vallen. Judith lijkt deze gevoelens niet te delen. Maar ja, zij heeft deze trip al eens eerder ondernomen. Dat maakt mijn vrouw terughoudend haar reservering te uiten. Ze besluit haar energie aan te wenden om niet langer in deze zinloze wemeling te blijven hangen. Deze vakantie zal ze hoe dan ook tot een succes maken.</text:p>
      <text:p text:style-name="P10"/>
      <text:p text:style-name="P11">……..</text:p>
      <text:p text:style-name="P12"/>
      <text:p text:style-name="P13">Haar zintuigen registeren ineens de warmte om haar heen. Rood licht dringt haar gewaarwording binnen. Ze beseft dat ze ontwaakt uit een klein slaapje. Ze opent haar ogen en ziet de reden. Judith laat pesterig een druppel van een overheerlijk ogend ijsje op haar verhitte navel vallen. Deze keer leidt de prikkeling tot een beduusd opspringen. <text:s/>Ze lacht, en neemt het presentje graag aan.</text:p>
      <text:p text:style-name="P14"/>
      <text:p text:style-name="P15">Zonder een woord te wisselen kijken ze elkaar tevreden aan. Genietend van het smelten van de koude romige massa in hun warme mond. Dan gaat Judith haar ijsje met nog meer passie tot zich nemen. Ze streelt het witte bergje op haar hoorntje met lange rollingen van haar tong. Ze slurpt het zachte goedje naar binnen. Een ingetogen kreunend genot volgt. De overdrijving doet de wenkbrauwen van mijn vrouw fronsen. De ogen van Judith reageren met een zijwaartse beweging. Opzichtig draait mijn vrouw zich om en ziet verderop een grote negroïde man genoegzaam het tweetal aan te staren. Judith glimlacht ondeugend <text:s/>als mijn vrouw haar blik weer op haar richt. “Nee toch hé!”, is haar niet uitgesproken reactie. De wenkbrauwen trekken omhoog, de ogen verwijden als Judith bevestigend knikt.</text:p>
      <text:p text:style-name="P16"/>
      <text:p text:style-name="P17">De man is ondertussen het duo genaderd. In tegenstelling tot de plaatselijke bevolking is hij groot en donkerzwart. Zo donker dat het profiel van zijn gelaat nauwelijks in de verblindende zon te herkennen is. Het zwart wordt onderbroken door een met zonnebloemen beschilderd tangaslipje. Een kledingstuk dat de decadentie en simpelheid van de persoon benadrukt. Ondersteund door zijn verre van originele openingszin; “Zo dames, alleen hier?”, weet mijn vrouw wel raad met de ongeplaatste zelfverzekerheid waarmee de neger de dames lustig van top tot teen inspecteert. Mijn vrouw wijst de aap koel en denigrerend af. De kaarten zijn snel geschud, de man richt zich alleen nog tot Judith. Mijn vrouw excuseert zich en hangt achterover in het katoen dat haar een moment eerder al zo heerlijk in dromenland wiegde.</text:p>
      <text:p text:style-name="P18"/>
      <text:p text:style-name="P19">……….</text:p>
      <text:p text:style-name="P20"/>
      <text:p text:style-name="P21">Sanda, zo vertelt Judith, blijkt de donkergekleurde man te heten. Mijn vrouw leert dat de neger een indiaan is, die van tijd tot tijd de bewoonde wereld opzoekt. Eigenlijk begrijpt ze de interesse en harstocht waarmee Judith over Sanda vertelt niet. Maar ze wil Judith niet afvallen, zoals ze nooit iemand kan afvallen. Dus begeeft ze zich voor dat ze er erg in heeft samen met Judith en haar vriend Sanda, naar het hart van het vakantie-eiland; het woongebied van de repi-indianen. Onderwijl werpt Judith zich als een geroutineerde reisleidster op. In de paar gesprekken die ze samen met Sanda heeft gehad, is ze blijkbaar goed geïnformeerd. Als de kano in de buurt van het geboortedorp van Sanda komt, is Judith de eerste die aangeeft dat we aangekomen zijn.<text:s/></text:p>
      <text:p text:style-name="P22"/>
      <text:p text:style-name="P23">Het dorp is zoals mijn vrouw zich had voorgesteld. Rieten hutjes op hoge palen, gelegen op een kleine open plek aan de verder dicht begroeide oevers van de rivier. Een lange houten steiger is de uitnodigende plek om aan te leggen. Hun komst is niet onopgemerkt gebleven. Een groot aantal repi-indianen staat het drietal verwachtingsvol op te wachten. Ze vormen een gang waardoor de bezoekers als vorsten naar hun ontvangstruimte worden geleid.<text:s/></text:p>
      <text:p text:style-name="P24"/>
      <text:p text:style-name="P25">Mijn vrouw kijkt de indianen geïnteresseerd en vriendelijk aan. De tijgervellen broekjes van de familieleden zijn een stuk modieuzer dan het zonnebloemen vod van Sanda zelf. “Wat maakt de westerse samenleving veel kapot”, denkt ze als ze de broekjes bestudeert. <text:s/>De broekjes die niet meer zijn dan een lapje voor en een touwtje om het middel. Deze bewustwording laat haar vooruit kijken. Vooruitkijken om de broekjes van opzij te zien. Ergens hopen dat een indiaan door zijn beweging…….. <text:s/>Even erbij blijven, is wat ze vervolgens tegen zichzelf zegt. Ze richt zich tot Judith die zichtbaar geniet van het hartelijke ontvangst van de mannelijke bewoners van het dorp. Hun vrouwen en kinderen zijn nog niet te bespeuren.<text:s/></text:p>
      <text:p text:style-name="P26"/>
      <text:p text:style-name="P27">Sanda blijkt de enige man die engels spreekt. Daarom neemt hij in de ontvangstruimte, een grote hut met open wanden, al staande een centrale plaats in. Aandachtig luisterend zitten de dames naast hem op de mulle zandgrond. De indianen zitten in een grote cirkel om het drietal heen. Opkijkend valt mijn vrouw weer op hoe groot Sanda is. Tussen zijn familieleden valt hij als zodanig niet op. Het zijn allen grote, sterk ogend, pikzwarte mannen. Zo donker dat mijn vrouw nog steeds geen duidelijke tronie kan opmaken.<text:s/></text:p>
      <text:p text:style-name="P28"/>
      <text:p text:style-name="P29">De avond begint in te vallen en is het wordt ineens snel donker. De eerder nauwelijks opgemerkte vreugde vuren geven nu het enige licht in de duisternis. Grote groene bladeren met duimdikke nerven produceren meer warmte, meer rook waardoor de anders volle maan <text:s/>wordt bewolkt en een zeer sterke zoetsappige geur de lucht vult. Een aroma dat aan de mysterieuze sfeer een berustend, rustgevend maar vooral bedwelmende effect toevoegt. <text:s/>Doengadoen is het opzwellende ritme die de trommellende bongo´s aan de inmiddels zwoel dansende indianen oplegt. De dames worden gefascineerd en betoverd door de bewegingen van al die duistere silhouetten. Zwetende lichamen die niet meer zijn te onderscheiden. Alleen een soep van donkere handen, voeten, benen en heupen die glimmend in de duister van de nacht kronkelen. En zich dichter en dichter naar de gasten bewegen. Mijn vrouw zoekt contact met Sanda of Judith maar beseft verbaasd dat ze alleen is. Vertwijfelt kijkt ze hulpeloos om haar heen. De immer naderende lijven, zonder hoofd maar alleen met een flapperend lapje, nemen het laatste licht weg. Nee, nee kermt zich zachtjes in zichzelf.</text:p>
      <text:p text:style-name="P30"/>
      <text:p text:style-name="P31">…………….</text:p>
      <text:p text:style-name="P32"/>
      <text:p text:style-name="P33">“Wat is er?”, vraagt Judith met haar hand zachtjes de hangmat schuddend; “een opwindend droompje?”. Zweetdruppeltjes versterken de prikkende stralen van de zon. Mijn vrouw voelt zich nat. Plakkerig nat. Het besef van de realiteit doet haar goed. Het effect van de langzaam verdwijnende schemerzone doet haar blozen. Niet het zweet dat de warmte van haar droom benadrukt. Maar het koele vocht in haar kruis dat onweerlegbaar haar opwinding bewijst. Vertraagd door de felle zon wordt langzaam de troebele aanblik van Judith scherper. De aanwezigheid van Sanda, meekijkend over Judith schouder, versterkt de schaamte. Al gauw komt de bezorgdheid. Haar slipje zo gericht in hun richting laat toch niet de erotiek van haar middagslaapje zien?<text:s/></text:p>
      <text:p text:style-name="P34"/>
      <text:p text:style-name="P35">“Goh, jij was even diep weg!”. Mijn vrouw is gerustgesteld, de gezichten verraden geen ontdekking van haar intieme belevenis. Zonder verdere uitleg leunt mijn vrouw naar voren om te gaan zitten in haar inmiddels niet meer zo comfortabele slaapplaats. Belangstellend kijkt ze het tweetal aan. Alsof ze een verklaring verlangt van hun samenzijn. “We waren in een diep gesprek toen het Sanda opviel dat je in een diepe slaap was gedompeld. Toen we dichter bij kwamen hoorden we je zachtjes kermen, en namen aan dat je niet prettig droomde.” <text:s/>Opgelucht wil mijn vrouw een zucht slaken als ze ineens een ingeving krijgt. Sanda! “Hoe kan ik in mijn droom Sanda al kennen, we zijn nog niet voorgesteld”, denkt ze verbijsterd. <text:s/>Dan realiseert ze zich dat ze waarschijnlijk een deel van het gesprek van Judith en Sanda heeft gehoord voordat ze echt weg is gezakt.</text:p>
      <text:p text:style-name="P36"/>
      <text:p text:style-name="P37">Als Sanda weg is, kan mijn vrouw het niet nalaten Judith ter verantwoording te roepen. “Wat heb je toch met die Sanda?”. “Ach gewoon even ouwehoeren, even opnaaien, eventjes spelen”, reageert Judith geruststellend. “Maar waarom met die simpele ziel?”. “Simpel qua geest, maar zijn lichaam mag er toch zijn.” Mijn vrouw wil dit niet beamen, maar herinnert zich haar droom. Ze kan niet ontkennen. Maar ze wil ontkennen. Niet toegeven aan haar lichamelijke lust. Zonder geestelijke aantrekking mag ze niet. Kan ze niet overgeven aan………</text:p>
      <text:p text:style-name="P38"/>
      <text:p text:style-name="P39">De avond is zwoel. Mijn vrouw kan niet slapen in het klamme bed. Ze besluit haar beproefde slaapplek te proberen. Al hangend aan de touwen schuift ze haar lichaam in een prettige positie. Het zachte ziebriesje is niet verkoelend genoeg. Haar bloesje gaat uit evenals haar rokje. Ja dit is precies goed, denkt ze als ze opnieuw een slaaphouding aanneemt. De wind neemt haar geest al spoedig mee naar de dromenwereld.</text:p>
      <text:p text:style-name="P40"/>
      <text:p text:style-name="P41">…………</text:p>
      <text:p text:style-name="P42"/>
      <text:p text:style-name="P43">Ze voelt een hand naar haar reiken. Ze verwacht er meer en meer. De hand is verrassend zacht. Het is de hand van Judith. Judith die ze niet meer kon zien door de verduisterende wolken van rook en dansende indianen. De indianen lijken ineens een stuk verder weg. Een verklaring voor dit alles zoekend vraagt ze aan Judith of ze zich ook zo verdoofd voelt. Met haar geneeskundige kennis legt Judith uit dat dit waarschijnlijk komt door de coca-bladeren. Cocaine heeft een verdovend effect. En een lust opwekkend effect voegt Judith nog lachend toe.<text:s/></text:p>
      <text:p text:style-name="P44"/>
      <text:p text:style-name="P45">Even plots als de sfeer ontstond verdwijnt hij weer als Sanda een onverstaanbare kreet uitslaakt. “De goden zijn <text:s/>nu gunstig gestemd”, legt Judith uit; “we kunnen ons nu verzorgen”. Al deze kennis over een vreemd volk verbaast mijn vrouw en ze kan zich niet bedwingen Judith uit te horen. “Hoe weet je dit toch allemaal?”. “Ok, kun je een geheimpje bewaren. Twee jaar geleden ben ik hier ook al geweest. Daar heb ik Sanda leren kennen. Je hebt ook al wel gemerkt dat deze kennismaking niet tot praten beperkt is gebleven.” Mijn vrouw is maar deels geschokt, ergens had ze altijd wel verwacht dat Judith tot ontrouw in staat zou zijn. In Judith´s wereld staan Judith´s wensen immers centraal. Vol trots kon ze over haar eerste verovering, haar huidige man, praten. Zonder schaamte meldde ze haar eerste intieme samenzijn met hem en details als de vele handdoeken die daarbij benodigd waren. De wens de verleiding door een grote aantrekkelijke neger genomen te worden verbaast mijn vrouw in het geheel niet. “Ik zie dat je wel begrijpt waarom ik me tot hem voel aangetrokken. Niets geestelijks, puur lichamelijks.” De invloed van de gerookte drugs laten mijn vrouw de waarheid zeggen. “Dus ja, dan begrijp je ook wel dat toen ik hem weer zag ik toch eventjes weer kennis wilde maken. En ja ik ben de eerste keer ook al mee geweest naar zijn dorp. Een belevenis die ik jou niet wilde onthouden”. <text:s/></text:p>
      <text:p text:style-name="P46"/>
      <text:soft-page-break/>
      <text:p text:style-name="P47">Tijdens dit gesprek zijn de dames van de ontvangstruimte terecht gekomen in de hoger gelegen provisorische wasruimtes. Geheel in het donker, de vuren staan te ver weg, maar daardoor gelukkig ongezien, nemen de dames een verfrissend bad. Het water streelt de vette huiden. Weer dreigt mijn vrouw in bedwelming te geraken als Judith haar verhaal vervolgt. “Deze indianenstam is heel uniek. Behalve Sanda is nog geen van de mannen ooit in de beschaafde wereld geweest.” “Mannen, ja dat wilde ik nog vragen, waar zijn de vrouwen en kinderen.” Een ondeugende lachje volgt. Een verdere <text:s/>uitleg wordt onderbroken door de stem van Sanda. “Het is zover!.” Vragend kijkt mijn vrouw Judith aan. “Nu krijg je antwoord op je vraag. De repi-stam heeft geen vrouwen. Eens in de zoveel tijd lokt een repi-indiaan een vrouwtje naar zijn dorp, voor een rituele bevruchting door de stam. De vrouw wordt vervolgens verstoten. Alleen een jongetje wordt als hij de leeftijd van 18 jaar door de stam opgezocht en opgenomen. Zo kan de stam alleen uit mannen bestaan. Natuurlijk is in de moderne tijd dit niet meer mogelijk waardoor de stam gedoemd is uit te sterven”.</text:p>
      <text:p text:style-name="P48"/>
      <text:p text:style-name="P49">Na deze uitleg over de stamgewoontes verlaat Judith het bad. Mijn vrouw kan dit alleen horen. Het is te donker om verder iets te zien. Dan een korte flits, een lucifer ontsteekt. De kaars die daardoor ontbrandt laat het totaal ontklede lichaam van Judith zien. Het water glijdt van haar nog vette huid af als ze zich vanuit de wastoren naar beneden klimt in het licht van de vreugde vuren. Vanuit haar bad kan mijn vrouw alles gadeslaan. De indianen wachten al dansend de komst van Judith af. Plichtmatig doet ze haar armen boven haar hoofd. Twee grote zwarte handen verbinden de polsen met een stuk liaan. Vaag ziet mijn vrouw dat twee indianen ook lianen aan haar enkels aanbrengen. Dan dragen de indianen haar boven hun hoofden naar het midden van de vreugde vuren. Het licht van de vuren splijt haar lichaam in een duistere achterkant en een door rode gloed omgevende zichtbare voorkant. Vele zwarte handen betasten haar. Stevige handen knijpen knotjes in haar haren. De borsten zijn totaal bedekt door de donkere klauwen. Alleen haar tepels zijn door de masserende vingers heen helderrood te herkennen. Haar mond is gevuld met ruwe forse duimen die haar binnenste verkennen. Alleen haar poesje blijft onaangetast.</text:p>
      <text:p text:style-name="P50"/>
      <text:p text:style-name="P51">Ineens alsof door een bliksemshift getroffen voelt mijn vrouw weer die bekende vloeistof in haar poesje. Dan realiseert ze zich dat ze weer aan het dromen is. Wakker worden is niet wat ze wil. De opwinding laat haar dit feit negeren en ze richt ze weer op Judith. Judith wordt gelegd in een spinsel van touwen zodat ze een meter boven de grond vrij rond kan zweven. De lianen aan voeten en handen worden verbonden met het web zodat ze zich niet meer kan bewegen. De duimen in haar mond maken plaats voor een soort bit. Een uit hout gefabriceerde mondklem die haar tanden omhullen en haar mond deels openhoudt. De lianen aan haar enkels worden uit elkaar getrokken. Mijn vrouw is niet naïef, ze weet waar dit naar leidt. Vol inleving neemt ze het schouwspel dat volgt waar. Het is zo dubbel. Aan de ene kant is ze blij vanuit haar bad dit alles te kunnen zien, aan de andere kant……..</text:p>
      <text:p text:style-name="P52"/>
      <text:p text:style-name="P53">De lianen striemen haar lichaam. Ze voelt zich blootgesteld, open voor alles en iedereen die haar wil. Dit kan ze niet weerstaan. Haar diepe zijn neemt de controle over. Judith is verdwenen. Zij heeft haar plaats ingenomen. De volgende uren wordt ze betast door dwingende vingers, geramd door hete kloppende staven en proeft ze het klamme zweet, zoete speeksel, de kriebelende haren en zout reukende zaad van de indianen. Maar het spel is eenzijdig. Hoe opwindend ook, haar poesje wordt niet verwend. Dan kan niet in dit spel. In dit spel geeft zij. Maar haar alter-ego wil ook zelf. Het brandje in haar kruis moet worden geblust. Ze weet weer dat ze droomt en besluit de rollen terug te draaien.<text:s/></text:p>
      <text:p text:style-name="P54"/>
      <text:p text:style-name="P55">De besmeurde Judith is verlaten. Uitgeleefd en uitgeput hangt ze bijna levensloos in de lianen. Wachtend op de ochtend, wachtend op haar verlossing. Nee, dit is niet het beeld wat mijn vrouw de zo gewenste bevrediging brengt. Ah, dan ziet ze Sanda door de sluimering van de vuurdampen voor zich staan. Hij wordt niet meer beoordeeld op zijn idiotie. Zijn mannelijkheid die fier opgericht staat is voor mijn vrouw de maatstaaf. Ze ergert zich aan haar eigen controle over de droom als ze ineens bemerkt weer in de touwen te liggen met ondergoed aan. Ze draait een kwartslag zodat Sanda vrij spel heeft. Het splinterdunne broekje is geen partij voor de hitsige Sanda. Maar ook Sanda geeft mijn vrouw niet de beloning voor haar hersenspinsels. Zoals de andere lang droogstaande familieleden is hij snel van daad. Deze teleurstelling laat mijn vrouw naar diepere slaapwerelden brengen. De werelden waar zij niet meer de scepter zwaait.</text:p>
      <text:p text:style-name="P56"/>
      <text:p text:style-name="P57">……….</text:p>
      <text:p text:style-name="P58"/>
      <text:p text:style-name="P59"/>
      <text:p text:style-name="P60"/>
      <text:p text:style-name="P61"/>
      <text:p text:style-name="P62">De rustgevende geluiden van de ontwakende natuur doet mijn vrouw in de realiteit terugkeren. Kalm neemt ze de steeds duidelijke wordende omgeving waar. Ze voelt het jeukende katoen aan haar blote lichaam. Tot haar schrik voelt ze dit ook aan haar billen. Oeps, denkt ze, ik had het gisteren wel heel warm.<text:s/></text:p>
      <text:p text:style-name="P63"/>
      <text:p text:style-name="P64">………………</text:p>
      <text:p text:style-name="P65"/>
      <text:p text:style-name="P66">De lezer vraagt ze misschien af hoe ik zelf de vakantie van mijn vrouw heb doorgebracht. Tja, de drukte die de zorg voor de kinderen met zich meebrengt had ik danig onderschat. Als de omgeving van tijd tot tijd bijsprong dan kon ik volop van het korte moment van vrijheid genieten. Het zwemfeestje van Lisa, een vriendinnetje van mijn kinderen leek me dan ook een welkome afwisseling. Ik verwachtte een kordon aan huismoeders die zonder moeite ook op mijn kinderen konden letten. Dat pakte helaas anders uit. Iris de moeder van Lisa had alleen een vriendin van haar, Esther, gevraagd om mee te helpen oppassen. Het verwachte luiermiddagje werd dus een ware veldslag op mijn conditie. Continu werd ik door de kinderen gebruikt als paard, gooi- en werpmachine, luchtbed en praatpaal.<text:s/></text:p>
      <text:p text:style-name="P67"/>
      <text:p text:style-name="P68">Eindelijk kwam de verlossende mededeling. “Het partijtje is over!.” De wilde horde kinderen worden snel en behendig door de inmiddels teruggekeerde huismoeders in de kleren gehesen en afgevoerd. De buurvrouw die mijn lot enigszins kon begrijpen biedt aan naast Lisa ook mijn kinderen mee te nemen, zodat ik zelf nog even kan genieten van de rust en ontspanning van het warme water. Op zich best een goed idee, om een zwembad af te huren naast de gangbare openingstijden. Ik denk dat Iris, als zwemleidster, natuurlijk ook nog een flinke korting heeft gekregen. Wiegend op de eigen gemaakte golven, probeer ik mijn drukke geest te bedaren.<text:s/></text:p>
      <text:p text:style-name="P69"/>
      <text:p text:style-name="P70">Zonder het lawaai van de jeugd, kan ik de voetstappen van Esther en Iris, zeer goed horen. Ze ruimen plichtmatig de troep op. Terwijl ik beide zo gadesla valt me weer op hoe appetijtelijk de dames eigenlijk zijn. Ik hoor het pletsen van het gemorste zwemwater aan de rand van het bad. Het contact tussen hun gladde huid en water windt me op. Ik wil me gaan verliezen in een erotische fantasie als ik bedenk dat ik daarvoor niet het geschikte zwemgoed aan heb. Het strakke elastische sportzwembroek kan de gevolgen van mijn gedachten niet verhullen. Spijt van mijn keuze besluit ik mijn gedachten te remmen, om niet in een penibele situatie te belanden.</text:p>
      <text:p text:style-name="P71"/>
      <text:p text:style-name="P72">Teleurgesteld in mijzelf verlaat ik na enige tijd het steeds kouder aanvoelende water. De dames zijn inmiddels ook al verdwenen. De kleedhokjes zijn zakelijk kil. Toch schieten de beelden van Iris en Esther weer mijn hoofd binnen. Iris in een sportief blauw badpak, Esther in een strakke gele bikini. De aandacht richt ze meer en meer op het beeld van Esther. Van op zij zie ik de mooie lijnen van haar lichaam die door de gele vlakken extra worden benadrukt. Ik volg die lijnen in mijn gedachten. Haar hoofd overslaand begin ik met haar borsten. Ze zijn zeer rond en vullen de bikini precies. Het handformaat waar ik liefhebber van ben. <text:s/>Haar heupen en achterste kunnen wat mij betreft als standaard worden gehanteerd voor het perfecte vrouwenlichaam. Machtig over mijn gedachten laat ik Esther draaien. Van voren gezien lijken de proporties nog nadrukkelijker.<text:s/></text:p>
      <text:p text:style-name="P73"/>
      <text:p text:style-name="P74">Dan twijfel ik even over wat er nu komen gaat. Niet te snel! Het bikinibroekje dat bezig was te zakken gaat weer op zijn plaats. Het gemis van een partner laat echter een rustige opbouw niet toe. De spanning wordt te groot en ik dwing door mijn gedachten Esther op haar knieën Mijn handen grijpen haar hoofd. Mijn vingers zijn stevig omringd door haar blonde lange haren. Ik kijk vertederd naar haar door mij opgerichte hoofdje. Haar als popje opgemaakt ogen doen me smelten. Haar mondje is gewillig. De daad die volgt is noodzakelijk.<text:s/></text:p>
      <text:p text:style-name="P75"/>
      <text:p text:style-name="P76">…………</text:p>
      <text:p text:style-name="P77"/>
      <text:p text:style-name="P78">De poging om zich de avond te herinneren wordt verstoord door de aankomst van Judith. Even wil ze snel in beweging komen. Maar het is te laat. Ze berust in haar situatie. De verwachte reactie blijft niet uit. “Wat een lef om zo in je hangmat te liggen. Je hebt gisteren toch zelf gemerkt hoe bronzig hier het manvolk is.” Mijn vrouw deelt Judith´s terechte bezorgheid. Het was niet haar bedoeling, maar de wijn, de sterke lokale wijn, heeft haar helderheid van geest blijkbaar ondermijnd. Judith begrijpt. Ook zij heeft het narcotiserende effect van de wijn ervaren.</text:p>
      <text:p text:style-name="P79"/>
      <text:p text:style-name="P80">……………………..</text:p>
      <text:p text:style-name="P81"/>
      <text:p text:style-name="P82"/>
      <text:p text:style-name="P83">Routinematig verwijder ik elk bewijs van mijn ondeugd. Opgelucht verlaat ik de kleedhokjes, als tegelijkertijd ook Iris en Esther hun opwachting maken. Even voel ik me opgelaten maar al snel kletsen honderduit in de nabij gelegen pub. Bijkomend van de hektik van daarvoor. In het gesprek word ik overmand door een bekend instinctief gevoel. Een gevoel die ik bij de dames apart heb ervaren maar nooit gezamenlijk. Het gevoel dat me duidelijk maakt dat de interesse niet eenzijdig is. Er is meer. De manier waarop ze elkaar bejegenen. De stoute blikken niet alleen voor mij maar voor elkaar.</text:p>
      <text:p text:style-name="P84"/>
      <text:p text:style-name="P85">De kinderen slapen. Uitgeput door de inspanningen van de dag. Gek genoeg ben ik nog kwiek. Gewapend met de babyfoon besluit ik een ommetje te maken. Onbewust word ik geleid naar het huis van Esther. Die middag vertelde ze waar ze woonde. Het bleek niet ver. Het ongemak van de bewustwording maakt snel plaats door een interesse opwekkende ontdekking. In het huis van Esther zie ik Iris de gordijnen dichten. De bedoeling van Iris lukt niet geheel. Een dunne spleet blijft bestaan. Mijn nieuwsgierig is niet te bedwingen en ik neem een positie in die me in staat stelt het gebeuren achter de raambedekking te aanschouwen. Mijn voorzichtigheid maakt dat enige tijd verstrijkt als ik kan gluren naar de <text:s/>zo onzorgvuldig verdoezelde gebeurtenissen. Iris ligt poedelnaakt op Esther.<text:s/></text:p>
      <text:p text:style-name="P86"/>
      <text:p text:style-name="P87">…………………………….</text:p>
      <text:p text:style-name="P88"/>
      <text:p text:style-name="P89">Het vaste ontbijt ritueel doet alle zorgen en belevenissen van de nacht vergeten. Ontspannen volgen de dames de perikelen op het eiwitte strand, de opzwellende golven van de ruwe zee, de verre rust aan de horizon die nog steeds rozig gekleurd is. “Shit, daar heb je die idioot weer”. Judith wijst en na even zoeken zie ik Sanda ons naderen. De nacht komt even in mijn geest terug. De aanblik van de aap van Jongo, zoals Judith hem noemt, laat geen enkele prikkeling herreizen. Fantasie en werkelijkheid. Ze staan soms ver van elkaar af. Of? “Ik was je nog vergeten dit terug te geven”, is het vervelende gemompel van Sanda. De ogen van de vrouwen puilen uit als een slipje op tafel wordt gelegd.</text:p>
      <text:p text:style-name="P90"/>
      <text:p text:style-name="P91">………………………<text:s/></text:p>
      <text:p text:style-name="P92"/>
      <text:p text:style-name="P93">Gehaast doe ik de tape die mijn vrouw en ik bij tijd en wijle aan het volspelen zijn in mijn camera. Vlug check ik de batterijen als ik me weer spoed naar de plek des heils. De positie van de stoeipoezen is nauwelijks veranderd. Nog steeds is Iris boven. Nog steeds geeft de opening niet genoeg zicht op die delen van het schouwspel die me het meest boeien. Iris is met haar rug naar me toegekeerd en Esther <text:s/>deels bedekt door een satijnen laken. Wel legt de camera onbetwistbaar vast hoe Iris haar onderlichaam over het naakte lichaam van Esther schuift.<text:s/></text:p>
      <text:p text:style-name="P94"/>
      <text:p text:style-name="P95">Langzaam schuift ze verder en verder naar boven. De zo lekker uitziende borsten van Esther worden zichtbaar. Het hoofd van Esther is geheel opgenomen door de heupen van Iris. Haar bewegingen worden feller en feller. Dan staat ze ineens op. Het onverwachte doet me terugdeinzen. Het gekraak van het aardewerk dat onder mijn voeten verpulverd wordt versteend me. Mijn ogen willen zich van het gebeuren onder me weer richten op het raam. Iris kijkt me recht in het gezicht aan en lijkt hevig geschrokken. Ze sluit pardoes het venster naar hun samenzijn.</text:p>
      <text:p text:style-name="P96"/>
      <text:p text:style-name="P97">………………..</text:p>
      <text:p text:style-name="P98"/>
      <text:p text:style-name="P99">Judith begrijpt niet, mijn vrouw langzamerhand wel. De openbaring, het inzicht dat haar vriendin niet zo preuts en wereldvreemd is als Judith dacht, doen haar houding veranderen. Ze voelt zich bedrogen en neemt het koene besluit zich niet meer door de wereld om haar heen te laten misleiden. De bedrogen Judith wil mijn vrouw laten voelen dat zij niet langer zich door haar laat koeioneren. <text:s/></text:p>
      <text:p text:style-name="P100"/>
      <text:p text:style-name="P101"><text:s/>Sanda gebruikt zijn bewijs van verovering om opdringerig aan tafel plaats te nemen. Zonder enige vorm van beleefdheid oppert hij brutaal aan Judith het voorstel ook eens van zijn diensten gebruik te maken. Kleiner en kleiner lijkt mijn vrouw te worden als haar schaamte protestloos de oneerbare voorstellen van de aap van Jongo aanhoort. De ingekeerdheid maakt dat ze geen contact meer heeft met het gesprek aan tafel. Pas als Sanda als een tevreden haantje de aftocht blaast, lijkt ze uit haar roes te komen.</text:p>
      <text:p text:style-name="P102"><text:s/></text:p>
      <text:p text:style-name="P103">“Ongelooflijke schijnheil!. Tegen mij het heilig boontje spelen. En ondertussen zelf de bloemetjes buiten zetten.” Mijn vrouw begrijpt de kritiek en laat gewillig de schelddorades over zich heen komen.<text:s/></text:p>
      <text:p text:style-name="P104"/>
      <text:p text:style-name="P105">De avond brengt de onderlinge verstandhouding op een hanteerbaar peil. Weer vloeit de wijn kostelijk. Niet omdat mijn vrouw dat wil, maar ze durft niet nee te zeggen tegen Judith. Tegen Judith die ze niet nog meer de pijn van bedrog en schijnheiligheid wil laten voelen. Ze laat zich meevoeren. Wat ze niet weer is dat Judith ook in dit spel actief meedoet. Judith is nog steeds gekwetst en wil de belofte van mijn vrouw testen. Testen of mijn vrouw nu haar ware ik laat zien.<text:s/></text:p>
      <text:p text:style-name="P106"/>
      <text:p text:style-name="P107">De komst van Sanda tijdens het oprukken van de nacht, verbaast mijn vrouw in eerste instantie. Haar herinnering aan het heftige ontbijt doen haar beseffen dat het best mogelijk is geweest dat in het gesprek dit samenzijn is besproken. Nu protesteren zou weer als schijnheilig kunnen worden uitgelegd. Mijn vrouw laat het gebeuren dus maar over zich komen. De verdoving van de wijn zal daarbij een rol spelen.<text:s/></text:p>
      <text:p text:style-name="P108"/>
      <text:p text:style-name="P109">……………..</text:p>
      <text:p text:style-name="P110"/>
      <text:p text:style-name="P111">Thuis gekomen bekijk ik in allerijl de opgenomen feiten. Het is niet veel, maar voldoende. Weer zie ik de beklemming in de ogen van Iris. Maar ik zie meer. De lens van de camera heeft geen voorkeur. Het richt zich niet op een onderdeel van het beeld, maar laat alles zien. Dit maakt dat ik nu pas zie hoe Esther is vastgebonden aan het bed. Haar armen zijn wijd boven haar hoofd uitgespreid, haar handen gekoppeld aan de metalen stangen van haar bed. Haar haren zijn vochtig, haar gezicht geschuurd. Geschuurd door de felle bewegingen van Iris heupen.<text:s/></text:p>
      <text:p text:style-name="P112"/>
      <text:p text:style-name="P113">De komende dagen ben ik door de onverwachte stimulerende ervaringen vol in mijn sas. De opvoeding en verzorging van mijn kinderen lijken ineens als vanzelf te gaan. Steeds weer spelen de gebeurtenissen door mijn gedachten. Iris en Esther heb ik niet meer gezien.</text:p>
      <text:p text:style-name="P114"/>
      <text:p text:style-name="P115">…………..</text:p>
      <text:p text:style-name="P116"/>
      <text:p text:style-name="P117">Het stugge weerbarstige blad dat haar tanden proberen te slechten smaakt zoet. Judith volgt haar kaakbewegingen als een havik. Mijn vrouw ziet dat Judith gerustgesteld is en ook zelf het groene goedje tot zich neemt. Sanda kijkt verwachtingsvol toe. De vrees voor wat er gebeuren gaat weegt nog steeds niet op tegen de vrees het vertrouwen van haar vriendin te verliezen. Het cocablad heeft de uitwerking die bedoeld was. De dames raken in een prettige diepe bedwelming. Tijd lijkt nu voor mijn vrouw niet meer te bestaan. Korte momenten van lichte helderheid worden direct weer gevolgd door een diep wegzakken.<text:s/></text:p>
      <text:p text:style-name="P118"/>
      <text:p text:style-name="P119">Het zijn fragmenten die haar geest nog bereiken. Fragmenten waarin ze de nog steeds niet goed te onderscheiden tronie van Sanda ziet glunderen. Fragmenten waarin ze haar erkenning vraagt van Judith wiens haviksblik steeds milder wordt. Beelden waarin de eettafel op de terras voor hun bungalow wordt verwisseld voor het tweepersoons bed in hun slaapkamer. Dan weer ziet ze Judith ogen, dan weer het donkere bezwete gezicht van Sanda. Deze indrukken komen ongevraagd binnen, ze heeft geen macht over ze. Ook al wenste ze dat ze iets kon doen als ze ziet hoe Sanda Judith ontkleed.<text:s/></text:p>
      <text:p text:style-name="P120"/>
      <text:soft-page-break/>
      <text:p text:style-name="BodyText"><text:span text:style-name="T121">De beelden worden steeds vager. Voelen is het nog enige duidelijk contact met de buitenwereld. De lapjes stof die haar huid zo gewend zijn glijden over haar lichaam. Totdat alleen nog de lakens en lucht haar naaktheid betasten. Lang of kort ligt ze met deze gewaarwording. Nog vaag ziet ze beelden waarin Sanda de ontblote Judith lijkt te nemen. Dan wordt de waas te sterk en sluiten haar ogen voorgoed. De tast is zintuig dat overneemt. Handen zacht en ruw die haar lichaam strelen. Eerst mild, dan steviger. Steeds meer in de buurt van haar intimiteit. Ze wil niet maar kan niet anders. Er is geen controle alleen overgev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style:text-properties fo:font-weight="bold" style:font-weight-asian="bold"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BodyText" style:display-name="Body Text" style:family="paragraph" style:parent-style-name="Normal">
      <style:paragraph-properties fo:text-align="justif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 vakantie</dc:title>
    <dc:subject/>
    <meta:initial-creator>Information Services</meta:initial-creator>
    <dc:creator>Rob Slagter</dc:creator>
    <meta:creation-date>2025-07-30T14:37:00Z</meta:creation-date>
    <dc:date>2025-07-30T14:37:00Z</dc:date>
    <meta:print-date>2000-07-19T10:22:00Z</meta:print-date>
    <meta:template xlink:href="Normal.dotm" xlink:type="simple"/>
    <meta:editing-cycles>2</meta:editing-cycles>
    <meta:editing-duration>PT60S</meta:editing-duration>
    <meta:document-statistic meta:page-count="8" meta:paragraph-count="58" meta:word-count="4365" meta:character-count="29189" meta:row-count="207" meta:non-whitespace-character-count="24882"/>
  </office:meta>
</office:document-meta>
</file>