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style:text-properties fo:color="#800080"/>
    </style:style>
    <style:style style:name="P2" style:parent-style-name="Heading1" style:family="paragraph">
      <style:text-properties fo:color="#800080"/>
    </style:style>
    <style:style style:name="P3" style:parent-style-name="Heading4" style:family="paragraph">
      <style:text-properties fo:color="#800080"/>
    </style:style>
    <style:style style:name="P4" style:parent-style-name="Normal" style:family="paragraph">
      <style:text-properties fo:color="#800080"/>
    </style:style>
    <style:style style:name="P5" style:parent-style-name="Normal" style:family="paragraph">
      <style:text-properties fo:color="#800080"/>
    </style:style>
    <style:style style:name="P6" style:parent-style-name="Normal" style:family="paragraph">
      <style:text-properties fo:color="#800080"/>
    </style:style>
    <style:style style:name="P7" style:parent-style-name="Normal" style:family="paragraph">
      <style:text-properties fo:color="#800080"/>
    </style:style>
    <style:style style:name="P8" style:parent-style-name="Heading1" style:family="paragraph">
      <style:text-properties fo:color="#800080"/>
    </style:style>
    <style:style style:name="P9" style:parent-style-name="Heading1" style:family="paragraph">
      <style:text-properties fo:color="#800080"/>
    </style:style>
    <style:style style:name="P10" style:parent-style-name="Heading1" style:family="paragraph">
      <style:text-properties fo:color="#800080"/>
    </style:style>
    <style:style style:name="P11" style:parent-style-name="TOC1" style:family="paragraph">
      <style:paragraph-properties>
        <style:tab-stops>
          <style:tab-stop style:type="right" style:leader-style="dotted" style:leader-text="." style:position="6.293in"/>
        </style:tab-stops>
      </style:paragraph-properties>
    </style:style>
    <style:style style:name="T12" style:parent-style-name="DefaultParagraphFont" style:family="text">
      <style:text-properties fo:color="#800080"/>
    </style:style>
    <style:style style:name="P13" style:parent-style-name="TOC2" style:family="paragraph">
      <style:paragraph-properties>
        <style:tab-stops>
          <style:tab-stop style:type="right" style:leader-style="dotted" style:leader-text="." style:position="6.1541in"/>
        </style:tab-stops>
      </style:paragraph-properties>
    </style:style>
    <style:style style:name="P14" style:parent-style-name="TOC2" style:family="paragraph">
      <style:paragraph-properties>
        <style:tab-stops>
          <style:tab-stop style:type="right" style:leader-style="dotted" style:leader-text="." style:position="6.1541in"/>
        </style:tab-stops>
      </style:paragraph-properties>
    </style:style>
    <style:style style:name="P15" style:parent-style-name="TOC2" style:family="paragraph">
      <style:paragraph-properties>
        <style:tab-stops>
          <style:tab-stop style:type="right" style:leader-style="dotted" style:leader-text="." style:position="6.1541in"/>
        </style:tab-stops>
      </style:paragraph-properties>
    </style:style>
    <style:style style:name="P16" style:parent-style-name="TOC2" style:family="paragraph">
      <style:paragraph-properties>
        <style:tab-stops>
          <style:tab-stop style:type="right" style:leader-style="dotted" style:leader-text="." style:position="6.1541in"/>
        </style:tab-stops>
      </style:paragraph-properties>
    </style:style>
    <style:style style:name="P17" style:parent-style-name="TOC2" style:family="paragraph">
      <style:paragraph-properties>
        <style:tab-stops>
          <style:tab-stop style:type="right" style:leader-style="dotted" style:leader-text="." style:position="6.1541in"/>
        </style:tab-stops>
      </style:paragraph-properties>
    </style:style>
    <style:style style:name="P18" style:parent-style-name="TOC2" style:family="paragraph">
      <style:paragraph-properties>
        <style:tab-stops>
          <style:tab-stop style:type="right" style:leader-style="dotted" style:leader-text="." style:position="6.1541in"/>
        </style:tab-stops>
      </style:paragraph-properties>
    </style:style>
    <style:style style:name="P19" style:parent-style-name="TOC1" style:family="paragraph">
      <style:paragraph-properties>
        <style:tab-stops>
          <style:tab-stop style:type="right" style:leader-style="dotted" style:leader-text="." style:position="6.293in"/>
        </style:tab-stops>
      </style:paragraph-properties>
    </style:style>
    <style:style style:name="T20" style:parent-style-name="DefaultParagraphFont" style:family="text">
      <style:text-properties fo:color="#800080"/>
    </style:style>
    <style:style style:name="P21" style:parent-style-name="TOC2" style:family="paragraph">
      <style:paragraph-properties>
        <style:tab-stops>
          <style:tab-stop style:type="right" style:leader-style="dotted" style:leader-text="." style:position="6.1541in"/>
        </style:tab-stops>
      </style:paragraph-properties>
    </style:style>
    <style:style style:name="P22" style:parent-style-name="TOC2" style:family="paragraph">
      <style:paragraph-properties>
        <style:tab-stops>
          <style:tab-stop style:type="right" style:leader-style="dotted" style:leader-text="." style:position="6.1541in"/>
        </style:tab-stops>
      </style:paragraph-properties>
    </style:style>
    <style:style style:name="P23" style:parent-style-name="TOC2" style:family="paragraph">
      <style:paragraph-properties>
        <style:tab-stops>
          <style:tab-stop style:type="right" style:leader-style="dotted" style:leader-text="." style:position="6.1541in"/>
        </style:tab-stops>
      </style:paragraph-properties>
    </style:style>
    <style:style style:name="P24" style:parent-style-name="TOC2" style:family="paragraph">
      <style:paragraph-properties>
        <style:tab-stops>
          <style:tab-stop style:type="right" style:leader-style="dotted" style:leader-text="." style:position="6.1541in"/>
        </style:tab-stops>
      </style:paragraph-properties>
    </style:style>
    <style:style style:name="P25" style:parent-style-name="TOC2" style:family="paragraph">
      <style:paragraph-properties>
        <style:tab-stops>
          <style:tab-stop style:type="right" style:leader-style="dotted" style:leader-text="." style:position="6.1541in"/>
        </style:tab-stops>
      </style:paragraph-properties>
    </style:style>
    <style:style style:name="P26" style:parent-style-name="TOC2" style:family="paragraph">
      <style:paragraph-properties>
        <style:tab-stops>
          <style:tab-stop style:type="right" style:leader-style="dotted" style:leader-text="." style:position="6.1541in"/>
        </style:tab-stops>
      </style:paragraph-properties>
    </style:style>
    <style:style style:name="P27" style:parent-style-name="TOC1" style:family="paragraph">
      <style:paragraph-properties>
        <style:tab-stops>
          <style:tab-stop style:type="right" style:leader-style="dotted" style:leader-text="." style:position="6.293in"/>
        </style:tab-stops>
      </style:paragraph-properties>
    </style:style>
    <style:style style:name="T28" style:parent-style-name="DefaultParagraphFont" style:family="text">
      <style:text-properties fo:color="#800080"/>
    </style:style>
    <style:style style:name="P29" style:parent-style-name="TOC1" style:family="paragraph">
      <style:paragraph-properties>
        <style:tab-stops>
          <style:tab-stop style:type="right" style:leader-style="dotted" style:leader-text="." style:position="6.293in"/>
        </style:tab-stops>
      </style:paragraph-properties>
    </style:style>
    <style:style style:name="T30" style:parent-style-name="DefaultParagraphFont" style:family="text">
      <style:text-properties fo:color="#800080"/>
    </style:style>
    <style:style style:name="P31" style:parent-style-name="TOC1" style:family="paragraph">
      <style:paragraph-properties>
        <style:tab-stops>
          <style:tab-stop style:type="right" style:leader-style="dotted" style:leader-text="." style:position="6.293in"/>
        </style:tab-stops>
      </style:paragraph-properties>
    </style:style>
    <style:style style:name="T32" style:parent-style-name="DefaultParagraphFont" style:family="text">
      <style:text-properties fo:color="#800080"/>
    </style:style>
    <style:style style:name="P33" style:parent-style-name="TOC2" style:family="paragraph">
      <style:paragraph-properties>
        <style:tab-stops>
          <style:tab-stop style:type="right" style:leader-style="dotted" style:leader-text="." style:position="6.1541in"/>
        </style:tab-stops>
      </style:paragraph-properties>
    </style:style>
    <style:style style:name="P34" style:parent-style-name="TOC2" style:family="paragraph">
      <style:paragraph-properties>
        <style:tab-stops>
          <style:tab-stop style:type="right" style:leader-style="dotted" style:leader-text="." style:position="6.1541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2" style:family="paragraph">
      <style:paragraph-properties>
        <style:tab-stops>
          <style:tab-stop style:type="right" style:leader-style="dotted" style:leader-text="." style:position="6.1541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T40" style:parent-style-name="DefaultParagraphFont" style:family="text">
      <style:text-properties fo:color="#800080"/>
    </style:style>
    <style:style style:name="P41" style:parent-style-name="TOC1" style:family="paragraph">
      <style:paragraph-properties>
        <style:tab-stops>
          <style:tab-stop style:type="right" style:leader-style="dotted" style:leader-text="." style:position="6.293in"/>
        </style:tab-stops>
      </style:paragraph-properties>
    </style:style>
    <style:style style:name="T42" style:parent-style-name="DefaultParagraphFont" style:family="text">
      <style:text-properties fo:color="#800080"/>
    </style:style>
    <style:style style:name="P43" style:parent-style-name="Heading1" style:family="paragraph">
      <style:paragraph-properties fo:text-align="justify"/>
    </style:style>
    <style:style style:name="P44" style:parent-style-name="Heading1" style:family="paragraph">
      <style:paragraph-properties fo:break-before="page"/>
      <style:text-properties fo:color="#800080"/>
    </style:style>
    <style:style style:name="P45" style:parent-style-name="Normal" style:family="paragraph">
      <style:paragraph-properties fo:text-align="justify"/>
      <style:text-properties fo:color="#800080"/>
    </style:style>
    <style:style style:name="P46" style:parent-style-name="Heading2" style:family="paragraph">
      <style:paragraph-properties fo:text-align="justify"/>
    </style:style>
    <style:style style:name="P47" style:parent-style-name="Normal" style:family="paragraph">
      <style:paragraph-properties fo:text-align="justify"/>
      <style:text-properties fo:color="#800080"/>
    </style:style>
    <style:style style:name="P48" style:parent-style-name="Normal" style:family="paragraph">
      <style:paragraph-properties fo:text-align="justify"/>
      <style:text-properties fo:color="#800080"/>
    </style:style>
    <style:style style:name="P49" style:parent-style-name="Normal" style:family="paragraph">
      <style:paragraph-properties fo:text-align="justify"/>
      <style:text-properties fo:color="#800080"/>
    </style:style>
    <style:style style:name="P50" style:parent-style-name="Normal" style:family="paragraph">
      <style:paragraph-properties fo:text-align="justify"/>
      <style:text-properties fo:color="#800080"/>
    </style:style>
    <style:style style:name="P51" style:parent-style-name="Normal" style:family="paragraph">
      <style:paragraph-properties fo:text-align="justify"/>
      <style:text-properties fo:color="#800080"/>
    </style:style>
    <style:style style:name="P52" style:parent-style-name="Normal" style:family="paragraph">
      <style:paragraph-properties fo:text-align="justify"/>
      <style:text-properties fo:color="#800080"/>
    </style:style>
    <style:style style:name="P53" style:parent-style-name="Normal" style:family="paragraph">
      <style:paragraph-properties fo:text-align="justify"/>
      <style:text-properties fo:color="#800080"/>
    </style:style>
    <style:style style:name="P54" style:parent-style-name="Normal" style:family="paragraph">
      <style:paragraph-properties fo:text-align="justify"/>
      <style:text-properties fo:color="#800080"/>
    </style:style>
    <style:style style:name="P55" style:parent-style-name="Normal" style:family="paragraph">
      <style:paragraph-properties fo:text-align="justify"/>
      <style:text-properties fo:color="#800080"/>
    </style:style>
    <style:style style:name="P56" style:parent-style-name="Normal" style:family="paragraph">
      <style:paragraph-properties fo:text-align="justify"/>
      <style:text-properties fo:color="#800080"/>
    </style:style>
    <style:style style:name="P57" style:parent-style-name="Normal" style:family="paragraph">
      <style:paragraph-properties fo:text-align="justify"/>
      <style:text-properties fo:color="#800080"/>
    </style:style>
    <style:style style:name="P58" style:parent-style-name="Normal" style:family="paragraph">
      <style:paragraph-properties fo:text-align="justify"/>
      <style:text-properties fo:color="#800080"/>
    </style:style>
    <style:style style:name="P59" style:parent-style-name="Normal" style:family="paragraph">
      <style:paragraph-properties fo:text-align="justify"/>
      <style:text-properties fo:color="#800080"/>
    </style:style>
    <style:style style:name="P60" style:parent-style-name="Normal" style:family="paragraph">
      <style:paragraph-properties fo:text-align="justify"/>
      <style:text-properties fo:color="#800080"/>
    </style:style>
    <style:style style:name="P61" style:parent-style-name="Normal" style:family="paragraph">
      <style:paragraph-properties fo:text-align="justify"/>
      <style:text-properties fo:color="#800080"/>
    </style:style>
    <style:style style:name="P62" style:parent-style-name="Normal" style:family="paragraph">
      <style:paragraph-properties fo:break-before="page" fo:text-align="justify"/>
      <style:text-properties fo:color="#800080"/>
    </style:style>
    <style:style style:name="P63" style:parent-style-name="Heading2" style:family="paragraph">
      <style:paragraph-properties fo:text-align="justify"/>
    </style:style>
    <style:style style:name="P64" style:parent-style-name="Normal" style:family="paragraph">
      <style:paragraph-properties fo:text-align="justify"/>
      <style:text-properties fo:color="#800080"/>
    </style:style>
    <style:style style:name="P65" style:parent-style-name="Normal" style:family="paragraph">
      <style:paragraph-properties fo:text-align="justify"/>
      <style:text-properties fo:color="#800080"/>
    </style:style>
    <style:style style:name="P66" style:parent-style-name="Normal" style:family="paragraph">
      <style:paragraph-properties fo:text-align="justify"/>
      <style:text-properties fo:color="#800080"/>
    </style:style>
    <style:style style:name="P67" style:parent-style-name="Normal" style:family="paragraph">
      <style:paragraph-properties fo:text-align="justify"/>
      <style:text-properties fo:color="#800080"/>
    </style:style>
    <style:style style:name="P68" style:parent-style-name="Normal" style:family="paragraph">
      <style:paragraph-properties fo:text-align="justify"/>
      <style:text-properties fo:color="#800080"/>
    </style:style>
    <style:style style:name="P69" style:parent-style-name="Normal" style:family="paragraph">
      <style:paragraph-properties fo:text-align="justify"/>
      <style:text-properties fo:color="#800080"/>
    </style:style>
    <style:style style:name="P70" style:parent-style-name="Normal" style:family="paragraph">
      <style:paragraph-properties fo:text-align="justify"/>
      <style:text-properties fo:color="#800080"/>
    </style:style>
    <style:style style:name="P71" style:parent-style-name="Normal" style:family="paragraph">
      <style:paragraph-properties fo:text-align="justify"/>
      <style:text-properties fo:color="#800080"/>
    </style:style>
    <style:style style:name="P72" style:parent-style-name="Normal" style:family="paragraph">
      <style:paragraph-properties fo:text-align="justify"/>
      <style:text-properties fo:color="#800080"/>
    </style:style>
    <style:style style:name="P73" style:parent-style-name="Normal" style:family="paragraph">
      <style:paragraph-properties fo:text-align="justify"/>
      <style:text-properties fo:color="#800080"/>
    </style:style>
    <style:style style:name="P74" style:parent-style-name="Normal" style:family="paragraph">
      <style:paragraph-properties fo:text-align="justify"/>
      <style:text-properties fo:color="#800080"/>
    </style:style>
    <style:style style:name="P75" style:parent-style-name="Normal" style:family="paragraph">
      <style:paragraph-properties fo:break-before="page" fo:text-align="justify"/>
      <style:text-properties fo:color="#800080"/>
    </style:style>
    <style:style style:name="P76" style:parent-style-name="Normal" style:family="paragraph">
      <style:paragraph-properties fo:text-align="justify"/>
      <style:text-properties fo:color="#800080"/>
    </style:style>
    <style:style style:name="P77" style:parent-style-name="Normal" style:family="paragraph">
      <style:paragraph-properties fo:text-align="justify"/>
      <style:text-properties fo:color="#800080"/>
    </style:style>
    <style:style style:name="P78" style:parent-style-name="Normal" style:family="paragraph">
      <style:paragraph-properties fo:text-align="justify"/>
      <style:text-properties fo:color="#800080"/>
    </style:style>
    <style:style style:name="P79" style:parent-style-name="Normal" style:family="paragraph">
      <style:paragraph-properties fo:text-align="justify"/>
      <style:text-properties fo:color="#800080"/>
    </style:style>
    <style:style style:name="P80" style:parent-style-name="Normal" style:family="paragraph">
      <style:paragraph-properties fo:text-align="justify"/>
      <style:text-properties fo:color="#800080"/>
    </style:style>
    <style:style style:name="P81" style:parent-style-name="Normal" style:family="paragraph">
      <style:paragraph-properties fo:text-align="justify"/>
      <style:text-properties fo:color="#800080"/>
    </style:style>
    <style:style style:name="P82" style:parent-style-name="Normal" style:family="paragraph">
      <style:paragraph-properties fo:text-align="justify"/>
      <style:text-properties fo:color="#800080"/>
    </style:style>
    <style:style style:name="P83" style:parent-style-name="Normal" style:family="paragraph">
      <style:paragraph-properties fo:text-align="justify"/>
      <style:text-properties fo:color="#800080"/>
    </style:style>
    <style:style style:name="P84" style:parent-style-name="Normal" style:family="paragraph">
      <style:paragraph-properties fo:text-align="justify"/>
      <style:text-properties fo:color="#800080"/>
    </style:style>
    <style:style style:name="P85" style:parent-style-name="Normal" style:family="paragraph">
      <style:paragraph-properties fo:text-align="justify"/>
      <style:text-properties fo:color="#800080"/>
    </style:style>
    <style:style style:name="P86" style:parent-style-name="Normal" style:family="paragraph">
      <style:paragraph-properties fo:text-align="justify"/>
      <style:text-properties fo:color="#800080"/>
    </style:style>
    <style:style style:name="P87" style:parent-style-name="Normal" style:family="paragraph">
      <style:paragraph-properties fo:text-align="justify"/>
      <style:text-properties fo:color="#800080"/>
    </style:style>
    <style:style style:name="P88" style:parent-style-name="Normal" style:family="paragraph">
      <style:paragraph-properties fo:text-align="justify"/>
      <style:text-properties fo:color="#800080"/>
    </style:style>
    <style:style style:name="P89" style:parent-style-name="Normal" style:family="paragraph">
      <style:paragraph-properties fo:text-align="justify"/>
      <style:text-properties fo:color="#800080"/>
    </style:style>
    <style:style style:name="P90" style:parent-style-name="Normal" style:family="paragraph">
      <style:paragraph-properties fo:text-align="justify"/>
      <style:text-properties fo:color="#800080"/>
    </style:style>
    <style:style style:name="P91" style:parent-style-name="Normal" style:family="paragraph">
      <style:paragraph-properties fo:break-before="page" fo:text-align="justify"/>
      <style:text-properties fo:color="#800080"/>
    </style:style>
    <style:style style:name="P92" style:parent-style-name="Normal" style:family="paragraph">
      <style:paragraph-properties fo:text-align="justify"/>
      <style:text-properties fo:color="#800080"/>
    </style:style>
    <style:style style:name="P93" style:parent-style-name="Normal" style:family="paragraph">
      <style:paragraph-properties fo:text-align="justify"/>
      <style:text-properties fo:color="#800080"/>
    </style:style>
    <style:style style:name="P94" style:parent-style-name="Normal" style:family="paragraph">
      <style:paragraph-properties fo:text-align="justify"/>
      <style:text-properties fo:color="#800080"/>
    </style:style>
    <style:style style:name="P95" style:parent-style-name="Normal" style:family="paragraph">
      <style:paragraph-properties fo:text-align="justify"/>
      <style:text-properties fo:color="#800080"/>
    </style:style>
    <style:style style:name="P96" style:parent-style-name="Normal" style:family="paragraph">
      <style:paragraph-properties fo:text-align="justify"/>
      <style:text-properties fo:color="#800080"/>
    </style:style>
    <style:style style:name="P97" style:parent-style-name="Normal" style:family="paragraph">
      <style:paragraph-properties fo:text-align="justify"/>
      <style:text-properties fo:color="#800080"/>
    </style:style>
    <style:style style:name="P98" style:parent-style-name="Normal" style:family="paragraph">
      <style:paragraph-properties fo:text-align="justify"/>
      <style:text-properties fo:color="#800080"/>
    </style:style>
    <style:style style:name="P99" style:parent-style-name="Normal" style:family="paragraph">
      <style:paragraph-properties fo:text-align="justify"/>
      <style:text-properties fo:color="#800080"/>
    </style:style>
    <style:style style:name="P100" style:parent-style-name="Normal" style:family="paragraph">
      <style:paragraph-properties fo:text-align="justify"/>
      <style:text-properties fo:color="#800080"/>
    </style:style>
    <style:style style:name="P101" style:parent-style-name="Normal" style:family="paragraph">
      <style:paragraph-properties fo:text-align="justify"/>
      <style:text-properties fo:color="#800080"/>
    </style:style>
    <style:style style:name="P102" style:parent-style-name="Normal" style:family="paragraph">
      <style:paragraph-properties fo:break-before="page" fo:text-align="justify"/>
      <style:text-properties fo:color="#800080"/>
    </style:style>
    <style:style style:name="P103" style:parent-style-name="Normal" style:family="paragraph">
      <style:paragraph-properties fo:text-align="justify"/>
      <style:text-properties fo:color="#800080"/>
    </style:style>
    <style:style style:name="P104" style:parent-style-name="Normal" style:family="paragraph">
      <style:paragraph-properties fo:text-align="justify"/>
      <style:text-properties fo:color="#800080"/>
    </style:style>
    <style:style style:name="P105" style:parent-style-name="Normal" style:family="paragraph">
      <style:paragraph-properties fo:text-align="justify"/>
      <style:text-properties fo:color="#800080"/>
    </style:style>
    <style:style style:name="P106" style:parent-style-name="Normal" style:family="paragraph">
      <style:paragraph-properties fo:text-align="justify"/>
      <style:text-properties fo:color="#800080"/>
    </style:style>
    <style:style style:name="P107" style:parent-style-name="Normal" style:family="paragraph">
      <style:paragraph-properties fo:text-align="justify"/>
      <style:text-properties fo:color="#800080"/>
    </style:style>
    <style:style style:name="P108" style:parent-style-name="Normal" style:family="paragraph">
      <style:paragraph-properties fo:text-align="justify"/>
      <style:text-properties fo:color="#800080"/>
    </style:style>
    <style:style style:name="P109" style:parent-style-name="Normal" style:family="paragraph">
      <style:paragraph-properties fo:text-align="justify"/>
      <style:text-properties fo:color="#800080"/>
    </style:style>
    <style:style style:name="P110" style:parent-style-name="Normal" style:family="paragraph">
      <style:paragraph-properties fo:text-align="justify"/>
      <style:text-properties fo:color="#800080"/>
    </style:style>
    <style:style style:name="P111" style:parent-style-name="Normal" style:family="paragraph">
      <style:paragraph-properties fo:text-align="justify"/>
      <style:text-properties fo:color="#800080"/>
    </style:style>
    <style:style style:name="P112" style:parent-style-name="Normal" style:family="paragraph">
      <style:paragraph-properties fo:text-align="justify"/>
      <style:text-properties fo:color="#800080"/>
    </style:style>
    <style:style style:name="P113" style:parent-style-name="Normal" style:family="paragraph">
      <style:paragraph-properties fo:text-align="justify"/>
      <style:text-properties fo:color="#800080"/>
    </style:style>
    <style:style style:name="P114" style:parent-style-name="Normal" style:family="paragraph">
      <style:paragraph-properties fo:text-align="justify"/>
      <style:text-properties fo:color="#800080"/>
    </style:style>
    <style:style style:name="P115" style:parent-style-name="Normal" style:family="paragraph">
      <style:paragraph-properties fo:text-align="justify"/>
      <style:text-properties fo:color="#800080"/>
    </style:style>
    <style:style style:name="P116" style:parent-style-name="Normal" style:family="paragraph">
      <style:paragraph-properties fo:text-align="justify"/>
      <style:text-properties fo:color="#800080"/>
    </style:style>
    <style:style style:name="P117" style:parent-style-name="Normal" style:family="paragraph">
      <style:paragraph-properties fo:break-before="page" fo:text-align="justify"/>
      <style:text-properties fo:color="#800080"/>
    </style:style>
    <style:style style:name="P118" style:parent-style-name="Normal" style:family="paragraph">
      <style:paragraph-properties fo:text-align="justify"/>
      <style:text-properties fo:color="#800080"/>
    </style:style>
    <style:style style:name="P119" style:parent-style-name="Normal" style:family="paragraph">
      <style:paragraph-properties fo:text-align="justify"/>
      <style:text-properties fo:color="#800080"/>
    </style:style>
    <style:style style:name="P120" style:parent-style-name="Normal" style:family="paragraph">
      <style:paragraph-properties fo:text-align="justify"/>
      <style:text-properties fo:color="#800080"/>
    </style:style>
    <style:style style:name="P121" style:parent-style-name="Normal" style:family="paragraph">
      <style:paragraph-properties fo:text-align="justify"/>
      <style:text-properties fo:color="#800080"/>
    </style:style>
    <style:style style:name="P122" style:parent-style-name="Normal" style:family="paragraph">
      <style:paragraph-properties fo:text-align="justify"/>
      <style:text-properties fo:color="#800080"/>
    </style:style>
    <style:style style:name="P123" style:parent-style-name="Normal" style:family="paragraph">
      <style:paragraph-properties fo:text-align="justify"/>
      <style:text-properties fo:color="#800080"/>
    </style:style>
    <style:style style:name="P124" style:parent-style-name="Normal" style:family="paragraph">
      <style:paragraph-properties fo:text-align="justify"/>
      <style:text-properties fo:color="#800080"/>
    </style:style>
    <style:style style:name="P125" style:parent-style-name="Normal" style:family="paragraph">
      <style:paragraph-properties fo:text-align="justify"/>
      <style:text-properties fo:color="#800080"/>
    </style:style>
    <style:style style:name="P126" style:parent-style-name="Normal" style:family="paragraph">
      <style:paragraph-properties fo:text-align="justify"/>
      <style:text-properties fo:color="#800080"/>
    </style:style>
    <style:style style:name="P127" style:parent-style-name="Normal" style:family="paragraph">
      <style:paragraph-properties fo:text-align="justify"/>
      <style:text-properties fo:color="#800080"/>
    </style:style>
    <style:style style:name="P128" style:parent-style-name="Heading1" style:family="paragraph">
      <style:paragraph-properties fo:break-before="page"/>
      <style:text-properties fo:color="#800080"/>
    </style:style>
    <style:style style:name="P129" style:parent-style-name="Normal" style:family="paragraph">
      <style:paragraph-properties fo:text-align="justify"/>
      <style:text-properties fo:color="#800080"/>
    </style:style>
    <style:style style:name="P130" style:parent-style-name="Normal" style:family="paragraph">
      <style:paragraph-properties fo:text-align="justify"/>
      <style:text-properties fo:color="#800080"/>
    </style:style>
    <style:style style:name="P131" style:parent-style-name="Normal" style:family="paragraph">
      <style:paragraph-properties fo:text-align="justify"/>
      <style:text-properties fo:color="#800080"/>
    </style:style>
    <style:style style:name="P132" style:parent-style-name="Normal" style:family="paragraph">
      <style:paragraph-properties fo:text-align="justify"/>
      <style:text-properties fo:color="#800080"/>
    </style:style>
    <style:style style:name="P133" style:parent-style-name="Normal" style:family="paragraph">
      <style:paragraph-properties fo:text-align="justify"/>
      <style:text-properties fo:color="#800080"/>
    </style:style>
    <style:style style:name="P134" style:parent-style-name="Normal" style:family="paragraph">
      <style:paragraph-properties fo:text-align="justify"/>
      <style:text-properties fo:color="#800080"/>
    </style:style>
    <style:style style:name="P135" style:parent-style-name="Normal" style:family="paragraph">
      <style:paragraph-properties fo:text-align="justify"/>
      <style:text-properties fo:color="#800080"/>
    </style:style>
    <style:style style:name="P136" style:parent-style-name="Normal" style:family="paragraph">
      <style:paragraph-properties fo:text-align="justify"/>
      <style:text-properties fo:color="#800080"/>
    </style:style>
    <style:style style:name="P137" style:parent-style-name="Normal" style:family="paragraph">
      <style:paragraph-properties fo:text-align="justify"/>
      <style:text-properties fo:color="#800080"/>
    </style:style>
    <style:style style:name="P138" style:parent-style-name="Normal" style:family="paragraph">
      <style:paragraph-properties fo:text-align="justify"/>
      <style:text-properties fo:color="#800080"/>
    </style:style>
    <style:style style:name="P139" style:parent-style-name="Normal" style:family="paragraph">
      <style:paragraph-properties fo:text-align="justify"/>
      <style:text-properties fo:color="#800080"/>
    </style:style>
    <style:style style:name="P140" style:parent-style-name="Normal" style:family="paragraph">
      <style:paragraph-properties fo:text-align="justify"/>
      <style:text-properties fo:color="#800080"/>
    </style:style>
    <style:style style:name="P141" style:parent-style-name="Normal" style:family="paragraph">
      <style:paragraph-properties fo:text-align="justify"/>
      <style:text-properties fo:color="#800080"/>
    </style:style>
    <style:style style:name="P142" style:parent-style-name="Normal" style:family="paragraph">
      <style:paragraph-properties fo:text-align="justify"/>
      <style:text-properties fo:color="#800080"/>
    </style:style>
    <style:style style:name="P143" style:parent-style-name="Normal" style:family="paragraph">
      <style:paragraph-properties fo:text-align="justify"/>
      <style:text-properties fo:color="#800080"/>
    </style:style>
    <style:style style:name="P144" style:parent-style-name="Normal" style:family="paragraph">
      <style:paragraph-properties fo:text-align="justify"/>
      <style:text-properties fo:color="#800080"/>
    </style:style>
    <style:style style:name="P145" style:parent-style-name="Normal" style:family="paragraph">
      <style:paragraph-properties fo:text-align="justify"/>
      <style:text-properties fo:color="#800080"/>
    </style:style>
    <style:style style:name="P146" style:parent-style-name="Normal" style:family="paragraph">
      <style:paragraph-properties fo:text-align="justify"/>
      <style:text-properties fo:color="#800080"/>
    </style:style>
    <style:style style:name="P147" style:parent-style-name="BodyText" style:family="paragraph">
      <style:text-properties fo:color="#800080"/>
    </style:style>
    <style:style style:name="P148" style:parent-style-name="BodyText" style:family="paragraph">
      <style:text-properties fo:color="#800080"/>
    </style:style>
    <style:style style:name="P149" style:parent-style-name="BodyText" style:family="paragraph">
      <style:text-properties fo:color="#800080"/>
    </style:style>
    <style:style style:name="P150" style:parent-style-name="BodyText" style:family="paragraph">
      <style:text-properties fo:color="#800080"/>
    </style:style>
    <style:style style:name="P151" style:parent-style-name="BodyText" style:family="paragraph">
      <style:text-properties fo:color="#800080"/>
    </style:style>
    <style:style style:name="P152" style:parent-style-name="Heading2" style:family="paragraph">
      <style:paragraph-properties fo:break-before="page"/>
    </style:style>
    <style:style style:name="P153" style:parent-style-name="BodyText" style:family="paragraph">
      <style:text-properties fo:color="#800080"/>
    </style:style>
    <style:style style:name="P154" style:parent-style-name="BodyText" style:family="paragraph">
      <style:text-properties fo:color="#800080"/>
    </style:style>
    <style:style style:name="P155" style:parent-style-name="BodyText" style:family="paragraph">
      <style:text-properties fo:color="#800080"/>
    </style:style>
    <style:style style:name="P156" style:parent-style-name="BodyText" style:family="paragraph">
      <style:text-properties fo:color="#800080"/>
    </style:style>
    <style:style style:name="P157" style:parent-style-name="BodyText" style:family="paragraph">
      <style:text-properties fo:color="#800080"/>
    </style:style>
    <style:style style:name="P158" style:parent-style-name="BodyText" style:family="paragraph">
      <style:text-properties fo:color="#800080"/>
    </style:style>
    <style:style style:name="P159" style:parent-style-name="BodyText" style:family="paragraph">
      <style:text-properties fo:color="#800080"/>
    </style:style>
    <style:style style:name="P160" style:parent-style-name="BodyText" style:family="paragraph">
      <style:text-properties fo:color="#800080"/>
    </style:style>
    <style:style style:name="P161" style:parent-style-name="BodyText" style:family="paragraph">
      <style:text-properties fo:color="#800080"/>
    </style:style>
    <style:style style:name="P162" style:parent-style-name="BodyText" style:family="paragraph">
      <style:text-properties fo:color="#800080"/>
    </style:style>
    <style:style style:name="P163" style:parent-style-name="BodyText" style:family="paragraph">
      <style:text-properties fo:color="#800080"/>
    </style:style>
    <style:style style:name="P164" style:parent-style-name="BodyText" style:family="paragraph">
      <style:text-properties fo:color="#800080"/>
    </style:style>
    <style:style style:name="P165" style:parent-style-name="BodyText" style:family="paragraph">
      <style:text-properties fo:color="#800080"/>
    </style:style>
    <style:style style:name="P166" style:parent-style-name="BodyText" style:family="paragraph">
      <style:text-properties fo:color="#800080"/>
    </style:style>
    <style:style style:name="P167" style:parent-style-name="BodyText" style:family="paragraph">
      <style:text-properties fo:color="#800080"/>
    </style:style>
    <style:style style:name="P168" style:parent-style-name="BodyText" style:family="paragraph">
      <style:text-properties fo:color="#800080"/>
    </style:style>
    <style:style style:name="P169" style:parent-style-name="BodyText" style:family="paragraph">
      <style:text-properties fo:color="#800080"/>
    </style:style>
    <style:style style:name="P170" style:parent-style-name="BodyText" style:family="paragraph">
      <style:text-properties fo:color="#800080"/>
    </style:style>
    <style:style style:name="P171" style:parent-style-name="BodyText" style:family="paragraph">
      <style:text-properties fo:color="#800080"/>
    </style:style>
    <style:style style:name="P172" style:parent-style-name="BodyText" style:family="paragraph">
      <style:text-properties fo:color="#800080"/>
    </style:style>
    <style:style style:name="P173" style:parent-style-name="BodyText" style:family="paragraph">
      <style:text-properties fo:color="#800080"/>
    </style:style>
    <style:style style:name="P174" style:parent-style-name="BodyText" style:family="paragraph">
      <style:text-properties fo:color="#800080"/>
    </style:style>
    <style:style style:name="P175" style:parent-style-name="BodyText" style:family="paragraph">
      <style:text-properties fo:color="#800080"/>
    </style:style>
    <style:style style:name="P176" style:parent-style-name="BodyText" style:family="paragraph">
      <style:text-properties fo:color="#800080"/>
    </style:style>
    <style:style style:name="P177" style:parent-style-name="BodyText" style:family="paragraph">
      <style:text-properties fo:color="#800080"/>
    </style:style>
    <style:style style:name="P178" style:parent-style-name="BodyText" style:family="paragraph">
      <style:text-properties fo:color="#800080"/>
    </style:style>
    <style:style style:name="P179" style:parent-style-name="BodyText" style:family="paragraph">
      <style:text-properties fo:color="#800080"/>
    </style:style>
    <style:style style:name="P180" style:parent-style-name="BodyText" style:family="paragraph">
      <style:text-properties fo:color="#800080"/>
    </style:style>
    <style:style style:name="P181" style:parent-style-name="BodyText" style:family="paragraph">
      <style:text-properties fo:color="#800080"/>
    </style:style>
    <style:style style:name="P182" style:parent-style-name="BodyText" style:family="paragraph">
      <style:text-properties fo:color="#800080"/>
    </style:style>
    <style:style style:name="P183" style:parent-style-name="BodyText" style:family="paragraph">
      <style:text-properties fo:color="#800080"/>
    </style:style>
    <style:style style:name="P184" style:parent-style-name="BodyText" style:family="paragraph">
      <style:text-properties fo:color="#800080"/>
    </style:style>
    <style:style style:name="P185" style:parent-style-name="BodyText" style:family="paragraph">
      <style:text-properties fo:color="#800080"/>
    </style:style>
    <style:style style:name="P186" style:parent-style-name="BodyText" style:family="paragraph">
      <style:text-properties fo:color="#800080"/>
    </style:style>
    <style:style style:name="P187" style:parent-style-name="Heading2" style:family="paragraph">
      <style:paragraph-properties fo:break-before="page"/>
    </style:style>
    <style:style style:name="P188" style:parent-style-name="BodyText" style:family="paragraph">
      <style:text-properties fo:color="#800080"/>
    </style:style>
    <style:style style:name="P189" style:parent-style-name="BodyText" style:family="paragraph">
      <style:text-properties fo:color="#800080"/>
    </style:style>
    <style:style style:name="P190" style:parent-style-name="BodyText" style:family="paragraph">
      <style:text-properties fo:color="#800080"/>
    </style:style>
    <style:style style:name="P191" style:parent-style-name="BodyText" style:family="paragraph">
      <style:text-properties fo:color="#800080"/>
    </style:style>
    <style:style style:name="P192" style:parent-style-name="BodyText" style:family="paragraph">
      <style:text-properties fo:color="#800080"/>
    </style:style>
    <style:style style:name="P193" style:parent-style-name="BodyText" style:family="paragraph">
      <style:text-properties fo:color="#800080"/>
    </style:style>
    <style:style style:name="P194" style:parent-style-name="BodyText" style:family="paragraph">
      <style:text-properties fo:color="#800080"/>
    </style:style>
    <style:style style:name="P195" style:parent-style-name="BodyText" style:family="paragraph">
      <style:text-properties fo:color="#800080"/>
    </style:style>
    <style:style style:name="P196" style:parent-style-name="BodyText" style:family="paragraph">
      <style:text-properties fo:color="#800080"/>
    </style:style>
    <style:style style:name="P197" style:parent-style-name="BodyText" style:family="paragraph">
      <style:text-properties fo:color="#800080"/>
    </style:style>
    <style:style style:name="P198" style:parent-style-name="BodyText" style:family="paragraph">
      <style:text-properties fo:color="#800080"/>
    </style:style>
    <style:style style:name="P199" style:parent-style-name="BodyText" style:family="paragraph">
      <style:text-properties fo:color="#800080"/>
    </style:style>
    <style:style style:name="P200" style:parent-style-name="BodyText" style:family="paragraph">
      <style:text-properties fo:color="#800080"/>
    </style:style>
    <style:style style:name="P201" style:parent-style-name="BodyText" style:family="paragraph">
      <style:text-properties fo:color="#800080"/>
    </style:style>
    <style:style style:name="P202" style:parent-style-name="BodyText" style:family="paragraph">
      <style:text-properties fo:color="#800080"/>
    </style:style>
    <style:style style:name="P203" style:parent-style-name="BodyText" style:family="paragraph">
      <style:text-properties fo:color="#800080"/>
    </style:style>
    <style:style style:name="P204" style:parent-style-name="BodyText" style:family="paragraph">
      <style:text-properties fo:color="#800080"/>
    </style:style>
    <style:style style:name="P205" style:parent-style-name="Heading2" style:family="paragraph">
      <style:paragraph-properties fo:break-before="page"/>
    </style:style>
    <style:style style:name="P206" style:parent-style-name="BodyText" style:family="paragraph">
      <style:text-properties fo:color="#800080"/>
    </style:style>
    <style:style style:name="P207" style:parent-style-name="BodyText" style:family="paragraph">
      <style:text-properties fo:color="#800080"/>
    </style:style>
    <style:style style:name="P208" style:parent-style-name="BodyText" style:family="paragraph">
      <style:text-properties fo:color="#800080"/>
    </style:style>
    <style:style style:name="P209" style:parent-style-name="BodyText" style:family="paragraph">
      <style:text-properties fo:color="#800080"/>
    </style:style>
    <style:style style:name="P210" style:parent-style-name="BodyText" style:family="paragraph">
      <style:text-properties fo:color="#800080"/>
    </style:style>
    <style:style style:name="P211" style:parent-style-name="BodyText" style:family="paragraph">
      <style:text-properties fo:color="#800080"/>
    </style:style>
    <style:style style:name="P212" style:parent-style-name="BodyText" style:family="paragraph">
      <style:text-properties fo:color="#800080"/>
    </style:style>
    <style:style style:name="P213" style:parent-style-name="BodyText" style:family="paragraph">
      <style:text-properties fo:color="#800080"/>
    </style:style>
    <style:style style:name="P214" style:parent-style-name="BodyText" style:family="paragraph">
      <style:text-properties fo:color="#800080"/>
    </style:style>
    <style:style style:name="P215" style:parent-style-name="BodyText" style:family="paragraph">
      <style:text-properties fo:color="#800080"/>
    </style:style>
    <style:style style:name="P216" style:parent-style-name="BodyText" style:family="paragraph">
      <style:text-properties fo:color="#800080"/>
    </style:style>
    <style:style style:name="P217" style:parent-style-name="BodyText" style:family="paragraph">
      <style:text-properties fo:color="#800080"/>
    </style:style>
    <style:style style:name="P218" style:parent-style-name="BodyText" style:family="paragraph">
      <style:text-properties fo:color="#800080"/>
    </style:style>
    <style:style style:name="P219" style:parent-style-name="BodyText" style:family="paragraph">
      <style:text-properties fo:color="#800080"/>
    </style:style>
    <style:style style:name="P220" style:parent-style-name="BodyText" style:family="paragraph">
      <style:text-properties fo:color="#800080"/>
    </style:style>
    <style:style style:name="P221" style:parent-style-name="BodyText" style:family="paragraph">
      <style:text-properties fo:color="#800080"/>
    </style:style>
    <style:style style:name="P222" style:parent-style-name="BodyText" style:family="paragraph">
      <style:paragraph-properties fo:break-before="page"/>
      <style:text-properties fo:color="#800080"/>
    </style:style>
    <style:style style:name="P223" style:parent-style-name="BodyText" style:family="paragraph">
      <style:text-properties fo:color="#800080"/>
    </style:style>
    <style:style style:name="P224" style:parent-style-name="BodyText" style:family="paragraph">
      <style:text-properties fo:color="#800080"/>
    </style:style>
    <style:style style:name="P225" style:parent-style-name="BodyText" style:family="paragraph">
      <style:text-properties fo:color="#800080"/>
    </style:style>
    <style:style style:name="P226" style:parent-style-name="BodyText" style:family="paragraph">
      <style:text-properties fo:color="#800080"/>
    </style:style>
    <style:style style:name="P227" style:parent-style-name="BodyText" style:family="paragraph">
      <style:text-properties fo:color="#800080"/>
    </style:style>
    <style:style style:name="P228" style:parent-style-name="BodyText" style:family="paragraph">
      <style:text-properties fo:color="#800080"/>
    </style:style>
    <style:style style:name="P229" style:parent-style-name="BodyText" style:family="paragraph">
      <style:text-properties fo:color="#800080"/>
    </style:style>
    <style:style style:name="P230" style:parent-style-name="BodyText" style:family="paragraph">
      <style:text-properties fo:color="#800080"/>
    </style:style>
    <style:style style:name="P231" style:parent-style-name="BodyText" style:family="paragraph">
      <style:text-properties fo:color="#800080"/>
    </style:style>
    <style:style style:name="P232" style:parent-style-name="BodyText" style:family="paragraph">
      <style:text-properties fo:color="#800080"/>
    </style:style>
    <style:style style:name="P233" style:parent-style-name="BodyText" style:family="paragraph">
      <style:paragraph-properties fo:break-before="page"/>
      <style:text-properties fo:color="#800080"/>
    </style:style>
    <style:style style:name="P234" style:parent-style-name="BodyText" style:family="paragraph">
      <style:text-properties fo:color="#800080"/>
    </style:style>
    <style:style style:name="P235" style:parent-style-name="BodyText" style:family="paragraph">
      <style:text-properties fo:color="#800080"/>
    </style:style>
    <style:style style:name="P236" style:parent-style-name="BodyText" style:family="paragraph">
      <style:text-properties fo:color="#800080"/>
    </style:style>
    <style:style style:name="P237" style:parent-style-name="BodyText" style:family="paragraph">
      <style:text-properties fo:color="#800080"/>
    </style:style>
    <style:style style:name="P238" style:parent-style-name="BodyText" style:family="paragraph">
      <style:text-properties fo:color="#800080"/>
    </style:style>
    <style:style style:name="P239" style:parent-style-name="BodyText" style:family="paragraph">
      <style:text-properties fo:color="#800080"/>
    </style:style>
    <style:style style:name="P240" style:parent-style-name="BodyText" style:family="paragraph">
      <style:text-properties fo:color="#800080"/>
    </style:style>
    <style:style style:name="P241" style:parent-style-name="BodyText" style:family="paragraph">
      <style:text-properties fo:color="#800080"/>
    </style:style>
    <style:style style:name="P242" style:parent-style-name="BodyText" style:family="paragraph">
      <style:text-properties fo:color="#800080"/>
    </style:style>
    <style:style style:name="P243" style:parent-style-name="BodyText" style:family="paragraph">
      <style:text-properties fo:color="#800080"/>
    </style:style>
    <style:style style:name="P244" style:parent-style-name="BodyText" style:family="paragraph">
      <style:text-properties fo:color="#800080"/>
    </style:style>
    <style:style style:name="P245" style:parent-style-name="BodyText" style:family="paragraph">
      <style:text-properties fo:color="#800080"/>
    </style:style>
    <style:style style:name="P246" style:parent-style-name="BodyText" style:family="paragraph">
      <style:text-properties fo:color="#800080"/>
    </style:style>
    <style:style style:name="P247" style:parent-style-name="BodyText" style:family="paragraph">
      <style:text-properties fo:color="#800080"/>
    </style:style>
    <style:style style:name="P248" style:parent-style-name="BodyText" style:family="paragraph">
      <style:text-properties fo:color="#800080"/>
    </style:style>
    <style:style style:name="P249" style:parent-style-name="BodyText" style:family="paragraph">
      <style:text-properties fo:color="#800080"/>
    </style:style>
    <style:style style:name="P250" style:parent-style-name="BodyText" style:family="paragraph">
      <style:text-properties fo:color="#800080"/>
    </style:style>
    <style:style style:name="P251" style:parent-style-name="BodyText" style:family="paragraph">
      <style:text-properties fo:color="#800080"/>
    </style:style>
    <style:style style:name="P252" style:parent-style-name="BodyText" style:family="paragraph">
      <style:text-properties fo:color="#800080"/>
    </style:style>
    <style:style style:name="P253" style:parent-style-name="BodyText" style:family="paragraph">
      <style:text-properties fo:color="#800080"/>
    </style:style>
    <style:style style:name="P254" style:parent-style-name="BodyText" style:family="paragraph">
      <style:text-properties fo:color="#800080"/>
    </style:style>
    <style:style style:name="P255" style:parent-style-name="BodyText" style:family="paragraph">
      <style:text-properties fo:color="#800080"/>
    </style:style>
    <style:style style:name="P256" style:parent-style-name="BodyText" style:family="paragraph">
      <style:text-properties fo:color="#800080"/>
    </style:style>
    <style:style style:name="P257" style:parent-style-name="BodyText" style:family="paragraph">
      <style:text-properties fo:color="#800080"/>
    </style:style>
    <style:style style:name="P258" style:parent-style-name="BodyText" style:family="paragraph">
      <style:text-properties fo:color="#800080"/>
    </style:style>
    <style:style style:name="P259" style:parent-style-name="Heading2" style:family="paragraph">
      <style:paragraph-properties fo:break-before="page"/>
    </style:style>
    <style:style style:name="P260" style:parent-style-name="BodyText" style:family="paragraph">
      <style:text-properties fo:color="#800080"/>
    </style:style>
    <style:style style:name="P261" style:parent-style-name="BodyText" style:family="paragraph">
      <style:text-properties fo:color="#800080"/>
    </style:style>
    <style:style style:name="P262" style:parent-style-name="BodyText" style:family="paragraph">
      <style:text-properties fo:color="#800080"/>
    </style:style>
    <style:style style:name="P263" style:parent-style-name="BodyText" style:family="paragraph">
      <style:text-properties fo:color="#800080"/>
    </style:style>
    <style:style style:name="P264" style:parent-style-name="BodyText" style:family="paragraph">
      <style:text-properties fo:color="#800080"/>
    </style:style>
    <style:style style:name="P265" style:parent-style-name="BodyText" style:family="paragraph">
      <style:text-properties fo:color="#800080"/>
    </style:style>
    <style:style style:name="P266" style:parent-style-name="Heading1" style:family="paragraph">
      <style:text-properties fo:color="#800080"/>
    </style:style>
    <style:style style:name="P267" style:parent-style-name="Normal" style:family="paragraph">
      <style:paragraph-properties fo:text-align="justify"/>
      <style:text-properties fo:color="#800080"/>
    </style:style>
    <style:style style:name="P268" style:parent-style-name="Normal" style:family="paragraph">
      <style:paragraph-properties fo:text-align="justify"/>
      <style:text-properties fo:color="#800080"/>
    </style:style>
    <style:style style:name="P269" style:parent-style-name="Normal" style:family="paragraph">
      <style:paragraph-properties fo:text-align="justify"/>
      <style:text-properties fo:color="#800080"/>
    </style:style>
    <style:style style:name="P270" style:parent-style-name="Normal" style:family="paragraph">
      <style:paragraph-properties fo:text-align="justify"/>
      <style:text-properties fo:color="#800080"/>
    </style:style>
    <style:style style:name="P271" style:parent-style-name="Normal" style:family="paragraph">
      <style:paragraph-properties fo:text-align="justify"/>
      <style:text-properties fo:color="#800080"/>
    </style:style>
    <style:style style:name="P272" style:parent-style-name="BodyText" style:family="paragraph">
      <style:text-properties fo:color="#800080"/>
    </style:style>
    <style:style style:name="P273" style:parent-style-name="BodyText" style:family="paragraph">
      <style:text-properties fo:color="#800080"/>
    </style:style>
    <style:style style:name="P274" style:parent-style-name="BodyText" style:family="paragraph">
      <style:text-properties fo:color="#800080"/>
    </style:style>
    <style:style style:name="P275" style:parent-style-name="BodyText" style:family="paragraph">
      <style:text-properties fo:color="#800080"/>
    </style:style>
    <style:style style:name="P276" style:parent-style-name="BodyText" style:family="paragraph">
      <style:text-properties fo:color="#800080"/>
    </style:style>
    <style:style style:name="P277" style:parent-style-name="BodyText" style:family="paragraph">
      <style:text-properties fo:color="#800080"/>
    </style:style>
    <style:style style:name="P278" style:parent-style-name="BodyText" style:family="paragraph">
      <style:paragraph-properties fo:break-before="page"/>
      <style:text-properties fo:color="#800080"/>
    </style:style>
    <style:style style:name="P279" style:parent-style-name="BodyText" style:family="paragraph">
      <style:text-properties fo:color="#800080"/>
    </style:style>
    <style:style style:name="P280" style:parent-style-name="BodyText" style:family="paragraph">
      <style:text-properties fo:color="#800080"/>
    </style:style>
    <style:style style:name="P281" style:parent-style-name="BodyText" style:family="paragraph">
      <style:text-properties fo:color="#800080"/>
    </style:style>
    <style:style style:name="P282" style:parent-style-name="Normal" style:family="paragraph">
      <style:paragraph-properties fo:text-align="justify"/>
      <style:text-properties fo:color="#800080"/>
    </style:style>
    <style:style style:name="P283" style:parent-style-name="Normal" style:family="paragraph">
      <style:paragraph-properties fo:text-align="justify"/>
      <style:text-properties fo:color="#800080"/>
    </style:style>
    <style:style style:name="P284" style:parent-style-name="Normal" style:family="paragraph">
      <style:paragraph-properties fo:text-align="justify"/>
      <style:text-properties fo:color="#800080"/>
    </style:style>
    <style:style style:name="P285" style:parent-style-name="Normal" style:family="paragraph">
      <style:paragraph-properties fo:text-align="justify"/>
      <style:text-properties fo:color="#800080"/>
    </style:style>
    <style:style style:name="P286" style:parent-style-name="Normal" style:family="paragraph">
      <style:paragraph-properties fo:text-align="justify"/>
      <style:text-properties fo:color="#800080"/>
    </style:style>
    <style:style style:name="P287" style:parent-style-name="Normal" style:family="paragraph">
      <style:paragraph-properties fo:text-align="justify"/>
      <style:text-properties fo:color="#800080"/>
    </style:style>
    <style:style style:name="P288" style:parent-style-name="Normal" style:family="paragraph">
      <style:paragraph-properties fo:text-align="justify"/>
      <style:text-properties fo:color="#800080"/>
    </style:style>
    <style:style style:name="P289" style:parent-style-name="Normal" style:family="paragraph">
      <style:paragraph-properties fo:text-align="justify"/>
      <style:text-properties fo:color="#800080"/>
    </style:style>
    <style:style style:name="P290" style:parent-style-name="Normal" style:family="paragraph">
      <style:paragraph-properties fo:text-align="justify"/>
      <style:text-properties fo:color="#800080"/>
    </style:style>
    <style:style style:name="P291" style:parent-style-name="Heading1" style:family="paragraph">
      <style:paragraph-properties fo:text-align="justify"/>
      <style:text-properties fo:font-weight="normal" style:font-weight-asian="normal" fo:color="#800080"/>
    </style:style>
    <style:style style:name="P292" style:parent-style-name="Heading1" style:family="paragraph">
      <style:paragraph-properties fo:text-align="justify"/>
      <style:text-properties fo:font-weight="normal" style:font-weight-asian="normal" fo:color="#800080"/>
    </style:style>
    <style:style style:name="P293" style:parent-style-name="Normal" style:family="paragraph">
      <style:paragraph-properties fo:text-align="justify"/>
      <style:text-properties fo:color="#800080"/>
    </style:style>
    <style:style style:name="P294" style:parent-style-name="Normal" style:family="paragraph">
      <style:paragraph-properties fo:text-align="justify"/>
      <style:text-properties fo:color="#800080"/>
    </style:style>
    <style:style style:name="P295" style:parent-style-name="Normal" style:family="paragraph">
      <style:paragraph-properties fo:text-align="justify"/>
      <style:text-properties fo:color="#800080"/>
    </style:style>
    <style:style style:name="P296" style:parent-style-name="Normal" style:family="paragraph">
      <style:paragraph-properties fo:text-align="justify"/>
      <style:text-properties fo:color="#800080"/>
    </style:style>
    <style:style style:name="P297" style:parent-style-name="Normal" style:family="paragraph">
      <style:paragraph-properties fo:text-align="justify"/>
      <style:text-properties fo:color="#800080"/>
    </style:style>
    <style:style style:name="P298" style:parent-style-name="Normal" style:family="paragraph">
      <style:paragraph-properties fo:break-before="page" fo:text-align="justify"/>
      <style:text-properties fo:color="#800080"/>
    </style:style>
    <style:style style:name="P299" style:parent-style-name="Normal" style:family="paragraph">
      <style:paragraph-properties fo:text-align="justify"/>
      <style:text-properties fo:color="#800080"/>
    </style:style>
    <style:style style:name="P300" style:parent-style-name="Normal" style:family="paragraph">
      <style:paragraph-properties fo:text-align="justify"/>
      <style:text-properties fo:color="#800080"/>
    </style:style>
    <style:style style:name="P301" style:parent-style-name="Normal" style:family="paragraph">
      <style:paragraph-properties fo:text-align="justify"/>
      <style:text-properties fo:color="#800080"/>
    </style:style>
    <style:style style:name="P302" style:parent-style-name="Normal" style:family="paragraph">
      <style:paragraph-properties fo:text-align="justify"/>
      <style:text-properties fo:color="#800080"/>
    </style:style>
    <style:style style:name="P303" style:parent-style-name="Normal" style:family="paragraph">
      <style:paragraph-properties fo:text-align="justify"/>
      <style:text-properties fo:color="#800080"/>
    </style:style>
    <style:style style:name="P304" style:parent-style-name="Normal" style:family="paragraph">
      <style:paragraph-properties fo:text-align="justify"/>
      <style:text-properties fo:color="#800080"/>
    </style:style>
    <style:style style:name="P305" style:parent-style-name="Normal" style:family="paragraph">
      <style:paragraph-properties fo:text-align="justify"/>
      <style:text-properties fo:color="#800080"/>
    </style:style>
    <style:style style:name="P306" style:parent-style-name="Normal" style:family="paragraph">
      <style:paragraph-properties fo:text-align="justify"/>
      <style:text-properties fo:color="#800080"/>
    </style:style>
    <style:style style:name="P307" style:parent-style-name="Normal" style:family="paragraph">
      <style:paragraph-properties fo:text-align="justify"/>
      <style:text-properties fo:color="#800080"/>
    </style:style>
    <style:style style:name="P308" style:parent-style-name="Normal" style:family="paragraph">
      <style:paragraph-properties fo:text-align="justify"/>
      <style:text-properties fo:color="#800080"/>
    </style:style>
    <style:style style:name="P309" style:parent-style-name="Normal" style:family="paragraph">
      <style:paragraph-properties fo:text-align="justify"/>
      <style:text-properties fo:color="#800080"/>
    </style:style>
    <style:style style:name="P310" style:parent-style-name="Normal" style:family="paragraph">
      <style:paragraph-properties fo:text-align="justify"/>
      <style:text-properties fo:color="#800080"/>
    </style:style>
    <style:style style:name="P311" style:parent-style-name="Normal" style:family="paragraph">
      <style:paragraph-properties fo:text-align="justify"/>
      <style:text-properties fo:color="#800080"/>
    </style:style>
    <style:style style:name="P312" style:parent-style-name="Normal" style:family="paragraph">
      <style:paragraph-properties fo:text-align="justify"/>
      <style:text-properties fo:color="#800080"/>
    </style:style>
    <style:style style:name="P313" style:parent-style-name="Normal" style:family="paragraph">
      <style:paragraph-properties fo:text-align="justify"/>
      <style:text-properties fo:color="#800080"/>
    </style:style>
    <style:style style:name="P314" style:parent-style-name="Normal" style:family="paragraph">
      <style:paragraph-properties fo:break-before="page" fo:text-align="justify"/>
      <style:text-properties fo:color="#800080"/>
    </style:style>
    <style:style style:name="P315" style:parent-style-name="Normal" style:family="paragraph">
      <style:paragraph-properties fo:text-align="justify"/>
      <style:text-properties fo:color="#800080"/>
    </style:style>
    <style:style style:name="P316" style:parent-style-name="Normal" style:family="paragraph">
      <style:paragraph-properties fo:text-align="justify"/>
      <style:text-properties fo:color="#800080"/>
    </style:style>
    <style:style style:name="P317" style:parent-style-name="Normal" style:family="paragraph">
      <style:paragraph-properties fo:text-align="justify"/>
      <style:text-properties fo:color="#800080"/>
    </style:style>
    <style:style style:name="P318" style:parent-style-name="Normal" style:family="paragraph">
      <style:paragraph-properties fo:text-align="justify"/>
      <style:text-properties fo:color="#800080"/>
    </style:style>
    <style:style style:name="P319" style:parent-style-name="Normal" style:family="paragraph">
      <style:paragraph-properties fo:text-align="justify"/>
      <style:text-properties fo:color="#800080"/>
    </style:style>
    <style:style style:name="P320" style:parent-style-name="Normal" style:family="paragraph">
      <style:paragraph-properties fo:text-align="justify"/>
      <style:text-properties fo:color="#800080"/>
    </style:style>
    <style:style style:name="P321" style:parent-style-name="Normal" style:family="paragraph">
      <style:paragraph-properties fo:text-align="justify"/>
      <style:text-properties fo:color="#800080"/>
    </style:style>
    <style:style style:name="P322" style:parent-style-name="Normal" style:family="paragraph">
      <style:paragraph-properties fo:text-align="justify"/>
      <style:text-properties fo:color="#800080"/>
    </style:style>
    <style:style style:name="P323" style:parent-style-name="Normal" style:family="paragraph">
      <style:paragraph-properties fo:text-align="justify"/>
      <style:text-properties fo:color="#800080"/>
    </style:style>
    <style:style style:name="P324" style:parent-style-name="Normal" style:family="paragraph">
      <style:paragraph-properties fo:text-align="justify"/>
      <style:text-properties fo:color="#800080"/>
    </style:style>
    <style:style style:name="P325" style:parent-style-name="Normal" style:family="paragraph">
      <style:paragraph-properties fo:text-align="justify"/>
      <style:text-properties fo:color="#800080"/>
    </style:style>
    <style:style style:name="P326" style:parent-style-name="Normal" style:family="paragraph">
      <style:paragraph-properties fo:text-align="justify"/>
      <style:text-properties fo:color="#800080"/>
    </style:style>
    <style:style style:name="P327" style:parent-style-name="Normal" style:family="paragraph">
      <style:paragraph-properties fo:text-align="justify"/>
      <style:text-properties fo:color="#800080"/>
    </style:style>
    <style:style style:name="P328" style:parent-style-name="Normal" style:family="paragraph">
      <style:paragraph-properties fo:text-align="justify"/>
      <style:text-properties fo:color="#800080"/>
    </style:style>
    <style:style style:name="P329" style:parent-style-name="Normal" style:family="paragraph">
      <style:paragraph-properties fo:text-align="justify"/>
      <style:text-properties fo:color="#800080"/>
    </style:style>
    <style:style style:name="P330" style:parent-style-name="Normal" style:family="paragraph">
      <style:paragraph-properties fo:text-align="justify"/>
      <style:text-properties fo:color="#800080"/>
    </style:style>
    <style:style style:name="P331" style:parent-style-name="Normal" style:family="paragraph">
      <style:paragraph-properties fo:text-align="justify"/>
      <style:text-properties fo:color="#800080"/>
    </style:style>
    <style:style style:name="P332" style:parent-style-name="Normal" style:family="paragraph">
      <style:paragraph-properties fo:text-align="justify"/>
      <style:text-properties fo:color="#800080"/>
    </style:style>
    <style:style style:name="P333" style:parent-style-name="Normal" style:family="paragraph">
      <style:paragraph-properties fo:text-align="justify"/>
      <style:text-properties fo:color="#800080"/>
    </style:style>
    <style:style style:name="P334" style:parent-style-name="Normal" style:family="paragraph">
      <style:paragraph-properties fo:text-align="justify"/>
      <style:text-properties fo:color="#800080"/>
    </style:style>
    <style:style style:name="P335" style:parent-style-name="Normal" style:family="paragraph">
      <style:paragraph-properties fo:text-align="justify"/>
      <style:text-properties fo:color="#800080"/>
    </style:style>
    <style:style style:name="P336" style:parent-style-name="Normal" style:family="paragraph">
      <style:paragraph-properties fo:text-align="justify"/>
      <style:text-properties fo:color="#800080"/>
    </style:style>
    <style:style style:name="P337" style:parent-style-name="Normal" style:family="paragraph">
      <style:paragraph-properties fo:text-align="justify"/>
      <style:text-properties fo:color="#800080"/>
    </style:style>
    <style:style style:name="P338" style:parent-style-name="Normal" style:family="paragraph">
      <style:paragraph-properties fo:text-align="justify"/>
      <style:text-properties fo:color="#800080"/>
    </style:style>
    <style:style style:name="P339" style:parent-style-name="Normal" style:family="paragraph">
      <style:paragraph-properties fo:text-align="justify"/>
      <style:text-properties fo:color="#800080"/>
    </style:style>
    <style:style style:name="P340" style:parent-style-name="Normal" style:family="paragraph">
      <style:paragraph-properties fo:text-align="justify"/>
      <style:text-properties fo:color="#800080"/>
    </style:style>
    <style:style style:name="P341" style:parent-style-name="Normal" style:family="paragraph">
      <style:paragraph-properties fo:text-align="justify"/>
      <style:text-properties fo:color="#800080"/>
    </style:style>
    <style:style style:name="P342" style:parent-style-name="Normal" style:family="paragraph">
      <style:paragraph-properties fo:text-align="justify"/>
      <style:text-properties fo:color="#800080"/>
    </style:style>
    <style:style style:name="P343" style:parent-style-name="Normal" style:family="paragraph">
      <style:paragraph-properties fo:text-align="justify"/>
      <style:text-properties fo:color="#800080"/>
    </style:style>
    <style:style style:name="P344" style:parent-style-name="Normal" style:family="paragraph">
      <style:paragraph-properties fo:text-align="justify"/>
      <style:text-properties fo:color="#800080"/>
    </style:style>
    <style:style style:name="P345" style:parent-style-name="Normal" style:family="paragraph">
      <style:paragraph-properties fo:text-align="justify"/>
      <style:text-properties fo:color="#800080"/>
    </style:style>
    <style:style style:name="P346" style:parent-style-name="Normal" style:family="paragraph">
      <style:paragraph-properties fo:text-align="justify"/>
      <style:text-properties fo:color="#800080"/>
    </style:style>
    <style:style style:name="P347" style:parent-style-name="Normal" style:family="paragraph">
      <style:paragraph-properties fo:text-align="justify"/>
      <style:text-properties fo:color="#800080"/>
    </style:style>
    <style:style style:name="P348" style:parent-style-name="Normal" style:family="paragraph">
      <style:paragraph-properties fo:text-align="justify"/>
      <style:text-properties fo:color="#800080"/>
    </style:style>
    <style:style style:name="P349" style:parent-style-name="Normal" style:family="paragraph">
      <style:paragraph-properties fo:text-align="justify"/>
      <style:text-properties fo:color="#800080"/>
    </style:style>
    <style:style style:name="P350" style:parent-style-name="Normal" style:family="paragraph">
      <style:paragraph-properties fo:text-align="justify"/>
      <style:text-properties fo:color="#800080"/>
    </style:style>
    <style:style style:name="P351" style:parent-style-name="Normal" style:family="paragraph">
      <style:paragraph-properties fo:text-align="justify"/>
      <style:text-properties fo:color="#800080"/>
    </style:style>
    <style:style style:name="P352" style:parent-style-name="Normal" style:family="paragraph">
      <style:paragraph-properties fo:text-align="justify"/>
      <style:text-properties fo:color="#800080"/>
    </style:style>
    <style:style style:name="P353" style:parent-style-name="Normal" style:family="paragraph">
      <style:paragraph-properties fo:text-align="justify"/>
      <style:text-properties fo:color="#800080"/>
    </style:style>
    <style:style style:name="P354" style:parent-style-name="Normal" style:family="paragraph">
      <style:paragraph-properties fo:text-align="justify"/>
      <style:text-properties fo:color="#800080"/>
    </style:style>
    <style:style style:name="P355" style:parent-style-name="Normal" style:family="paragraph">
      <style:text-properties fo:color="#800080"/>
    </style:style>
    <style:style style:name="P356" style:parent-style-name="Normal" style:family="paragraph">
      <style:paragraph-properties fo:break-before="page" fo:text-align="justify"/>
      <style:text-properties fo:color="#800080"/>
    </style:style>
    <style:style style:name="P357" style:parent-style-name="Heading1" style:family="paragraph">
      <style:text-properties fo:color="#800080"/>
    </style:style>
    <style:style style:name="P358" style:parent-style-name="Normal" style:family="paragraph">
      <style:paragraph-properties fo:text-align="justify"/>
      <style:text-properties fo:color="#800080"/>
    </style:style>
    <style:style style:name="P359" style:parent-style-name="Normal" style:family="paragraph">
      <style:paragraph-properties fo:text-align="justify"/>
      <style:text-properties fo:color="#800080"/>
    </style:style>
    <style:style style:name="P360" style:parent-style-name="Normal" style:family="paragraph">
      <style:paragraph-properties fo:text-align="justify"/>
      <style:text-properties fo:color="#800080"/>
    </style:style>
    <style:style style:name="P361" style:parent-style-name="BodyText" style:family="paragraph">
      <style:text-properties fo:color="#800080"/>
    </style:style>
    <style:style style:name="P362" style:parent-style-name="BodyText" style:family="paragraph">
      <style:text-properties fo:color="#800080"/>
    </style:style>
    <style:style style:name="P363" style:parent-style-name="BodyText" style:family="paragraph">
      <style:text-properties fo:color="#800080"/>
    </style:style>
    <style:style style:name="P364" style:parent-style-name="BodyText" style:family="paragraph">
      <style:text-properties fo:color="#800080"/>
    </style:style>
    <style:style style:name="P365" style:parent-style-name="BodyText" style:family="paragraph">
      <style:text-properties fo:color="#800080"/>
    </style:style>
    <style:style style:name="P366" style:parent-style-name="BodyText" style:family="paragraph">
      <style:text-properties fo:color="#800080"/>
    </style:style>
    <style:style style:name="P367" style:parent-style-name="BodyText" style:family="paragraph">
      <style:text-properties fo:color="#800080"/>
    </style:style>
    <style:style style:name="P368" style:parent-style-name="BodyText" style:family="paragraph">
      <style:text-properties fo:color="#800080"/>
    </style:style>
    <style:style style:name="P369" style:parent-style-name="BodyText" style:family="paragraph">
      <style:text-properties fo:color="#800080"/>
    </style:style>
    <style:style style:name="P370" style:parent-style-name="Normal" style:family="paragraph">
      <style:paragraph-properties fo:text-align="justify"/>
    </style:style>
    <style:style style:name="P371" style:parent-style-name="Normal" style:family="paragraph">
      <style:paragraph-properties fo:text-align="justify"/>
    </style:style>
    <style:style style:name="P372" style:parent-style-name="Normal" style:family="paragraph">
      <style:paragraph-properties fo:text-align="justify"/>
    </style:style>
    <style:style style:name="P373" style:parent-style-name="Normal" style:family="paragraph">
      <style:paragraph-properties fo:text-align="justify"/>
    </style:style>
    <style:style style:name="P374" style:parent-style-name="Normal" style:family="paragraph">
      <style:paragraph-properties fo:text-align="justify"/>
    </style:style>
    <style:style style:name="P375" style:parent-style-name="Normal" style:family="paragraph">
      <style:paragraph-properties fo:text-align="justify"/>
    </style:style>
    <style:style style:name="P376" style:parent-style-name="Normal" style:family="paragraph">
      <style:paragraph-properties fo:text-align="justify"/>
    </style:style>
    <style:style style:name="P377" style:parent-style-name="Normal" style:family="paragraph">
      <style:paragraph-properties fo:text-align="justify"/>
    </style:style>
    <style:style style:name="P378" style:parent-style-name="Normal" style:family="paragraph">
      <style:paragraph-properties fo:text-align="justify"/>
      <style:text-properties fo:color="#800080"/>
    </style:style>
    <style:style style:name="P379" style:parent-style-name="Normal" style:family="paragraph">
      <style:paragraph-properties fo:text-align="justify"/>
      <style:text-properties fo:color="#800080"/>
    </style:style>
    <style:style style:name="P380" style:parent-style-name="BodyText" style:family="paragraph">
      <style:text-properties fo:color="#800080"/>
    </style:style>
    <style:style style:name="P381" style:parent-style-name="Normal" style:family="paragraph">
      <style:paragraph-properties fo:text-align="justify"/>
      <style:text-properties fo:font-style="italic" style:font-style-asian="italic" fo:color="#800080"/>
    </style:style>
    <style:style style:name="P382" style:parent-style-name="Normal" style:family="paragraph">
      <style:paragraph-properties fo:text-align="justify"/>
      <style:text-properties fo:color="#800080"/>
    </style:style>
    <style:style style:name="P383" style:parent-style-name="Normal" style:family="paragraph">
      <style:paragraph-properties fo:text-align="justify"/>
      <style:text-properties fo:color="#800080"/>
    </style:style>
    <style:style style:name="P384" style:parent-style-name="Normal" style:family="paragraph">
      <style:paragraph-properties fo:text-align="justify"/>
      <style:text-properties fo:color="#800080"/>
    </style:style>
    <style:style style:name="P385" style:parent-style-name="Normal" style:family="paragraph">
      <style:paragraph-properties fo:text-align="justify"/>
      <style:text-properties fo:color="#800080"/>
    </style:style>
    <style:style style:name="P386" style:parent-style-name="Normal" style:family="paragraph">
      <style:paragraph-properties fo:text-align="justify"/>
      <style:text-properties fo:color="#800080"/>
    </style:style>
    <style:style style:name="P387" style:parent-style-name="Normal" style:family="paragraph">
      <style:paragraph-properties fo:text-align="justify"/>
      <style:text-properties fo:color="#800080"/>
    </style:style>
    <style:style style:name="P388" style:parent-style-name="Normal" style:family="paragraph">
      <style:paragraph-properties fo:text-align="justify"/>
      <style:text-properties fo:color="#800080"/>
    </style:style>
    <style:style style:name="P389" style:parent-style-name="Normal" style:family="paragraph">
      <style:paragraph-properties fo:text-align="justify"/>
      <style:text-properties fo:color="#800080"/>
    </style:style>
    <style:style style:name="P390" style:parent-style-name="Normal" style:family="paragraph">
      <style:paragraph-properties fo:text-align="justify"/>
      <style:text-properties fo:color="#800080"/>
    </style:style>
    <style:style style:name="P391" style:parent-style-name="Normal" style:family="paragraph">
      <style:paragraph-properties fo:text-align="justify"/>
      <style:text-properties fo:color="#800080"/>
    </style:style>
    <style:style style:name="P392" style:parent-style-name="Normal" style:family="paragraph">
      <style:paragraph-properties fo:text-align="justify"/>
      <style:text-properties fo:color="#800080"/>
    </style:style>
    <style:style style:name="P393" style:parent-style-name="Normal" style:family="paragraph">
      <style:paragraph-properties fo:text-align="justify"/>
      <style:text-properties fo:color="#800080"/>
    </style:style>
    <style:style style:name="P394" style:parent-style-name="Normal" style:family="paragraph">
      <style:paragraph-properties fo:text-align="justify"/>
      <style:text-properties fo:color="#800080"/>
    </style:style>
    <style:style style:name="P395" style:parent-style-name="Normal" style:family="paragraph">
      <style:paragraph-properties fo:text-align="justify"/>
      <style:text-properties fo:color="#800080"/>
    </style:style>
    <style:style style:name="P396" style:parent-style-name="Normal" style:family="paragraph">
      <style:paragraph-properties fo:text-align="justify"/>
      <style:text-properties fo:color="#800080"/>
    </style:style>
    <style:style style:name="P397" style:parent-style-name="Heading1" style:family="paragraph">
      <style:paragraph-properties fo:break-before="page"/>
    </style:style>
    <style:style style:name="T398" style:parent-style-name="DefaultParagraphFont" style:family="text">
      <style:text-properties fo:color="#800080"/>
    </style:style>
    <style:style style:name="P399" style:parent-style-name="BodyText" style:family="paragraph">
      <style:text-properties fo:color="#800080"/>
    </style:style>
    <style:style style:name="P400" style:parent-style-name="BodyText" style:family="paragraph">
      <style:text-properties fo:color="#800080"/>
    </style:style>
    <style:style style:name="P401" style:parent-style-name="BodyText" style:family="paragraph">
      <style:text-properties fo:color="#800080"/>
    </style:style>
    <style:style style:name="P402" style:parent-style-name="BodyText" style:family="paragraph">
      <style:text-properties fo:color="#800080"/>
    </style:style>
    <style:style style:name="P403" style:parent-style-name="BodyText" style:family="paragraph">
      <style:text-properties fo:color="#800080"/>
    </style:style>
    <style:style style:name="P404" style:parent-style-name="BodyText" style:family="paragraph">
      <style:text-properties fo:color="#800080"/>
    </style:style>
    <style:style style:name="P405" style:parent-style-name="BodyText" style:family="paragraph">
      <style:text-properties fo:color="#800080"/>
    </style:style>
    <style:style style:name="P406" style:parent-style-name="BodyText" style:family="paragraph">
      <style:text-properties fo:color="#800080"/>
    </style:style>
    <style:style style:name="P407" style:parent-style-name="Normal" style:family="paragraph">
      <style:paragraph-properties fo:text-align="justify"/>
      <style:text-properties fo:color="#800080"/>
    </style:style>
    <style:style style:name="P408" style:parent-style-name="Normal" style:family="paragraph">
      <style:paragraph-properties fo:text-align="justify"/>
      <style:text-properties fo:color="#800080"/>
    </style:style>
    <style:style style:name="P409" style:parent-style-name="Normal" style:family="paragraph">
      <style:paragraph-properties fo:text-align="justify"/>
      <style:text-properties fo:color="#800080"/>
    </style:style>
    <style:style style:name="P410" style:parent-style-name="Normal" style:family="paragraph">
      <style:paragraph-properties fo:text-align="justify"/>
      <style:text-properties fo:color="#800080"/>
    </style:style>
    <style:style style:name="P411" style:parent-style-name="Normal" style:family="paragraph">
      <style:paragraph-properties fo:text-align="justify"/>
      <style:text-properties fo:color="#800080"/>
    </style:style>
    <style:style style:name="P412" style:parent-style-name="BodyText" style:family="paragraph">
      <style:text-properties fo:color="#800080"/>
    </style:style>
    <style:style style:name="P413" style:parent-style-name="BodyText" style:family="paragraph">
      <style:text-properties fo:color="#800080"/>
    </style:style>
    <style:style style:name="P414" style:parent-style-name="BodyText" style:family="paragraph">
      <style:text-properties fo:color="#800080"/>
    </style:style>
    <style:style style:name="P415" style:parent-style-name="BodyText" style:family="paragraph">
      <style:text-properties fo:color="#800080"/>
    </style:style>
    <style:style style:name="P416" style:parent-style-name="BodyText" style:family="paragraph">
      <style:text-properties fo:color="#800080"/>
    </style:style>
    <style:style style:name="P417" style:parent-style-name="BodyText" style:family="paragraph">
      <style:text-properties fo:color="#800080"/>
    </style:style>
    <style:style style:name="P418" style:parent-style-name="BodyText" style:family="paragraph">
      <style:text-properties fo:color="#800080"/>
    </style:style>
    <style:style style:name="P419" style:parent-style-name="BodyText" style:family="paragraph">
      <style:text-properties fo:color="#800080"/>
    </style:style>
    <style:style style:name="P420" style:parent-style-name="BodyText" style:family="paragraph">
      <style:text-properties fo:color="#800080"/>
    </style:style>
    <style:style style:name="P421" style:parent-style-name="BodyText" style:family="paragraph">
      <style:text-properties fo:color="#800080"/>
    </style:style>
    <style:style style:name="P422" style:parent-style-name="Normal" style:family="paragraph">
      <style:paragraph-properties fo:text-align="justify"/>
      <style:text-properties fo:color="#800080"/>
    </style:style>
    <style:style style:name="P423" style:parent-style-name="Normal" style:family="paragraph">
      <style:paragraph-properties fo:text-align="justify"/>
      <style:text-properties fo:color="#800080"/>
    </style:style>
    <style:style style:name="P424" style:parent-style-name="Normal" style:family="paragraph">
      <style:paragraph-properties fo:text-align="justify"/>
      <style:text-properties fo:color="#800080"/>
    </style:style>
    <style:style style:name="P425" style:parent-style-name="BodyText" style:family="paragraph">
      <style:text-properties fo:color="#800080"/>
    </style:style>
    <style:style style:name="P426" style:parent-style-name="BodyText" style:family="paragraph">
      <style:text-properties fo:color="#800080"/>
    </style:style>
    <style:style style:name="P427" style:parent-style-name="BodyText" style:family="paragraph">
      <style:text-properties fo:color="#800080"/>
    </style:style>
    <style:style style:name="P428" style:parent-style-name="BodyText" style:family="paragraph">
      <style:text-properties fo:color="#800080"/>
    </style:style>
    <style:style style:name="P429" style:parent-style-name="BodyText" style:family="paragraph">
      <style:text-properties fo:color="#800080"/>
    </style:style>
    <style:style style:name="P430" style:parent-style-name="BodyText" style:family="paragraph">
      <style:text-properties fo:color="#800080"/>
    </style:style>
    <style:style style:name="P431" style:parent-style-name="BodyText" style:family="paragraph">
      <style:text-properties fo:color="#800080"/>
    </style:style>
    <style:style style:name="P432" style:parent-style-name="BodyText" style:family="paragraph">
      <style:text-properties fo:color="#800080"/>
    </style:style>
    <style:style style:name="P433" style:parent-style-name="BodyText" style:family="paragraph">
      <style:text-properties fo:color="#800080"/>
    </style:style>
    <style:style style:name="P434" style:parent-style-name="BodyText" style:family="paragraph">
      <style:text-properties fo:color="#800080"/>
    </style:style>
    <style:style style:name="P435" style:parent-style-name="BodyText" style:family="paragraph">
      <style:text-properties fo:color="#800080"/>
    </style:style>
    <style:style style:name="P436" style:parent-style-name="BodyText" style:family="paragraph">
      <style:text-properties fo:color="#800080"/>
    </style:style>
    <style:style style:name="P437" style:parent-style-name="BodyText" style:family="paragraph">
      <style:text-properties fo:color="#800080"/>
    </style:style>
    <style:style style:name="P438" style:parent-style-name="BodyText" style:family="paragraph">
      <style:text-properties fo:color="#800080"/>
    </style:style>
    <style:style style:name="P439" style:parent-style-name="BodyText" style:family="paragraph">
      <style:text-properties fo:color="#800080"/>
    </style:style>
    <style:style style:name="P440" style:parent-style-name="BodyText" style:family="paragraph">
      <style:text-properties fo:color="#800080"/>
    </style:style>
    <style:style style:name="P441" style:parent-style-name="BodyText" style:family="paragraph">
      <style:text-properties fo:color="#800080"/>
    </style:style>
    <style:style style:name="P442" style:parent-style-name="BodyText" style:family="paragraph">
      <style:text-properties fo:color="#800080"/>
    </style:style>
    <style:style style:name="P443" style:parent-style-name="BodyText" style:family="paragraph">
      <style:text-properties fo:color="#800080"/>
    </style:style>
    <style:style style:name="P444" style:parent-style-name="BodyText" style:family="paragraph">
      <style:text-properties fo:color="#800080"/>
    </style:style>
    <style:style style:name="P445" style:parent-style-name="BodyText" style:family="paragraph">
      <style:text-properties fo:color="#800080"/>
    </style:style>
    <style:style style:name="P446" style:parent-style-name="BodyText" style:family="paragraph">
      <style:text-properties fo:color="#800080"/>
    </style:style>
    <style:style style:name="P447" style:parent-style-name="BodyText" style:family="paragraph">
      <style:text-properties fo:color="#800080"/>
    </style:style>
    <style:style style:name="P448" style:parent-style-name="BodyText" style:family="paragraph">
      <style:text-properties fo:color="#800080"/>
    </style:style>
    <style:style style:name="P449" style:parent-style-name="BodyText" style:family="paragraph">
      <style:text-properties fo:color="#800080"/>
    </style:style>
    <style:style style:name="P450" style:parent-style-name="BodyText" style:family="paragraph">
      <style:text-properties fo:color="#800080"/>
    </style:style>
    <style:style style:name="P451" style:parent-style-name="BodyText" style:family="paragraph">
      <style:text-properties fo:color="#800080"/>
    </style:style>
    <style:style style:name="P452" style:parent-style-name="BodyText" style:family="paragraph">
      <style:text-properties fo:color="#800080"/>
    </style:style>
    <style:style style:name="P453" style:parent-style-name="BodyText" style:family="paragraph">
      <style:text-properties fo:color="#800080"/>
    </style:style>
    <style:style style:name="P454" style:parent-style-name="BodyText" style:family="paragraph">
      <style:text-properties fo:color="#800080"/>
    </style:style>
    <style:style style:name="P455" style:parent-style-name="BodyText" style:family="paragraph">
      <style:text-properties fo:color="#800080"/>
    </style:style>
    <style:style style:name="P456" style:parent-style-name="BodyText" style:family="paragraph">
      <style:text-properties fo:color="#800080"/>
    </style:style>
    <style:style style:name="P457" style:parent-style-name="BodyText" style:family="paragraph">
      <style:text-properties fo:color="#800080"/>
    </style:style>
    <style:style style:name="P458" style:parent-style-name="BodyText" style:family="paragraph">
      <style:text-properties fo:color="#800080"/>
    </style:style>
    <style:style style:name="P459" style:parent-style-name="BodyText" style:family="paragraph">
      <style:text-properties fo:color="#800080"/>
    </style:style>
    <style:style style:name="P460" style:parent-style-name="BodyText" style:family="paragraph">
      <style:text-properties fo:color="#800080"/>
    </style:style>
    <style:style style:name="P461" style:parent-style-name="BodyText" style:family="paragraph">
      <style:text-properties fo:color="#800080"/>
    </style:style>
    <style:style style:name="P462" style:parent-style-name="BodyText" style:family="paragraph">
      <style:text-properties fo:color="#800080"/>
    </style:style>
    <style:style style:name="P463" style:parent-style-name="BodyText" style:family="paragraph">
      <style:text-properties fo:color="#800080"/>
    </style:style>
    <style:style style:name="P464" style:parent-style-name="BodyText" style:family="paragraph">
      <style:text-properties fo:color="#800080"/>
    </style:style>
    <style:style style:name="P465" style:parent-style-name="BodyText" style:family="paragraph">
      <style:text-properties fo:color="#800080"/>
    </style:style>
    <style:style style:name="P466" style:parent-style-name="BodyText" style:family="paragraph">
      <style:text-properties fo:color="#800080"/>
    </style:style>
    <style:style style:name="P467" style:parent-style-name="BodyText" style:family="paragraph">
      <style:text-properties fo:color="#800080"/>
    </style:style>
    <style:style style:name="P468" style:parent-style-name="BodyText" style:family="paragraph">
      <style:text-properties fo:color="#800080"/>
    </style:style>
    <style:style style:name="P469" style:parent-style-name="BodyText" style:family="paragraph">
      <style:text-properties fo:color="#800080"/>
    </style:style>
    <style:style style:name="P470" style:parent-style-name="BodyText" style:family="paragraph">
      <style:text-properties fo:color="#800080"/>
    </style:style>
    <style:style style:name="P471" style:parent-style-name="BodyText" style:family="paragraph">
      <style:text-properties fo:color="#800080"/>
    </style:style>
    <style:style style:name="P472" style:parent-style-name="BodyText" style:family="paragraph">
      <style:text-properties fo:color="#800080"/>
    </style:style>
    <style:style style:name="P473" style:parent-style-name="BodyText" style:family="paragraph">
      <style:text-properties fo:color="#800080"/>
    </style:style>
    <style:style style:name="P474" style:parent-style-name="BodyText" style:family="paragraph">
      <style:text-properties fo:color="#800080"/>
    </style:style>
    <style:style style:name="P475" style:parent-style-name="BodyText" style:family="paragraph">
      <style:text-properties fo:color="#800080"/>
    </style:style>
    <style:style style:name="P476" style:parent-style-name="BodyText" style:family="paragraph">
      <style:text-properties fo:color="#800080"/>
    </style:style>
    <style:style style:name="P477" style:parent-style-name="BodyText" style:family="paragraph">
      <style:text-properties fo:color="#800080"/>
    </style:style>
    <style:style style:name="P478" style:parent-style-name="BodyText" style:family="paragraph">
      <style:text-properties fo:color="#800080"/>
    </style:style>
    <style:style style:name="P479" style:parent-style-name="BodyText" style:family="paragraph">
      <style:text-properties fo:color="#800080"/>
    </style:style>
    <style:style style:name="P480" style:parent-style-name="BodyText" style:family="paragraph">
      <style:text-properties fo:color="#800080"/>
    </style:style>
    <style:style style:name="P481" style:parent-style-name="BodyText" style:family="paragraph">
      <style:text-properties fo:color="#800080"/>
    </style:style>
    <style:style style:name="P482" style:parent-style-name="BodyText" style:family="paragraph">
      <style:text-properties fo:color="#800080"/>
    </style:style>
    <style:style style:name="P483" style:parent-style-name="BodyText" style:family="paragraph">
      <style:text-properties fo:color="#800080"/>
    </style:style>
    <style:style style:name="P484" style:parent-style-name="BodyText" style:family="paragraph">
      <style:text-properties fo:color="#800080"/>
    </style:style>
    <style:style style:name="P485" style:parent-style-name="BodyText" style:family="paragraph">
      <style:text-properties fo:color="#800080"/>
    </style:style>
    <style:style style:name="P486" style:parent-style-name="BodyText" style:family="paragraph">
      <style:text-properties fo:color="#800080"/>
    </style:style>
    <style:style style:name="P487" style:parent-style-name="BodyText" style:family="paragraph">
      <style:text-properties fo:color="#800080"/>
    </style:style>
    <style:style style:name="P488" style:parent-style-name="BodyText" style:family="paragraph">
      <style:text-properties fo:color="#800080"/>
    </style:style>
    <style:style style:name="P489" style:parent-style-name="BodyText" style:family="paragraph">
      <style:text-properties fo:color="#800080"/>
    </style:style>
    <style:style style:name="P490" style:parent-style-name="BodyText" style:family="paragraph">
      <style:text-properties fo:color="#800080"/>
    </style:style>
    <style:style style:name="P491" style:parent-style-name="BodyText" style:family="paragraph">
      <style:text-properties fo:color="#800080"/>
    </style:style>
    <style:style style:name="P492" style:parent-style-name="BodyText" style:family="paragraph">
      <style:text-properties fo:color="#800080"/>
    </style:style>
    <style:style style:name="P493" style:parent-style-name="BodyText" style:family="paragraph">
      <style:text-properties fo:color="#800080"/>
    </style:style>
    <style:style style:name="P494" style:parent-style-name="BodyText" style:family="paragraph">
      <style:text-properties fo:color="#800080"/>
    </style:style>
    <style:style style:name="P495" style:parent-style-name="BodyText" style:family="paragraph">
      <style:text-properties fo:color="#800080"/>
    </style:style>
    <style:style style:name="P496" style:parent-style-name="BodyText" style:family="paragraph">
      <style:text-properties fo:color="#800080"/>
    </style:style>
    <style:style style:name="P497" style:parent-style-name="BodyText" style:family="paragraph">
      <style:text-properties fo:color="#800080"/>
    </style:style>
    <style:style style:name="P498" style:parent-style-name="BodyText" style:family="paragraph">
      <style:text-properties fo:color="#800080"/>
    </style:style>
    <style:style style:name="P499" style:parent-style-name="BodyText" style:family="paragraph">
      <style:text-properties fo:color="#800080"/>
    </style:style>
    <style:style style:name="P500" style:parent-style-name="BodyText" style:family="paragraph">
      <style:text-properties fo:color="#800080"/>
    </style:style>
    <style:style style:name="P501" style:parent-style-name="BodyText" style:family="paragraph">
      <style:text-properties fo:color="#800080"/>
    </style:style>
    <style:style style:name="P502" style:parent-style-name="BodyText" style:family="paragraph">
      <style:text-properties fo:color="#800080"/>
    </style:style>
    <style:style style:name="P503" style:parent-style-name="BodyText" style:family="paragraph">
      <style:text-properties fo:color="#800080"/>
    </style:style>
    <style:style style:name="P504" style:parent-style-name="BodyText" style:family="paragraph">
      <style:text-properties fo:color="#800080"/>
    </style:style>
    <style:style style:name="P505" style:parent-style-name="BodyText" style:family="paragraph">
      <style:text-properties fo:color="#800080"/>
    </style:style>
    <style:style style:name="P506" style:parent-style-name="BodyText" style:family="paragraph">
      <style:text-properties fo:color="#800080"/>
    </style:style>
    <style:style style:name="P507" style:parent-style-name="BodyText" style:family="paragraph">
      <style:text-properties fo:color="#800080"/>
    </style:style>
    <style:style style:name="P508" style:parent-style-name="BodyText" style:family="paragraph">
      <style:text-properties fo:color="#800080"/>
    </style:style>
    <style:style style:name="P509" style:parent-style-name="BodyText" style:family="paragraph">
      <style:text-properties fo:color="#800080"/>
    </style:style>
    <style:style style:name="P510" style:parent-style-name="BodyText" style:family="paragraph">
      <style:text-properties fo:color="#800080"/>
    </style:style>
    <style:style style:name="P511" style:parent-style-name="BodyText" style:family="paragraph">
      <style:text-properties fo:color="#800080"/>
    </style:style>
    <style:style style:name="P512" style:parent-style-name="BodyText" style:family="paragraph">
      <style:text-properties fo:color="#800080"/>
    </style:style>
    <style:style style:name="P513" style:parent-style-name="BodyText" style:family="paragraph">
      <style:text-properties fo:color="#800080"/>
    </style:style>
    <style:style style:name="P514" style:parent-style-name="BodyText" style:family="paragraph">
      <style:text-properties fo:color="#800080"/>
    </style:style>
    <style:style style:name="P515" style:parent-style-name="BodyText" style:family="paragraph">
      <style:text-properties fo:color="#800080"/>
    </style:style>
    <style:style style:name="P516" style:parent-style-name="BodyText" style:family="paragraph">
      <style:text-properties fo:color="#800080"/>
    </style:style>
    <style:style style:name="P517" style:parent-style-name="BodyText" style:family="paragraph">
      <style:text-properties fo:color="#800080"/>
    </style:style>
    <style:style style:name="P518" style:parent-style-name="BodyText" style:family="paragraph">
      <style:paragraph-properties fo:break-before="page"/>
      <style:text-properties fo:color="#800080"/>
    </style:style>
    <style:style style:name="P519" style:parent-style-name="BodyText" style:family="paragraph">
      <style:text-properties fo:color="#800080"/>
    </style:style>
    <style:style style:name="P520" style:parent-style-name="BodyText" style:family="paragraph">
      <style:text-properties fo:color="#800080"/>
    </style:style>
    <style:style style:name="P521" style:parent-style-name="BodyText" style:family="paragraph">
      <style:text-properties fo:color="#800080"/>
    </style:style>
    <style:style style:name="P522" style:parent-style-name="BodyText" style:family="paragraph">
      <style:text-properties fo:color="#800080"/>
    </style:style>
    <style:style style:name="P523" style:parent-style-name="BodyText" style:family="paragraph">
      <style:text-properties fo:color="#800080"/>
    </style:style>
    <style:style style:name="P524" style:parent-style-name="BodyText" style:family="paragraph">
      <style:text-properties fo:color="#800080"/>
    </style:style>
    <style:style style:name="P525" style:parent-style-name="BodyText" style:family="paragraph">
      <style:text-properties fo:color="#800080"/>
    </style:style>
    <style:style style:name="P526" style:parent-style-name="BodyText" style:family="paragraph">
      <style:text-properties fo:color="#800080"/>
    </style:style>
    <style:style style:name="P527" style:parent-style-name="BodyText" style:family="paragraph">
      <style:text-properties fo:color="#800080"/>
    </style:style>
    <style:style style:name="P528" style:parent-style-name="BodyText" style:family="paragraph">
      <style:text-properties fo:color="#800080"/>
    </style:style>
    <style:style style:name="P529" style:parent-style-name="BodyText" style:family="paragraph">
      <style:text-properties fo:color="#800080"/>
    </style:style>
    <style:style style:name="P530" style:parent-style-name="BodyText" style:family="paragraph">
      <style:text-properties fo:color="#800080"/>
    </style:style>
    <style:style style:name="P531" style:parent-style-name="BodyText" style:family="paragraph">
      <style:text-properties fo:color="#800080"/>
    </style:style>
    <style:style style:name="P532" style:parent-style-name="BodyText" style:family="paragraph">
      <style:text-properties fo:color="#800080"/>
    </style:style>
    <style:style style:name="P533" style:parent-style-name="BodyText" style:family="paragraph">
      <style:text-properties fo:color="#800080"/>
    </style:style>
    <style:style style:name="P534" style:parent-style-name="BodyText" style:family="paragraph">
      <style:text-properties fo:color="#800080"/>
    </style:style>
    <style:style style:name="P535" style:parent-style-name="BodyText" style:family="paragraph">
      <style:text-properties fo:color="#800080"/>
    </style:style>
    <style:style style:name="P536" style:parent-style-name="BodyText" style:family="paragraph">
      <style:paragraph-properties fo:break-before="page"/>
      <style:text-properties fo:color="#800080"/>
    </style:style>
    <style:style style:name="P537" style:parent-style-name="BodyText" style:family="paragraph">
      <style:text-properties fo:color="#800080"/>
    </style:style>
    <style:style style:name="P538" style:parent-style-name="BodyText" style:family="paragraph">
      <style:text-properties fo:color="#800080"/>
    </style:style>
    <style:style style:name="P539" style:parent-style-name="BodyText" style:family="paragraph">
      <style:text-properties fo:color="#800080"/>
    </style:style>
    <style:style style:name="P540" style:parent-style-name="BodyText" style:family="paragraph">
      <style:text-properties fo:color="#800080"/>
    </style:style>
    <style:style style:name="P541" style:parent-style-name="BodyText" style:family="paragraph">
      <style:text-properties fo:color="#800080"/>
    </style:style>
    <style:style style:name="P542" style:parent-style-name="BodyText" style:family="paragraph">
      <style:text-properties fo:color="#800080"/>
    </style:style>
    <style:style style:name="P543" style:parent-style-name="Normal" style:family="paragraph">
      <style:text-properties fo:color="#800080"/>
    </style:style>
    <style:style style:name="P544" style:parent-style-name="BodyText" style:family="paragraph">
      <style:text-properties fo:color="#800080"/>
    </style:style>
    <style:style style:name="P545" style:parent-style-name="BodyText" style:family="paragraph">
      <style:text-properties fo:color="#800080"/>
    </style:style>
    <style:style style:name="P546" style:parent-style-name="BodyText" style:family="paragraph">
      <style:text-properties fo:color="#800080"/>
    </style:style>
    <style:style style:name="P547" style:parent-style-name="BodyText" style:family="paragraph">
      <style:text-properties fo:color="#800080"/>
    </style:style>
    <style:style style:name="P548" style:parent-style-name="BodyText" style:family="paragraph">
      <style:text-properties fo:color="#800080"/>
    </style:style>
    <style:style style:name="P549" style:parent-style-name="BodyText" style:family="paragraph">
      <style:text-properties fo:color="#800080"/>
    </style:style>
    <style:style style:name="P550" style:parent-style-name="BodyText" style:family="paragraph">
      <style:text-properties fo:color="#800080"/>
    </style:style>
    <style:style style:name="P551" style:parent-style-name="BodyText" style:family="paragraph">
      <style:text-properties fo:color="#800080"/>
    </style:style>
    <style:style style:name="P552" style:parent-style-name="BodyText" style:family="paragraph">
      <style:text-properties fo:color="#800080"/>
    </style:style>
    <style:style style:name="P553" style:parent-style-name="BodyText" style:family="paragraph">
      <style:text-properties fo:color="#800080"/>
    </style:style>
    <style:style style:name="P554" style:parent-style-name="BodyText" style:family="paragraph">
      <style:text-properties fo:color="#800080"/>
    </style:style>
    <style:style style:name="P555" style:parent-style-name="BodyText" style:family="paragraph">
      <style:text-properties fo:color="#800080"/>
    </style:style>
    <style:style style:name="P556" style:parent-style-name="BodyText" style:family="paragraph">
      <style:text-properties fo:color="#800080"/>
    </style:style>
    <style:style style:name="P557" style:parent-style-name="BodyText" style:family="paragraph">
      <style:text-properties fo:color="#800080"/>
    </style:style>
    <style:style style:name="P558" style:parent-style-name="BodyText" style:family="paragraph">
      <style:text-properties fo:color="#800080"/>
    </style:style>
    <style:style style:name="P559" style:parent-style-name="BodyText" style:family="paragraph">
      <style:text-properties fo:color="#800080"/>
    </style:style>
    <style:style style:name="P560" style:parent-style-name="BodyText" style:family="paragraph">
      <style:text-properties fo:color="#800080"/>
    </style:style>
    <style:style style:name="P561" style:parent-style-name="BodyText" style:family="paragraph">
      <style:text-properties fo:color="#800080"/>
    </style:style>
    <style:style style:name="P562" style:parent-style-name="BodyText" style:family="paragraph">
      <style:text-properties fo:color="#800080"/>
    </style:style>
    <style:style style:name="P563" style:parent-style-name="BodyText" style:family="paragraph">
      <style:text-properties fo:color="#800080"/>
    </style:style>
    <style:style style:name="P564" style:parent-style-name="BodyText" style:family="paragraph">
      <style:text-properties fo:color="#800080"/>
    </style:style>
    <style:style style:name="P565" style:parent-style-name="BodyText" style:family="paragraph">
      <style:text-properties fo:color="#800080"/>
    </style:style>
    <style:style style:name="P566" style:parent-style-name="BodyText" style:family="paragraph">
      <style:text-properties fo:color="#800080"/>
    </style:style>
    <style:style style:name="P567" style:parent-style-name="BodyText" style:family="paragraph">
      <style:text-properties fo:color="#800080"/>
    </style:style>
    <style:style style:name="P568" style:parent-style-name="BodyText" style:family="paragraph">
      <style:text-properties fo:color="#800080"/>
    </style:style>
    <style:style style:name="P569" style:parent-style-name="BodyText" style:family="paragraph">
      <style:text-properties fo:color="#800080"/>
    </style:style>
    <style:style style:name="P570" style:parent-style-name="BodyText" style:family="paragraph">
      <style:text-properties fo:color="#800080"/>
    </style:style>
    <style:style style:name="P571" style:parent-style-name="BodyText" style:family="paragraph">
      <style:text-properties fo:color="#800080"/>
    </style:style>
    <style:style style:name="P572" style:parent-style-name="BodyText" style:family="paragraph">
      <style:text-properties fo:color="#800080"/>
    </style:style>
    <style:style style:name="P573" style:parent-style-name="BodyText" style:family="paragraph">
      <style:text-properties fo:color="#800080"/>
    </style:style>
    <style:style style:name="P574" style:parent-style-name="BodyText" style:family="paragraph">
      <style:text-properties fo:color="#800080"/>
    </style:style>
    <style:style style:name="P575" style:parent-style-name="Normal" style:family="paragraph">
      <style:paragraph-properties fo:text-align="justify"/>
      <style:text-properties fo:color="#800080"/>
    </style:style>
    <style:style style:name="P576" style:parent-style-name="Normal" style:family="paragraph">
      <style:paragraph-properties fo:text-align="justify"/>
      <style:text-properties fo:color="#800080"/>
    </style:style>
    <style:style style:name="P577" style:parent-style-name="Normal" style:family="paragraph">
      <style:paragraph-properties fo:text-align="justify"/>
      <style:text-properties fo:color="#800080"/>
    </style:style>
    <style:style style:name="P578" style:parent-style-name="Normal" style:family="paragraph">
      <style:paragraph-properties fo:text-align="justify"/>
      <style:text-properties fo:color="#800080"/>
    </style:style>
    <style:style style:name="P579" style:parent-style-name="BodyText" style:family="paragraph">
      <style:text-properties fo:color="#800080"/>
    </style:style>
    <style:style style:name="P580" style:parent-style-name="BodyText" style:family="paragraph">
      <style:text-properties fo:color="#800080"/>
    </style:style>
    <style:style style:name="P581" style:parent-style-name="BodyText" style:family="paragraph">
      <style:paragraph-properties fo:break-before="page"/>
      <style:text-properties fo:color="#800080"/>
    </style:style>
    <style:style style:name="P582" style:parent-style-name="BodyText" style:family="paragraph">
      <style:text-properties fo:color="#800080"/>
    </style:style>
    <style:style style:name="P583" style:parent-style-name="Heading1" style:family="paragraph">
      <style:paragraph-properties fo:text-align="justify"/>
      <style:text-properties fo:color="#800080"/>
    </style:style>
    <style:style style:name="P584" style:parent-style-name="Normal" style:family="paragraph">
      <style:paragraph-properties fo:text-align="justify"/>
      <style:text-properties fo:color="#800080"/>
    </style:style>
    <style:style style:name="P585" style:parent-style-name="Normal" style:family="paragraph">
      <style:paragraph-properties fo:text-align="justify"/>
      <style:text-properties fo:color="#800080"/>
    </style:style>
    <style:style style:name="P586" style:parent-style-name="Normal" style:family="paragraph">
      <style:paragraph-properties fo:text-align="justify"/>
      <style:text-properties fo:color="#800080"/>
    </style:style>
    <style:style style:name="P587" style:parent-style-name="Normal" style:family="paragraph">
      <style:paragraph-properties fo:text-align="justify"/>
      <style:text-properties fo:color="#800080"/>
    </style:style>
    <style:style style:name="P588" style:parent-style-name="Normal" style:family="paragraph">
      <style:paragraph-properties fo:text-align="justify"/>
      <style:text-properties fo:color="#800080"/>
    </style:style>
    <style:style style:name="P589" style:parent-style-name="BodyText" style:family="paragraph">
      <style:text-properties fo:color="#800080"/>
    </style:style>
    <style:style style:name="P590" style:parent-style-name="Normal" style:family="paragraph">
      <style:paragraph-properties fo:text-align="justify"/>
      <style:text-properties fo:color="#800080"/>
    </style:style>
    <style:style style:name="P591" style:parent-style-name="Normal" style:family="paragraph">
      <style:paragraph-properties fo:text-align="justify"/>
      <style:text-properties fo:color="#800080"/>
    </style:style>
    <style:style style:name="P592" style:parent-style-name="Normal" style:family="paragraph">
      <style:paragraph-properties fo:text-align="justify"/>
      <style:text-properties fo:color="#800080"/>
    </style:style>
    <style:style style:name="P593" style:parent-style-name="Normal" style:family="paragraph">
      <style:paragraph-properties fo:text-align="justify"/>
      <style:text-properties fo:color="#800080"/>
    </style:style>
    <style:style style:name="P594" style:parent-style-name="Normal" style:family="paragraph">
      <style:paragraph-properties fo:text-align="justify"/>
      <style:text-properties fo:color="#800080"/>
    </style:style>
    <style:style style:name="P595" style:parent-style-name="Normal" style:family="paragraph">
      <style:paragraph-properties fo:break-before="page" fo:text-align="justify"/>
      <style:text-properties fo:color="#800080"/>
    </style:style>
    <style:style style:name="P596" style:parent-style-name="Normal" style:family="paragraph">
      <style:paragraph-properties fo:text-align="justify"/>
      <style:text-properties fo:color="#800080"/>
    </style:style>
    <style:style style:name="P597" style:parent-style-name="Normal" style:family="paragraph">
      <style:paragraph-properties fo:text-align="justify"/>
      <style:text-properties fo:color="#800080"/>
    </style:style>
    <style:style style:name="T598" style:parent-style-name="DefaultParagraphFont" style:family="text">
      <style:text-properties fo:color="#800080"/>
    </style:style>
    <style:style style:name="T599" style:parent-style-name="DefaultParagraphFont" style:family="text">
      <style:text-properties fo:font-style="italic" style:font-style-asian="italic" fo:color="#800080"/>
    </style:style>
    <style:style style:name="TableColumn601" style:family="table-column">
      <style:table-column-properties style:column-width="0.5451in" style:use-optimal-column-width="false"/>
    </style:style>
    <style:style style:name="TableColumn602" style:family="table-column">
      <style:table-column-properties style:column-width="0.6222in" style:use-optimal-column-width="false"/>
    </style:style>
    <style:style style:name="Table600" style:family="table">
      <style:table-properties style:width="1.1673in" fo:margin-left="0in" table:align="center"/>
    </style:style>
    <style:style style:name="TableRow603" style:family="table-row">
      <style:table-row-properties style:use-optimal-row-height="false"/>
    </style:style>
    <style:style style:name="TableCell604" style:family="table-cell">
      <style:table-cell-properties fo:border-top="0.0069in solid #000000" fo:border-left="0.0069in solid #000000" fo:border-bottom="none" fo:border-right="none" style:writing-mode="lr-tb" fo:padding-top="0in" fo:padding-left="0.0486in" fo:padding-bottom="0in" fo:padding-right="0.0486in"/>
    </style:style>
    <style:style style:name="P605" style:parent-style-name="Normal" style:family="paragraph">
      <style:paragraph-properties fo:text-align="center"/>
      <style:text-properties fo:font-style="italic" style:font-style-asian="italic" fo:color="#800080"/>
    </style:style>
    <style:style style:name="TableCell606" style:family="table-cell">
      <style:table-cell-properties fo:border-top="0.0069in solid #000000" fo:border-left="none" fo:border-bottom="none" fo:border-right="0.0069in solid #000000" style:writing-mode="lr-tb" fo:padding-top="0in" fo:padding-left="0.0486in" fo:padding-bottom="0in" fo:padding-right="0.0486in"/>
    </style:style>
    <style:style style:name="P607" style:parent-style-name="Normal" style:family="paragraph">
      <style:paragraph-properties fo:text-align="center"/>
      <style:text-properties fo:font-style="italic" style:font-style-asian="italic" fo:color="#800080"/>
    </style:style>
    <style:style style:name="TableRow608" style:family="table-row">
      <style:table-row-properties style:use-optimal-row-height="false"/>
    </style:style>
    <style:style style:name="TableCell609" style:family="table-cell">
      <style:table-cell-properties fo:border-top="none" fo:border-left="0.0069in solid #000000" fo:border-bottom="none" fo:border-right="none" style:writing-mode="lr-tb" fo:padding-top="0in" fo:padding-left="0.0486in" fo:padding-bottom="0in" fo:padding-right="0.0486in"/>
    </style:style>
    <style:style style:name="P610" style:parent-style-name="Normal" style:family="paragraph">
      <style:paragraph-properties fo:text-align="center"/>
      <style:text-properties fo:font-style="italic" style:font-style-asian="italic" fo:color="#800080"/>
    </style:style>
    <style:style style:name="TableCell611" style:family="table-cell">
      <style:table-cell-properties fo:border-top="none" fo:border-left="none" fo:border-bottom="none" fo:border-right="0.0069in solid #000000" style:writing-mode="lr-tb" fo:padding-top="0in" fo:padding-left="0.0486in" fo:padding-bottom="0in" fo:padding-right="0.0486in"/>
    </style:style>
    <style:style style:name="P612" style:parent-style-name="Normal" style:family="paragraph">
      <style:paragraph-properties fo:text-align="center"/>
      <style:text-properties fo:font-style="italic" style:font-style-asian="italic" fo:color="#800080"/>
    </style:style>
    <style:style style:name="TableRow613" style:family="table-row">
      <style:table-row-properties style:use-optimal-row-height="false"/>
    </style:style>
    <style:style style:name="TableCell614" style:family="table-cell">
      <style:table-cell-properties fo:border-top="none" fo:border-left="0.0069in solid #000000" fo:border-bottom="none" fo:border-right="none" style:writing-mode="lr-tb" fo:padding-top="0in" fo:padding-left="0.0486in" fo:padding-bottom="0in" fo:padding-right="0.0486in"/>
    </style:style>
    <style:style style:name="P615" style:parent-style-name="Normal" style:family="paragraph">
      <style:paragraph-properties fo:text-align="center"/>
      <style:text-properties fo:font-style="italic" style:font-style-asian="italic" fo:color="#800080"/>
    </style:style>
    <style:style style:name="TableCell616" style:family="table-cell">
      <style:table-cell-properties fo:border-top="none" fo:border-left="none" fo:border-bottom="none" fo:border-right="0.0069in solid #000000" style:writing-mode="lr-tb" fo:padding-top="0in" fo:padding-left="0.0486in" fo:padding-bottom="0in" fo:padding-right="0.0486in"/>
    </style:style>
    <style:style style:name="P617" style:parent-style-name="Normal" style:family="paragraph">
      <style:paragraph-properties fo:text-align="center"/>
      <style:text-properties fo:font-style="italic" style:font-style-asian="italic" fo:color="#800080"/>
    </style:style>
    <style:style style:name="TableRow618" style:family="table-row">
      <style:table-row-properties style:use-optimal-row-height="false"/>
    </style:style>
    <style:style style:name="TableCell619" style:family="table-cell">
      <style:table-cell-properties fo:border-top="none" fo:border-left="0.0069in solid #000000" fo:border-bottom="none" fo:border-right="none" style:writing-mode="lr-tb" fo:padding-top="0in" fo:padding-left="0.0486in" fo:padding-bottom="0in" fo:padding-right="0.0486in"/>
    </style:style>
    <style:style style:name="P620" style:parent-style-name="Normal" style:family="paragraph">
      <style:paragraph-properties fo:text-align="center"/>
      <style:text-properties fo:font-style="italic" style:font-style-asian="italic" fo:color="#800080"/>
    </style:style>
    <style:style style:name="TableCell621" style:family="table-cell">
      <style:table-cell-properties fo:border-top="none" fo:border-left="none" fo:border-bottom="none" fo:border-right="0.0069in solid #000000" style:writing-mode="lr-tb" fo:padding-top="0in" fo:padding-left="0.0486in" fo:padding-bottom="0in" fo:padding-right="0.0486in"/>
    </style:style>
    <style:style style:name="P622" style:parent-style-name="Normal" style:family="paragraph">
      <style:paragraph-properties fo:text-align="center"/>
      <style:text-properties fo:font-style="italic" style:font-style-asian="italic" fo:color="#800080"/>
    </style:style>
    <style:style style:name="TableRow623" style:family="table-row">
      <style:table-row-properties style:use-optimal-row-height="false"/>
    </style:style>
    <style:style style:name="TableCell624" style:family="table-cell">
      <style:table-cell-properties fo:border-top="none" fo:border-left="0.0069in solid #000000" fo:border-bottom="none" fo:border-right="none" style:writing-mode="lr-tb" fo:padding-top="0in" fo:padding-left="0.0486in" fo:padding-bottom="0in" fo:padding-right="0.0486in"/>
    </style:style>
    <style:style style:name="P625" style:parent-style-name="Normal" style:family="paragraph">
      <style:paragraph-properties fo:text-align="center"/>
      <style:text-properties fo:font-style="italic" style:font-style-asian="italic" fo:color="#800080"/>
    </style:style>
    <style:style style:name="TableCell626" style:family="table-cell">
      <style:table-cell-properties fo:border-top="none" fo:border-left="none" fo:border-bottom="none" fo:border-right="0.0069in solid #000000" style:writing-mode="lr-tb" fo:padding-top="0in" fo:padding-left="0.0486in" fo:padding-bottom="0in" fo:padding-right="0.0486in"/>
    </style:style>
    <style:style style:name="P627" style:parent-style-name="Normal" style:family="paragraph">
      <style:paragraph-properties fo:text-align="center"/>
      <style:text-properties fo:font-style="italic" style:font-style-asian="italic" fo:color="#800080"/>
    </style:style>
    <style:style style:name="TableRow628" style:family="table-row">
      <style:table-row-properties style:use-optimal-row-height="false"/>
    </style:style>
    <style:style style:name="TableCell62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630" style:parent-style-name="Normal" style:family="paragraph">
      <style:paragraph-properties fo:text-align="center"/>
      <style:text-properties fo:font-style="italic" style:font-style-asian="italic" fo:color="#800080"/>
    </style:style>
    <style:style style:name="TableCell631"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632" style:parent-style-name="Normal" style:family="paragraph">
      <style:paragraph-properties fo:text-align="center"/>
      <style:text-properties fo:font-style="italic" style:font-style-asian="italic" fo:color="#800080"/>
    </style:style>
    <style:style style:name="P633" style:parent-style-name="Normal" style:family="paragraph">
      <style:text-properties fo:font-style="italic" style:font-style-asian="italic" fo:color="#800080"/>
    </style:style>
    <style:style style:name="P634" style:parent-style-name="Normal" style:family="paragraph">
      <style:text-properties fo:font-style="italic" style:font-style-asian="italic" fo:color="#800080"/>
    </style:style>
    <style:style style:name="T635" style:parent-style-name="DefaultParagraphFont" style:family="text">
      <style:text-properties fo:font-style="italic" style:font-style-asian="italic" fo:color="#800080"/>
    </style:style>
    <style:style style:name="T636" style:parent-style-name="DefaultParagraphFont" style:family="text">
      <style:text-properties fo:color="#800080"/>
    </style:style>
    <style:style style:name="P637" style:parent-style-name="Normal" style:family="paragraph">
      <style:text-properties fo:color="#800080"/>
    </style:style>
    <style:style style:name="P638" style:parent-style-name="Normal" style:family="paragraph">
      <style:text-properties fo:color="#800080"/>
    </style:style>
    <style:style style:name="P639" style:parent-style-name="Normal" style:family="paragraph">
      <style:paragraph-properties fo:break-before="page"/>
      <style:text-properties fo:color="#800080"/>
    </style:style>
    <style:style style:name="P640" style:parent-style-name="Normal" style:family="paragraph">
      <style:text-properties fo:color="#800080"/>
    </style:style>
    <style:style style:name="P641" style:parent-style-name="Normal" style:family="paragraph">
      <style:text-properties fo:color="#800080"/>
    </style:style>
    <style:style style:name="P642" style:parent-style-name="Normal" style:family="paragraph">
      <style:text-properties fo:color="#800080"/>
    </style:style>
    <style:style style:name="P643" style:parent-style-name="Normal" style:family="paragraph">
      <style:text-properties fo:font-style="italic" style:font-style-asian="italic" fo:color="#800080"/>
    </style:style>
    <style:style style:name="P644" style:parent-style-name="Normal" style:family="paragraph">
      <style:text-properties fo:font-style="italic" style:font-style-asian="italic" fo:color="#800080"/>
    </style:style>
    <style:style style:name="P645" style:parent-style-name="Normal" style:family="paragraph">
      <style:text-properties fo:font-style="italic" style:font-style-asian="italic" fo:color="#800080"/>
    </style:style>
    <style:style style:name="P646" style:parent-style-name="Normal" style:family="paragraph">
      <style:text-properties fo:font-style="italic" style:font-style-asian="italic" fo:color="#800080"/>
    </style:style>
    <style:style style:name="P647" style:parent-style-name="Normal" style:family="paragraph">
      <style:paragraph-properties fo:break-before="page"/>
      <style:text-properties fo:color="#800080"/>
    </style:style>
    <style:style style:name="P648" style:parent-style-name="Normal" style:family="paragraph">
      <style:text-properties fo:color="#800080"/>
    </style:style>
    <style:style style:name="T649" style:parent-style-name="DefaultParagraphFont" style:family="text">
      <style:text-properties fo:color="#800080"/>
    </style:style>
    <style:style style:name="T650" style:parent-style-name="DefaultParagraphFont" style:family="text">
      <style:text-properties fo:font-style="italic" style:font-style-asian="italic" fo:color="#800080"/>
    </style:style>
    <style:style style:name="T651" style:parent-style-name="DefaultParagraphFont" style:family="text">
      <style:text-properties fo:color="#800080"/>
    </style:style>
    <style:style style:name="P652" style:parent-style-name="Normal" style:family="paragraph">
      <style:text-properties fo:color="#800080"/>
    </style:style>
    <style:style style:name="P653" style:parent-style-name="BodyText" style:family="paragraph">
      <style:text-properties fo:color="#800080"/>
    </style:style>
    <style:style style:name="P654" style:parent-style-name="Normal" style:family="paragraph">
      <style:text-properties fo:color="#800080"/>
    </style:style>
    <style:style style:name="P655" style:parent-style-name="Normal" style:family="paragraph">
      <style:paragraph-properties fo:text-align="justify"/>
      <style:text-properties fo:color="#800080"/>
    </style:style>
    <style:style style:name="P656" style:parent-style-name="Normal" style:family="paragraph">
      <style:paragraph-properties fo:text-align="justify"/>
      <style:text-properties fo:color="#800080"/>
    </style:style>
    <style:style style:name="P657" style:parent-style-name="Normal" style:family="paragraph">
      <style:paragraph-properties fo:text-align="justify"/>
      <style:text-properties fo:color="#800080"/>
    </style:style>
    <style:style style:name="P658" style:parent-style-name="Normal" style:family="paragraph">
      <style:paragraph-properties fo:text-align="justify"/>
      <style:text-properties fo:color="#800080"/>
    </style:style>
    <style:style style:name="P659" style:parent-style-name="Normal" style:family="paragraph">
      <style:paragraph-properties fo:text-align="justify"/>
      <style:text-properties fo:color="#800080"/>
    </style:style>
    <style:style style:name="P660" style:parent-style-name="Normal" style:family="paragraph">
      <style:text-properties fo:color="#800080"/>
    </style:style>
    <style:style style:name="P661" style:parent-style-name="Normal" style:family="paragraph">
      <style:paragraph-properties fo:break-before="page" fo:text-align="justify"/>
      <style:text-properties fo:color="#800080"/>
    </style:style>
    <style:style style:name="P662" style:parent-style-name="Normal" style:family="paragraph">
      <style:paragraph-properties fo:text-align="justify"/>
      <style:text-properties fo:color="#800080"/>
    </style:style>
    <style:style style:name="P663" style:parent-style-name="Normal" style:family="paragraph">
      <style:paragraph-properties fo:text-align="justify"/>
      <style:text-properties fo:color="#800080"/>
    </style:style>
    <style:style style:name="P664" style:parent-style-name="Normal" style:family="paragraph">
      <style:paragraph-properties fo:text-align="justify"/>
      <style:text-properties fo:color="#800080"/>
    </style:style>
    <style:style style:name="P665" style:parent-style-name="Normal" style:family="paragraph">
      <style:paragraph-properties fo:text-align="justify"/>
      <style:text-properties fo:color="#800080"/>
    </style:style>
    <style:style style:name="P666" style:parent-style-name="BodyText2" style:family="paragraph">
      <style:text-properties fo:font-style="normal" style:font-style-asian="normal" fo:color="#800080"/>
    </style:style>
    <style:style style:name="P667" style:parent-style-name="BodyText2" style:family="paragraph">
      <style:text-properties fo:font-style="normal" style:font-style-asian="normal" fo:color="#800080"/>
    </style:style>
    <style:style style:name="P668" style:parent-style-name="BodyText2" style:family="paragraph">
      <style:text-properties fo:font-style="normal" style:font-style-asian="normal" fo:color="#800080"/>
    </style:style>
    <style:style style:name="P669" style:parent-style-name="BodyText2" style:family="paragraph">
      <style:text-properties fo:font-style="normal" style:font-style-asian="normal" fo:color="#800080"/>
    </style:style>
    <style:style style:name="P670" style:parent-style-name="BodyText2" style:family="paragraph">
      <style:text-properties fo:color="#800080"/>
    </style:style>
    <style:style style:name="P671" style:parent-style-name="Normal" style:family="paragraph">
      <style:paragraph-properties fo:break-before="page" fo:text-align="justify"/>
      <style:text-properties fo:color="#800080"/>
    </style:style>
    <style:style style:name="P672" style:parent-style-name="Normal" style:family="paragraph">
      <style:paragraph-properties fo:text-align="justify"/>
      <style:text-properties fo:color="#800080"/>
    </style:style>
    <style:style style:name="P673" style:parent-style-name="Normal" style:family="paragraph">
      <style:paragraph-properties fo:text-align="justify"/>
      <style:text-properties fo:color="#800080"/>
    </style:style>
    <style:style style:name="P674" style:parent-style-name="Normal" style:family="paragraph">
      <style:paragraph-properties fo:text-align="justify"/>
      <style:text-properties fo:color="#800080"/>
    </style:style>
    <style:style style:name="P675" style:parent-style-name="Normal" style:family="paragraph">
      <style:paragraph-properties fo:text-align="justify"/>
      <style:text-properties fo:color="#800080"/>
    </style:style>
    <style:style style:name="P676" style:parent-style-name="Normal" style:family="paragraph">
      <style:paragraph-properties fo:text-align="justify"/>
      <style:text-properties fo:color="#800080"/>
    </style:style>
    <style:style style:name="P677" style:parent-style-name="Heading1" style:family="paragraph">
      <style:paragraph-properties fo:break-before="page"/>
      <style:text-properties fo:color="#800080"/>
    </style:style>
    <style:style style:name="P678" style:parent-style-name="Normal" style:family="paragraph">
      <style:paragraph-properties fo:text-align="justify"/>
      <style:text-properties fo:color="#800080"/>
    </style:style>
    <style:style style:name="P679" style:parent-style-name="Normal" style:family="paragraph">
      <style:paragraph-properties fo:text-align="justify"/>
    </style:style>
    <style:style style:name="T680" style:parent-style-name="DefaultParagraphFont" style:family="text">
      <style:text-properties fo:color="#800080"/>
    </style:style>
    <style:style style:name="T681" style:parent-style-name="DefaultParagraphFont" style:family="text">
      <style:text-properties fo:color="#800080"/>
    </style:style>
    <style:style style:name="T682" style:parent-style-name="CommentReference" style:family="text">
      <style:text-properties text:display="none" fo:color="#800080"/>
    </style:style>
    <style:style style:name="T683" style:parent-style-name="DefaultParagraphFont" style:family="text">
      <style:text-properties fo:color="#800080"/>
    </style:style>
    <style:style style:name="T684" style:parent-style-name="DefaultParagraphFont" style:family="text">
      <style:text-properties fo:color="#800080"/>
    </style:style>
    <style:style style:name="T685" style:parent-style-name="CommentReference" style:family="text">
      <style:text-properties text:display="none" fo:color="#800080"/>
    </style:style>
    <style:style style:name="T686" style:parent-style-name="DefaultParagraphFont" style:family="text">
      <style:text-properties fo:color="#800080"/>
    </style:style>
    <style:style style:name="P687" style:parent-style-name="Normal" style:family="paragraph">
      <style:paragraph-properties fo:text-align="justify"/>
    </style:style>
    <style:style style:name="T688" style:parent-style-name="DefaultParagraphFont" style:family="text">
      <style:text-properties fo:color="#800080"/>
    </style:style>
    <style:style style:name="T689" style:parent-style-name="DefaultParagraphFont" style:family="text">
      <style:text-properties fo:color="#800080"/>
    </style:style>
    <style:style style:name="T690" style:parent-style-name="CommentReference" style:family="text">
      <style:text-properties text:display="none" fo:color="#800080"/>
    </style:style>
    <style:style style:name="T691" style:parent-style-name="DefaultParagraphFont" style:family="text">
      <style:text-properties fo:color="#800080"/>
    </style:style>
    <style:style style:name="T692" style:parent-style-name="DefaultParagraphFont" style:family="text">
      <style:text-properties fo:color="#800080"/>
    </style:style>
    <style:style style:name="T693" style:parent-style-name="CommentReference" style:family="text">
      <style:text-properties text:display="none" fo:color="#800080"/>
    </style:style>
    <style:style style:name="T694" style:parent-style-name="DefaultParagraphFont" style:family="text">
      <style:text-properties fo:color="#800080"/>
    </style:style>
    <style:style style:name="T695" style:parent-style-name="DefaultParagraphFont" style:family="text">
      <style:text-properties fo:color="#800080"/>
    </style:style>
    <style:style style:name="T696" style:parent-style-name="CommentReference" style:family="text">
      <style:text-properties text:display="none" fo:color="#800080"/>
    </style:style>
    <style:style style:name="T697" style:parent-style-name="DefaultParagraphFont" style:family="text">
      <style:text-properties fo:color="#800080"/>
    </style:style>
    <style:style style:name="T698" style:parent-style-name="DefaultParagraphFont" style:family="text">
      <style:text-properties fo:color="#800080"/>
    </style:style>
    <style:style style:name="T699" style:parent-style-name="CommentReference" style:family="text">
      <style:text-properties text:display="none" fo:color="#800080"/>
    </style:style>
    <style:style style:name="T700" style:parent-style-name="DefaultParagraphFont" style:family="text">
      <style:text-properties fo:color="#800080"/>
    </style:style>
    <style:style style:name="T701" style:parent-style-name="DefaultParagraphFont" style:family="text">
      <style:text-properties fo:color="#800080"/>
    </style:style>
    <style:style style:name="T702" style:parent-style-name="DefaultParagraphFont" style:family="text">
      <style:text-properties fo:color="#800080"/>
    </style:style>
    <style:style style:name="T703" style:parent-style-name="CommentReference" style:family="text">
      <style:text-properties text:display="none" fo:color="#800080"/>
    </style:style>
    <style:style style:name="T704" style:parent-style-name="DefaultParagraphFont" style:family="text">
      <style:text-properties fo:color="#800080"/>
    </style:style>
    <style:style style:name="T705" style:parent-style-name="DefaultParagraphFont" style:family="text">
      <style:text-properties fo:color="#800080"/>
    </style:style>
    <style:style style:name="T706" style:parent-style-name="CommentReference" style:family="text">
      <style:text-properties text:display="none" fo:color="#800080"/>
    </style:style>
    <style:style style:name="T707" style:parent-style-name="DefaultParagraphFont" style:family="text">
      <style:text-properties fo:color="#800080"/>
    </style:style>
    <style:style style:name="T708" style:parent-style-name="DefaultParagraphFont" style:family="text">
      <style:text-properties fo:color="#800080"/>
    </style:style>
    <style:style style:name="T709" style:parent-style-name="CommentReference" style:family="text">
      <style:text-properties text:display="none" fo:color="#800080"/>
    </style:style>
    <style:style style:name="T710" style:parent-style-name="DefaultParagraphFont" style:family="text">
      <style:text-properties fo:color="#800080"/>
    </style:style>
    <style:style style:name="T711" style:parent-style-name="DefaultParagraphFont" style:family="text">
      <style:text-properties fo:color="#800080"/>
    </style:style>
    <style:style style:name="T712" style:parent-style-name="CommentReference" style:family="text">
      <style:text-properties text:display="none" fo:color="#800080"/>
    </style:style>
    <style:style style:name="T713" style:parent-style-name="DefaultParagraphFont" style:family="text">
      <style:text-properties fo:color="#800080"/>
    </style:style>
    <style:style style:name="T714" style:parent-style-name="DefaultParagraphFont" style:family="text">
      <style:text-properties fo:color="#800080"/>
    </style:style>
    <style:style style:name="T715" style:parent-style-name="DefaultParagraphFont" style:family="text">
      <style:text-properties fo:color="#800080"/>
    </style:style>
    <style:style style:name="T716" style:parent-style-name="CommentReference" style:family="text">
      <style:text-properties text:display="none" fo:color="#800080"/>
    </style:style>
    <style:style style:name="T717" style:parent-style-name="DefaultParagraphFont" style:family="text">
      <style:text-properties fo:color="#800080"/>
    </style:style>
    <style:style style:name="T718" style:parent-style-name="DefaultParagraphFont" style:family="text">
      <style:text-properties fo:color="#800080"/>
    </style:style>
    <style:style style:name="T719" style:parent-style-name="DefaultParagraphFont" style:family="text">
      <style:text-properties fo:color="#800080"/>
    </style:style>
    <style:style style:name="T720" style:parent-style-name="CommentReference" style:family="text">
      <style:text-properties text:display="none" fo:color="#800080"/>
    </style:style>
    <style:style style:name="T721" style:parent-style-name="DefaultParagraphFont" style:family="text">
      <style:text-properties fo:color="#800080"/>
    </style:style>
    <style:style style:name="T722" style:parent-style-name="DefaultParagraphFont" style:family="text">
      <style:text-properties fo:color="#800080"/>
    </style:style>
    <style:style style:name="T723" style:parent-style-name="CommentReference" style:family="text">
      <style:text-properties text:display="none" fo:color="#800080"/>
    </style:style>
    <style:style style:name="T724" style:parent-style-name="DefaultParagraphFont" style:family="text">
      <style:text-properties fo:color="#800080"/>
    </style:style>
    <style:style style:name="T725" style:parent-style-name="DefaultParagraphFont" style:family="text">
      <style:text-properties fo:color="#800080"/>
    </style:style>
    <style:style style:name="T726" style:parent-style-name="CommentReference" style:family="text">
      <style:text-properties text:display="none" fo:color="#800080"/>
    </style:style>
    <style:style style:name="T727" style:parent-style-name="DefaultParagraphFont" style:family="text">
      <style:text-properties fo:color="#800080"/>
    </style:style>
    <style:style style:name="T728" style:parent-style-name="DefaultParagraphFont" style:family="text">
      <style:text-properties fo:color="#800080"/>
    </style:style>
    <style:style style:name="T729" style:parent-style-name="CommentReference" style:family="text">
      <style:text-properties text:display="none" fo:color="#800080"/>
    </style:style>
    <style:style style:name="T730" style:parent-style-name="DefaultParagraphFont" style:family="text">
      <style:text-properties fo:color="#800080"/>
    </style:style>
    <style:style style:name="T731" style:parent-style-name="DefaultParagraphFont" style:family="text">
      <style:text-properties fo:color="#800080"/>
    </style:style>
    <style:style style:name="T732" style:parent-style-name="CommentReference" style:family="text">
      <style:text-properties text:display="none" fo:color="#800080"/>
    </style:style>
    <style:style style:name="T733" style:parent-style-name="DefaultParagraphFont" style:family="text">
      <style:text-properties fo:color="#800080"/>
    </style:style>
    <style:style style:name="T734" style:parent-style-name="DefaultParagraphFont" style:family="text">
      <style:text-properties fo:color="#800080"/>
    </style:style>
    <style:style style:name="T735" style:parent-style-name="CommentReference" style:family="text">
      <style:text-properties text:display="none" fo:color="#800080"/>
    </style:style>
    <style:style style:name="T736" style:parent-style-name="DefaultParagraphFont" style:family="text">
      <style:text-properties fo:color="#800080"/>
    </style:style>
    <style:style style:name="T737" style:parent-style-name="DefaultParagraphFont" style:family="text">
      <style:text-properties fo:color="#800080"/>
    </style:style>
    <style:style style:name="T738" style:parent-style-name="CommentReference" style:family="text">
      <style:text-properties text:display="none" fo:color="#800080"/>
    </style:style>
    <style:style style:name="T739" style:parent-style-name="DefaultParagraphFont" style:family="text">
      <style:text-properties fo:color="#800080"/>
    </style:style>
    <style:style style:name="T740" style:parent-style-name="DefaultParagraphFont" style:family="text">
      <style:text-properties fo:color="#800080"/>
    </style:style>
    <style:style style:name="T741" style:parent-style-name="CommentReference" style:family="text">
      <style:text-properties text:display="none" fo:color="#800080"/>
    </style:style>
    <style:style style:name="T742" style:parent-style-name="DefaultParagraphFont" style:family="text">
      <style:text-properties fo:color="#800080"/>
    </style:style>
    <style:style style:name="P743" style:parent-style-name="Normal" style:family="paragraph">
      <style:paragraph-properties fo:text-align="justify"/>
    </style:style>
    <style:style style:name="T744" style:parent-style-name="DefaultParagraphFont" style:family="text">
      <style:text-properties fo:color="#800080"/>
    </style:style>
    <style:style style:name="T745" style:parent-style-name="DefaultParagraphFont" style:family="text">
      <style:text-properties fo:color="#800080"/>
    </style:style>
    <style:style style:name="T746" style:parent-style-name="CommentReference" style:family="text">
      <style:text-properties text:display="none" fo:color="#800080"/>
    </style:style>
    <style:style style:name="T747" style:parent-style-name="DefaultParagraphFont" style:family="text">
      <style:text-properties fo:color="#800080"/>
    </style:style>
    <style:style style:name="P748" style:parent-style-name="Normal" style:family="paragraph">
      <style:paragraph-properties fo:text-align="justify"/>
    </style:style>
    <style:style style:name="T749" style:parent-style-name="DefaultParagraphFont" style:family="text">
      <style:text-properties fo:color="#800080"/>
    </style:style>
    <style:style style:name="T750" style:parent-style-name="DefaultParagraphFont" style:family="text">
      <style:text-properties fo:color="#800080"/>
    </style:style>
    <style:style style:name="T751" style:parent-style-name="CommentReference" style:family="text">
      <style:text-properties text:display="none" fo:color="#800080"/>
    </style:style>
    <style:style style:name="T752" style:parent-style-name="DefaultParagraphFont" style:family="text">
      <style:text-properties fo:color="#800080"/>
    </style:style>
    <style:style style:name="T753" style:parent-style-name="DefaultParagraphFont" style:family="text">
      <style:text-properties fo:color="#800080"/>
    </style:style>
    <style:style style:name="T754" style:parent-style-name="CommentReference" style:family="text">
      <style:text-properties text:display="none" fo:color="#800080"/>
    </style:style>
    <style:style style:name="T755" style:parent-style-name="DefaultParagraphFont" style:family="text">
      <style:text-properties fo:color="#800080"/>
    </style:style>
    <style:style style:name="T756" style:parent-style-name="DefaultParagraphFont" style:family="text">
      <style:text-properties fo:color="#800080"/>
    </style:style>
    <style:style style:name="T757" style:parent-style-name="CommentReference" style:family="text">
      <style:text-properties text:display="none" fo:color="#800080"/>
    </style:style>
    <style:style style:name="T758" style:parent-style-name="DefaultParagraphFont" style:family="text">
      <style:text-properties fo:color="#800080"/>
    </style:style>
    <style:style style:name="T759" style:parent-style-name="DefaultParagraphFont" style:family="text">
      <style:text-properties fo:color="#800080"/>
    </style:style>
    <style:style style:name="T760" style:parent-style-name="CommentReference" style:family="text">
      <style:text-properties text:display="none" fo:color="#800080"/>
    </style:style>
    <style:style style:name="T761" style:parent-style-name="DefaultParagraphFont" style:family="text">
      <style:text-properties fo:color="#800080"/>
    </style:style>
    <style:style style:name="P762" style:parent-style-name="Normal" style:family="paragraph">
      <style:paragraph-properties fo:text-align="justify"/>
    </style:style>
    <style:style style:name="T763" style:parent-style-name="DefaultParagraphFont" style:family="text">
      <style:text-properties fo:color="#800080"/>
    </style:style>
    <style:style style:name="T764" style:parent-style-name="DefaultParagraphFont" style:family="text">
      <style:text-properties fo:color="#800080"/>
    </style:style>
    <style:style style:name="T765" style:parent-style-name="CommentReference" style:family="text">
      <style:text-properties text:display="none" fo:color="#800080"/>
    </style:style>
    <style:style style:name="T766" style:parent-style-name="DefaultParagraphFont" style:family="text">
      <style:text-properties fo:color="#800080"/>
    </style:style>
    <style:style style:name="T767" style:parent-style-name="DefaultParagraphFont" style:family="text">
      <style:text-properties fo:color="#800080"/>
    </style:style>
    <style:style style:name="T768" style:parent-style-name="CommentReference" style:family="text">
      <style:text-properties text:display="none" fo:color="#800080"/>
    </style:style>
    <style:style style:name="T769" style:parent-style-name="DefaultParagraphFont" style:family="text">
      <style:text-properties fo:color="#800080"/>
    </style:style>
    <style:style style:name="T770" style:parent-style-name="DefaultParagraphFont" style:family="text">
      <style:text-properties fo:color="#800080"/>
    </style:style>
    <style:style style:name="T771" style:parent-style-name="CommentReference" style:family="text">
      <style:text-properties text:display="none" fo:color="#800080"/>
    </style:style>
    <style:style style:name="T772" style:parent-style-name="DefaultParagraphFont" style:family="text">
      <style:text-properties fo:color="#800080"/>
    </style:style>
    <style:style style:name="P773" style:parent-style-name="Normal" style:family="paragraph">
      <style:paragraph-properties fo:break-before="page" fo:text-align="justify"/>
      <style:text-properties fo:color="#800080"/>
    </style:style>
    <style:style style:name="P774" style:parent-style-name="Normal" style:family="paragraph">
      <style:paragraph-properties fo:text-align="justify"/>
      <style:text-properties fo:color="#800080"/>
    </style:style>
    <style:style style:name="P775" style:parent-style-name="Normal" style:family="paragraph">
      <style:paragraph-properties fo:text-align="justify"/>
      <style:text-properties fo:color="#800080"/>
    </style:style>
    <style:style style:name="P776" style:parent-style-name="Normal" style:family="paragraph">
      <style:paragraph-properties fo:text-align="justify"/>
      <style:text-properties fo:color="#800080"/>
    </style:style>
    <style:style style:name="P777" style:parent-style-name="Normal" style:family="paragraph">
      <style:paragraph-properties fo:text-align="justify"/>
      <style:text-properties fo:color="#800080"/>
    </style:style>
    <style:style style:name="P778" style:parent-style-name="Normal" style:family="paragraph">
      <style:paragraph-properties fo:text-align="justify"/>
      <style:text-properties fo:color="#800080"/>
    </style:style>
    <style:style style:name="P779" style:parent-style-name="Normal" style:family="paragraph">
      <style:paragraph-properties fo:text-align="justify"/>
      <style:text-properties fo:color="#800080"/>
    </style:style>
    <style:style style:name="P780" style:parent-style-name="Normal" style:family="paragraph">
      <style:paragraph-properties fo:text-align="justify"/>
      <style:text-properties fo:color="#800080"/>
    </style:style>
    <style:style style:name="P781" style:parent-style-name="Normal" style:family="paragraph">
      <style:paragraph-properties fo:text-align="justify"/>
      <style:text-properties fo:color="#800080"/>
    </style:style>
    <style:style style:name="P782" style:parent-style-name="Heading1" style:family="paragraph">
      <style:paragraph-properties fo:break-before="page"/>
      <style:text-properties fo:color="#800080"/>
    </style:style>
    <style:style style:name="P783" style:parent-style-name="Normal" style:family="paragraph">
      <style:paragraph-properties fo:text-align="justify"/>
      <style:text-properties fo:color="#800080"/>
    </style:style>
    <style:style style:name="P784" style:parent-style-name="Normal" style:family="paragraph">
      <style:text-properties fo:color="#800080"/>
    </style:style>
    <style:style style:name="P785" style:parent-style-name="Heading1" style:family="paragraph">
      <style:text-properties fo:color="#800080"/>
    </style:style>
    <style:style style:name="P786" style:parent-style-name="Normal" style:family="paragraph">
      <style:text-properties fo:color="#800080"/>
    </style:style>
    <style:style style:name="T787" style:parent-style-name="DefaultParagraphFont" style:family="text">
      <style:text-properties fo:color="#800080"/>
    </style:style>
    <style:style style:name="T788" style:parent-style-name="DefaultParagraphFont" style:family="text">
      <style:text-properties fo:color="#800080"/>
    </style:style>
    <style:style style:name="T789" style:parent-style-name="CommentReference" style:family="text">
      <style:text-properties text:display="none" fo:color="#800080"/>
    </style:style>
    <style:style style:name="T790" style:parent-style-name="DefaultParagraphFont" style:family="text">
      <style:text-properties fo:color="#800080"/>
    </style:style>
    <style:style style:name="P791" style:parent-style-name="Normal" style:family="paragraph">
      <style:text-properties fo:color="#800080"/>
    </style:style>
    <style:style style:name="T792" style:parent-style-name="DefaultParagraphFont" style:family="text">
      <style:text-properties fo:color="#800080"/>
    </style:style>
    <style:style style:name="T793" style:parent-style-name="DefaultParagraphFont" style:family="text">
      <style:text-properties fo:color="#800080"/>
    </style:style>
    <style:style style:name="T794" style:parent-style-name="DefaultParagraphFont" style:family="text">
      <style:text-properties fo:color="#800080"/>
    </style:style>
    <style:style style:name="T795" style:parent-style-name="CommentReference" style:family="text">
      <style:text-properties text:display="none" fo:color="#800080"/>
    </style:style>
    <style:style style:name="T796" style:parent-style-name="DefaultParagraphFont" style:family="text">
      <style:text-properties fo:color="#800080"/>
    </style:style>
    <style:style style:name="T797" style:parent-style-name="DefaultParagraphFont" style:family="text">
      <style:text-properties fo:color="#800080"/>
    </style:style>
    <style:style style:name="T798" style:parent-style-name="CommentReference" style:family="text">
      <style:text-properties text:display="none" fo:color="#800080"/>
    </style:style>
    <style:style style:name="T799" style:parent-style-name="DefaultParagraphFont" style:family="text">
      <style:text-properties fo:color="#800080"/>
    </style:style>
    <style:style style:name="T800" style:parent-style-name="DefaultParagraphFont" style:family="text">
      <style:text-properties fo:color="#800080"/>
    </style:style>
    <style:style style:name="T801" style:parent-style-name="CommentReference" style:family="text">
      <style:text-properties text:display="none" fo:color="#800080"/>
    </style:style>
    <style:style style:name="T802" style:parent-style-name="DefaultParagraphFont" style:family="text">
      <style:text-properties fo:color="#800080"/>
    </style:style>
    <style:style style:name="P803" style:parent-style-name="Normal" style:family="paragraph">
      <style:text-properties fo:color="#800080"/>
    </style:style>
    <style:style style:name="T804" style:parent-style-name="DefaultParagraphFont" style:family="text">
      <style:text-properties fo:color="#800080"/>
    </style:style>
    <style:style style:name="T805" style:parent-style-name="DefaultParagraphFont" style:family="text">
      <style:text-properties fo:color="#800080"/>
    </style:style>
    <style:style style:name="T806" style:parent-style-name="CommentReference" style:family="text">
      <style:text-properties text:display="none" fo:color="#800080"/>
    </style:style>
    <style:style style:name="T807" style:parent-style-name="DefaultParagraphFont" style:family="text">
      <style:text-properties fo:color="#800080"/>
    </style:style>
    <style:style style:name="T808" style:parent-style-name="DefaultParagraphFont" style:family="text">
      <style:text-properties fo:color="#800080"/>
    </style:style>
    <style:style style:name="T809" style:parent-style-name="CommentReference" style:family="text">
      <style:text-properties text:display="none" fo:color="#800080"/>
    </style:style>
    <style:style style:name="T810" style:parent-style-name="DefaultParagraphFont" style:family="text">
      <style:text-properties fo:color="#800080"/>
    </style:style>
    <style:style style:name="T811" style:parent-style-name="DefaultParagraphFont" style:family="text">
      <style:text-properties fo:color="#800080"/>
    </style:style>
    <style:style style:name="T812" style:parent-style-name="CommentReference" style:family="text">
      <style:text-properties text:display="none" fo:color="#800080"/>
    </style:style>
    <style:style style:name="T813" style:parent-style-name="DefaultParagraphFont" style:family="text">
      <style:text-properties fo:color="#800080"/>
    </style:style>
    <style:style style:name="T814" style:parent-style-name="DefaultParagraphFont" style:family="text">
      <style:text-properties fo:color="#800080"/>
    </style:style>
    <style:style style:name="T815" style:parent-style-name="CommentReference" style:family="text">
      <style:text-properties text:display="none" fo:color="#800080"/>
    </style:style>
    <style:style style:name="T816" style:parent-style-name="DefaultParagraphFont" style:family="text">
      <style:text-properties fo:color="#800080"/>
    </style:style>
    <style:style style:name="P817" style:parent-style-name="Normal" style:family="paragraph">
      <style:text-properties fo:color="#800080"/>
    </style:style>
    <style:style style:name="T818" style:parent-style-name="DefaultParagraphFont" style:family="text">
      <style:text-properties fo:color="#800080"/>
    </style:style>
    <style:style style:name="T819" style:parent-style-name="DefaultParagraphFont" style:family="text">
      <style:text-properties fo:color="#800080"/>
    </style:style>
    <style:style style:name="T820" style:parent-style-name="CommentReference" style:family="text">
      <style:text-properties text:display="none" fo:color="#800080"/>
    </style:style>
    <style:style style:name="T821" style:parent-style-name="DefaultParagraphFont" style:family="text">
      <style:text-properties fo:color="#800080"/>
    </style:style>
    <style:style style:name="T822" style:parent-style-name="DefaultParagraphFont" style:family="text">
      <style:text-properties fo:color="#800080"/>
    </style:style>
    <style:style style:name="T823" style:parent-style-name="CommentReference" style:family="text">
      <style:text-properties text:display="none" fo:color="#800080"/>
    </style:style>
    <style:style style:name="T824" style:parent-style-name="DefaultParagraphFont" style:family="text">
      <style:text-properties fo:color="#800080"/>
    </style:style>
    <style:style style:name="P825" style:parent-style-name="Normal" style:family="paragraph">
      <style:text-properties fo:color="#800080"/>
    </style:style>
    <style:style style:name="T826" style:parent-style-name="DefaultParagraphFont" style:family="text">
      <style:text-properties fo:color="#800080"/>
    </style:style>
    <style:style style:name="T827" style:parent-style-name="DefaultParagraphFont" style:family="text">
      <style:text-properties fo:color="#800080"/>
    </style:style>
    <style:style style:name="T828" style:parent-style-name="CommentReference" style:family="text">
      <style:text-properties text:display="none" fo:color="#800080"/>
    </style:style>
    <style:style style:name="T829" style:parent-style-name="DefaultParagraphFont" style:family="text">
      <style:text-properties fo:color="#800080"/>
    </style:style>
    <style:style style:name="T830" style:parent-style-name="DefaultParagraphFont" style:family="text">
      <style:text-properties fo:color="#800080"/>
    </style:style>
    <style:style style:name="T831" style:parent-style-name="CommentReference" style:family="text">
      <style:text-properties text:display="none" fo:color="#800080"/>
    </style:style>
    <style:style style:name="T832" style:parent-style-name="DefaultParagraphFont" style:family="text">
      <style:text-properties fo:color="#800080"/>
    </style:style>
    <style:style style:name="P833" style:parent-style-name="Normal" style:family="paragraph">
      <style:text-properties fo:color="#800080"/>
    </style:style>
    <style:style style:name="T834" style:parent-style-name="DefaultParagraphFont" style:family="text">
      <style:text-properties fo:color="#800080"/>
    </style:style>
    <style:style style:name="T835" style:parent-style-name="DefaultParagraphFont" style:family="text">
      <style:text-properties fo:color="#800080"/>
    </style:style>
    <style:style style:name="T836" style:parent-style-name="CommentReference" style:family="text">
      <style:text-properties text:display="none" fo:color="#800080"/>
    </style:style>
    <style:style style:name="T837" style:parent-style-name="DefaultParagraphFont" style:family="text">
      <style:text-properties fo:color="#800080"/>
    </style:style>
    <style:style style:name="T838" style:parent-style-name="DefaultParagraphFont" style:family="text">
      <style:text-properties fo:color="#800080"/>
    </style:style>
    <style:style style:name="T839" style:parent-style-name="CommentReference" style:family="text">
      <style:text-properties text:display="none" fo:color="#800080"/>
    </style:style>
    <style:style style:name="T840" style:parent-style-name="DefaultParagraphFont" style:family="text">
      <style:text-properties fo:color="#800080"/>
    </style:style>
    <style:style style:name="P841" style:parent-style-name="Normal" style:family="paragraph">
      <style:text-properties fo:color="#800080"/>
    </style:style>
    <style:style style:name="T842" style:parent-style-name="DefaultParagraphFont" style:family="text">
      <style:text-properties fo:color="#800080"/>
    </style:style>
    <style:style style:name="T843" style:parent-style-name="DefaultParagraphFont" style:family="text">
      <style:text-properties fo:color="#800080"/>
    </style:style>
    <style:style style:name="T844" style:parent-style-name="CommentReference" style:family="text">
      <style:text-properties text:display="none" fo:color="#800080"/>
    </style:style>
    <style:style style:name="T845" style:parent-style-name="DefaultParagraphFont" style:family="text">
      <style:text-properties fo:color="#800080"/>
    </style:style>
    <style:style style:name="T846" style:parent-style-name="DefaultParagraphFont" style:family="text">
      <style:text-properties fo:color="#800080"/>
    </style:style>
    <style:style style:name="T847" style:parent-style-name="CommentReference" style:family="text">
      <style:text-properties text:display="none" fo:color="#800080"/>
    </style:style>
    <style:style style:name="T848" style:parent-style-name="DefaultParagraphFont" style:family="text">
      <style:text-properties fo:color="#800080"/>
    </style:style>
    <style:style style:name="T849" style:parent-style-name="DefaultParagraphFont" style:family="text">
      <style:text-properties fo:color="#800080"/>
    </style:style>
    <style:style style:name="T850" style:parent-style-name="CommentReference" style:family="text">
      <style:text-properties text:display="none" fo:color="#800080"/>
    </style:style>
    <style:style style:name="T851" style:parent-style-name="DefaultParagraphFont" style:family="text">
      <style:text-properties fo:color="#800080"/>
    </style:style>
    <style:style style:name="T852" style:parent-style-name="DefaultParagraphFont" style:family="text">
      <style:text-properties fo:color="#800080"/>
    </style:style>
    <style:style style:name="T853" style:parent-style-name="CommentReference" style:family="text">
      <style:text-properties text:display="none" fo:color="#800080"/>
    </style:style>
    <style:style style:name="T854" style:parent-style-name="DefaultParagraphFont" style:family="text">
      <style:text-properties fo:color="#800080"/>
    </style:style>
    <style:style style:name="P855" style:parent-style-name="Normal" style:family="paragraph">
      <style:text-properties fo:color="#800080"/>
    </style:style>
    <style:style style:name="T856" style:parent-style-name="DefaultParagraphFont" style:family="text">
      <style:text-properties fo:color="#800080"/>
    </style:style>
    <style:style style:name="T857" style:parent-style-name="DefaultParagraphFont" style:family="text">
      <style:text-properties fo:color="#800080"/>
    </style:style>
    <style:style style:name="T858" style:parent-style-name="CommentReference" style:family="text">
      <style:text-properties text:display="none" fo:color="#800080"/>
    </style:style>
    <style:style style:name="T859" style:parent-style-name="DefaultParagraphFont" style:family="text">
      <style:text-properties fo:color="#800080"/>
    </style:style>
    <style:style style:name="T860" style:parent-style-name="DefaultParagraphFont" style:family="text">
      <style:text-properties fo:color="#800080"/>
    </style:style>
    <style:style style:name="T861" style:parent-style-name="CommentReference" style:family="text">
      <style:text-properties text:display="none" fo:color="#800080"/>
    </style:style>
    <style:style style:name="T862" style:parent-style-name="DefaultParagraphFont" style:family="text">
      <style:text-properties fo:color="#800080"/>
    </style:style>
    <style:style style:name="P863" style:parent-style-name="Normal" style:family="paragraph">
      <style:text-properties fo:color="#800080"/>
    </style:style>
    <style:style style:name="T864" style:parent-style-name="DefaultParagraphFont" style:family="text">
      <style:text-properties fo:color="#800080"/>
    </style:style>
    <style:style style:name="T865" style:parent-style-name="DefaultParagraphFont" style:family="text">
      <style:text-properties fo:color="#800080"/>
    </style:style>
    <style:style style:name="T866" style:parent-style-name="CommentReference" style:family="text">
      <style:text-properties text:display="none" fo:color="#800080"/>
    </style:style>
    <style:style style:name="T867" style:parent-style-name="DefaultParagraphFont" style:family="text">
      <style:text-properties fo:color="#800080"/>
    </style:style>
    <style:style style:name="T868" style:parent-style-name="DefaultParagraphFont" style:family="text">
      <style:text-properties fo:color="#800080"/>
    </style:style>
    <style:style style:name="T869" style:parent-style-name="CommentReference" style:family="text">
      <style:text-properties text:display="none" fo:color="#800080"/>
    </style:style>
    <style:style style:name="T870" style:parent-style-name="DefaultParagraphFont" style:family="text">
      <style:text-properties fo:color="#800080"/>
    </style:style>
    <style:style style:name="T871" style:parent-style-name="DefaultParagraphFont" style:family="text">
      <style:text-properties fo:color="#800080"/>
    </style:style>
    <style:style style:name="T872" style:parent-style-name="DefaultParagraphFont" style:family="text">
      <style:text-properties fo:color="#800080"/>
    </style:style>
    <style:style style:name="T873" style:parent-style-name="CommentReference" style:family="text">
      <style:text-properties text:display="none" fo:color="#800080"/>
    </style:style>
    <style:style style:name="T874" style:parent-style-name="DefaultParagraphFont" style:family="text">
      <style:text-properties fo:color="#800080"/>
    </style:style>
    <style:style style:name="T875" style:parent-style-name="DefaultParagraphFont" style:family="text">
      <style:text-properties fo:color="#800080"/>
    </style:style>
    <style:style style:name="T876" style:parent-style-name="CommentReference" style:family="text">
      <style:text-properties text:display="none" fo:color="#800080"/>
    </style:style>
    <style:style style:name="T877" style:parent-style-name="DefaultParagraphFont" style:family="text">
      <style:text-properties fo:color="#800080"/>
    </style:style>
    <style:style style:name="P878" style:parent-style-name="Normal" style:family="paragraph">
      <style:paragraph-properties fo:break-before="page"/>
      <style:text-properties fo:color="#800080"/>
    </style:style>
    <style:style style:name="P879" style:parent-style-name="Normal" style:family="paragraph">
      <style:text-properties fo:color="#800080"/>
    </style:style>
    <style:style style:name="P880" style:parent-style-name="Normal" style:family="paragraph">
      <style:text-properties fo:color="#800080"/>
    </style:style>
    <style:style style:name="T881" style:parent-style-name="DefaultParagraphFont" style:family="text">
      <style:text-properties fo:font-style="italic" style:font-style-asian="italic" fo:color="#800080"/>
    </style:style>
    <style:style style:name="P882" style:parent-style-name="Normal" style:family="paragraph">
      <style:text-properties fo:color="#800080"/>
    </style:style>
    <style:style style:name="P883" style:parent-style-name="Normal" style:family="paragraph">
      <style:text-properties fo:color="#800080"/>
    </style:style>
    <style:style style:name="P884" style:parent-style-name="Normal" style:family="paragraph">
      <style:text-properties fo:color="#800080"/>
    </style:style>
    <style:style style:name="P885" style:parent-style-name="Normal" style:family="paragraph">
      <style:text-properties fo:color="#800080"/>
    </style:style>
    <style:style style:name="P886" style:parent-style-name="Normal" style:family="paragraph">
      <style:text-properties fo:color="#800080"/>
    </style:style>
    <style:style style:name="P887" style:parent-style-name="Normal" style:family="paragraph">
      <style:text-properties fo:color="#800080"/>
    </style:style>
    <style:style style:name="P888" style:parent-style-name="Normal" style:family="paragraph">
      <style:text-properties fo:color="#800080"/>
    </style:style>
    <style:style style:name="P889" style:parent-style-name="Normal" style:family="paragraph">
      <style:text-properties fo:color="#800080"/>
    </style:style>
    <style:style style:name="P890" style:parent-style-name="Normal" style:family="paragraph">
      <style:text-properties fo:color="#800080"/>
    </style:style>
    <style:style style:name="P891" style:parent-style-name="Normal" style:family="paragraph">
      <style:text-properties fo:color="#800080"/>
    </style:style>
    <style:style style:name="P892" style:parent-style-name="Normal" style:family="paragraph">
      <style:text-properties fo:color="#800080"/>
    </style:style>
    <style:style style:name="P893" style:parent-style-name="Normal" style:family="paragraph">
      <style:text-properties fo:color="#800080"/>
    </style:style>
    <style:style style:name="P894" style:parent-style-name="Normal" style:family="paragraph">
      <style:text-properties fo:color="#800080"/>
    </style:style>
    <style:style style:name="P895" style:parent-style-name="Normal" style:family="paragraph">
      <style:text-properties fo:color="#800080"/>
    </style:style>
    <style:style style:name="P896" style:parent-style-name="Normal" style:family="paragraph">
      <style:text-properties fo:color="#800080"/>
    </style:style>
    <style:style style:name="P897" style:parent-style-name="Normal" style:family="paragraph">
      <style:text-properties fo:color="#800080"/>
    </style:style>
    <style:style style:name="P898" style:parent-style-name="Normal" style:family="paragraph">
      <style:text-properties fo:color="#800080"/>
    </style:style>
    <style:style style:name="P899" style:parent-style-name="Normal" style:family="paragraph">
      <style:text-properties fo:color="#800080"/>
    </style:style>
    <style:style style:name="P900" style:parent-style-name="Normal" style:family="paragraph">
      <style:text-properties fo:color="#800080"/>
    </style:style>
    <style:style style:name="P901" style:parent-style-name="Normal" style:family="paragraph">
      <style:text-properties fo:color="#800080"/>
    </style:style>
    <style:style style:name="P902" style:parent-style-name="Normal" style:family="paragraph">
      <style:text-properties fo:color="#800080"/>
    </style:style>
    <style:style style:name="P903" style:parent-style-name="Normal" style:family="paragraph">
      <style:text-properties fo:color="#800080"/>
    </style:style>
    <style:style style:name="P904" style:parent-style-name="Normal" style:family="paragraph">
      <style:text-properties fo:color="#800080"/>
    </style:style>
    <style:style style:name="P905" style:parent-style-name="Normal" style:family="paragraph">
      <style:text-properties fo:color="#800080"/>
    </style:style>
    <style:style style:name="P906" style:parent-style-name="Normal" style:family="paragraph">
      <style:text-properties fo:color="#800080"/>
    </style:style>
    <style:style style:name="P907" style:parent-style-name="Normal" style:family="paragraph">
      <style:text-properties fo:color="#800080"/>
    </style:style>
    <style:style style:name="P908" style:parent-style-name="Normal" style:family="paragraph">
      <style:text-properties fo:color="#800080"/>
    </style:style>
    <style:style style:name="P909" style:parent-style-name="Normal" style:family="paragraph">
      <style:text-properties fo:color="#800080"/>
    </style:style>
    <style:style style:name="P910" style:parent-style-name="Normal" style:family="paragraph">
      <style:text-properties fo:color="#800080"/>
    </style:style>
    <style:style style:name="P911" style:parent-style-name="Normal" style:family="paragraph">
      <style:text-properties fo:color="#800080"/>
    </style:style>
    <style:style style:name="P912" style:parent-style-name="Normal" style:family="paragraph">
      <style:text-properties fo:color="#800080"/>
    </style:style>
    <style:style style:name="P913" style:parent-style-name="Normal" style:family="paragraph">
      <style:text-properties fo:color="#800080"/>
    </style:style>
    <style:style style:name="P914" style:parent-style-name="Normal" style:family="paragraph">
      <style:text-properties fo:color="#800080"/>
    </style:style>
    <style:style style:name="P915" style:parent-style-name="Normal" style:family="paragraph">
      <style:text-properties fo:color="#800080"/>
    </style:style>
    <style:style style:name="P916" style:parent-style-name="Normal" style:family="paragraph">
      <style:text-properties fo:color="#800080"/>
    </style:style>
    <style:style style:name="P917" style:parent-style-name="Normal" style:family="paragraph">
      <style:text-properties fo:color="#800080"/>
    </style:style>
    <style:style style:name="P918" style:parent-style-name="Normal" style:family="paragraph">
      <style:text-properties fo:color="#800080"/>
    </style:style>
    <style:style style:name="P919" style:parent-style-name="Normal" style:family="paragraph">
      <style:text-properties fo:color="#800080"/>
    </style:style>
    <style:style style:name="P920" style:parent-style-name="Normal" style:family="paragraph">
      <style:text-properties fo:color="#800080"/>
    </style:style>
    <style:style style:name="P921" style:parent-style-name="Normal" style:family="paragraph">
      <style:text-properties fo:color="#800080"/>
    </style:style>
    <style:style style:name="P922" style:parent-style-name="Normal" style:family="paragraph">
      <style:text-properties fo:color="#800080"/>
    </style:style>
    <style:style style:name="T923" style:parent-style-name="DefaultParagraphFont" style:family="text">
      <style:text-properties fo:color="#800080"/>
    </style:style>
    <style:style style:name="T924" style:parent-style-name="DefaultParagraphFont" style:family="text">
      <style:text-properties fo:font-style="italic" style:font-style-asian="italic" fo:color="#800080"/>
    </style:style>
    <style:style style:name="P925" style:parent-style-name="Normal" style:family="paragraph">
      <style:text-properties fo:color="#800080"/>
    </style:style>
    <style:style style:name="P926" style:parent-style-name="Normal" style:family="paragraph">
      <style:text-properties fo:color="#800080"/>
    </style:style>
    <style:style style:name="P927" style:parent-style-name="Normal" style:family="paragraph">
      <style:text-properties fo:color="#800080"/>
    </style:style>
    <style:style style:name="P928" style:parent-style-name="Normal" style:family="paragraph">
      <style:text-properties fo:color="#800080"/>
    </style:style>
    <style:style style:name="T929" style:parent-style-name="DefaultParagraphFont" style:family="text">
      <style:text-properties fo:font-style="italic" style:font-style-asian="italic" fo:color="#800080"/>
    </style:style>
    <style:style style:name="P930" style:parent-style-name="Normal" style:family="paragraph">
      <style:text-properties fo:color="#800080"/>
    </style:style>
    <style:style style:name="P931" style:parent-style-name="Normal" style:family="paragraph">
      <style:text-properties fo:color="#800080"/>
    </style:style>
    <style:style style:name="P932" style:parent-style-name="Normal" style:family="paragraph">
      <style:text-properties fo:color="#800080"/>
    </style:style>
    <style:style style:name="P933" style:parent-style-name="Normal" style:family="paragraph">
      <style:text-properties fo:color="#800080"/>
    </style:style>
    <style:style style:name="P934" style:parent-style-name="Normal" style:family="paragraph">
      <style:text-properties fo:color="#800080"/>
    </style:style>
    <style:style style:name="P935" style:parent-style-name="Normal" style:family="paragraph">
      <style:text-properties fo:color="#800080"/>
    </style:style>
    <style:style style:name="P936" style:parent-style-name="Normal" style:family="paragraph">
      <style:text-properties fo:color="#800080"/>
    </style:style>
    <style:style style:name="P937" style:parent-style-name="Normal" style:family="paragraph">
      <style:text-properties fo:color="#800080"/>
    </style:style>
    <style:style style:name="P938" style:parent-style-name="Normal" style:family="paragraph">
      <style:text-properties fo:color="#800080"/>
    </style:style>
    <style:style style:name="P939" style:parent-style-name="Normal" style:family="paragraph">
      <style:text-properties fo:color="#800080"/>
    </style:style>
    <style:style style:name="P940" style:parent-style-name="Normal" style:family="paragraph">
      <style:text-properties fo:color="#800080"/>
    </style:style>
    <style:style style:name="P941" style:parent-style-name="Normal" style:family="paragraph">
      <style:text-properties fo:color="#800080"/>
    </style:style>
    <style:style style:name="P942" style:parent-style-name="Normal" style:family="paragraph">
      <style:text-properties fo:color="#800080"/>
    </style:style>
    <style:style style:name="P943" style:parent-style-name="Normal" style:family="paragraph">
      <style:text-properties fo:color="#800080"/>
    </style:style>
    <style:style style:name="P944" style:parent-style-name="Normal" style:family="paragraph">
      <style:text-properties fo:color="#800080"/>
    </style:style>
    <style:style style:name="P945" style:parent-style-name="Normal" style:family="paragraph">
      <style:text-properties fo:color="#800080"/>
    </style:style>
    <style:style style:name="P946" style:parent-style-name="Normal" style:family="paragraph">
      <style:text-properties fo:color="#800080"/>
    </style:style>
    <style:style style:name="T947" style:parent-style-name="DefaultParagraphFont" style:family="text">
      <style:text-properties fo:font-style="italic" style:font-style-asian="italic" fo:color="#800080"/>
    </style:style>
    <style:style style:name="P948" style:parent-style-name="Normal" style:family="paragraph">
      <style:text-properties fo:color="#800080"/>
    </style:style>
    <style:style style:name="P949" style:parent-style-name="Normal" style:family="paragraph">
      <style:text-properties fo:color="#800080"/>
    </style:style>
    <style:style style:name="P950" style:parent-style-name="Normal" style:family="paragraph">
      <style:text-properties fo:color="#800080"/>
    </style:style>
    <style:style style:name="P951" style:parent-style-name="Normal" style:family="paragraph">
      <style:text-properties fo:color="#800080"/>
    </style:style>
    <style:style style:name="P952" style:parent-style-name="Normal" style:family="paragraph">
      <style:text-properties fo:color="#800080"/>
    </style:style>
    <style:style style:name="P953" style:parent-style-name="Normal" style:family="paragraph">
      <style:text-properties fo:color="#800080"/>
    </style:style>
    <style:style style:name="P954" style:parent-style-name="Normal" style:family="paragraph">
      <style:text-properties fo:color="#800080"/>
    </style:style>
    <style:style style:name="T955" style:parent-style-name="DefaultParagraphFont" style:family="text">
      <style:text-properties fo:color="#800080"/>
    </style:style>
    <style:style style:name="T956" style:parent-style-name="DefaultParagraphFont" style:family="text">
      <style:text-properties fo:font-style="italic" style:font-style-asian="italic" fo:color="#800080"/>
    </style:style>
    <style:style style:name="P957" style:parent-style-name="Normal" style:family="paragraph">
      <style:text-properties fo:color="#800080"/>
    </style:style>
    <style:style style:name="P958" style:parent-style-name="Normal" style:family="paragraph">
      <style:text-properties fo:color="#800080"/>
    </style:style>
    <style:style style:name="P959" style:parent-style-name="Normal" style:family="paragraph">
      <style:text-properties fo:color="#800080"/>
    </style:style>
    <style:style style:name="P960" style:parent-style-name="Normal" style:family="paragraph">
      <style:text-properties fo:font-style="italic" style:font-style-asian="italic" fo:color="#800080"/>
    </style:style>
    <style:style style:name="P961" style:parent-style-name="Normal" style:family="paragraph">
      <style:text-properties fo:color="#800080"/>
    </style:style>
    <style:style style:name="P962" style:parent-style-name="Normal" style:family="paragraph">
      <style:text-properties fo:color="#800080"/>
    </style:style>
    <style:style style:name="P963" style:parent-style-name="Normal" style:family="paragraph">
      <style:text-properties fo:color="#800080"/>
    </style:style>
    <style:style style:name="P964" style:parent-style-name="Normal" style:family="paragraph">
      <style:text-properties fo:color="#800080"/>
    </style:style>
    <style:style style:name="P965" style:parent-style-name="Normal" style:family="paragraph">
      <style:text-properties fo:color="#800080"/>
    </style:style>
    <style:style style:name="P966" style:parent-style-name="Normal" style:family="paragraph">
      <style:text-properties fo:color="#800080"/>
    </style:style>
    <style:style style:name="P967" style:parent-style-name="Normal" style:family="paragraph">
      <style:text-properties fo:color="#800080"/>
    </style:style>
    <style:style style:name="P968" style:parent-style-name="Normal" style:family="paragraph">
      <style:text-properties fo:color="#800080"/>
    </style:style>
    <style:style style:name="P969" style:parent-style-name="Normal" style:family="paragraph">
      <style:text-properties fo:color="#800080"/>
    </style:style>
    <style:style style:name="P970" style:parent-style-name="Normal" style:family="paragraph">
      <style:text-properties fo:color="#800080"/>
    </style:style>
    <style:style style:name="T971" style:parent-style-name="DefaultParagraphFont" style:family="text">
      <style:text-properties fo:font-style="italic" style:font-style-asian="italic" fo:color="#800080"/>
    </style:style>
    <style:style style:name="P972" style:parent-style-name="Normal" style:family="paragraph">
      <style:text-properties fo:color="#800080"/>
    </style:style>
    <style:style style:name="T973" style:parent-style-name="DefaultParagraphFont" style:family="text">
      <style:text-properties fo:color="#800080"/>
    </style:style>
    <style:style style:name="T974" style:parent-style-name="DefaultParagraphFont" style:family="text">
      <style:text-properties fo:font-style="italic" style:font-style-asian="italic" fo:color="#800080"/>
    </style:style>
    <style:style style:name="T975" style:parent-style-name="DefaultParagraphFont" style:family="text">
      <style:text-properties fo:color="#800080"/>
    </style:style>
    <style:style style:name="P976" style:parent-style-name="Normal" style:family="paragraph">
      <style:text-properties fo:color="#800080"/>
    </style:style>
    <style:style style:name="P977" style:parent-style-name="Normal" style:family="paragraph">
      <style:text-properties fo:color="#800080"/>
    </style:style>
    <style:style style:name="P978" style:parent-style-name="Normal" style:family="paragraph">
      <style:text-properties fo:color="#800080"/>
    </style:style>
    <style:style style:name="P979" style:parent-style-name="Normal" style:family="paragraph">
      <style:text-properties fo:color="#800080"/>
    </style:style>
    <style:style style:name="P980" style:parent-style-name="Normal" style:family="paragraph">
      <style:text-properties fo:color="#800080"/>
    </style:style>
    <style:style style:name="P981" style:parent-style-name="Normal" style:family="paragraph">
      <style:text-properties fo:color="#800080"/>
    </style:style>
    <style:style style:name="P982" style:parent-style-name="Normal" style:family="paragraph">
      <style:text-properties fo:color="#800080"/>
    </style:style>
    <style:style style:name="P983" style:parent-style-name="Normal" style:family="paragraph">
      <style:text-properties fo:color="#800080"/>
    </style:style>
    <style:style style:name="P984" style:parent-style-name="Normal" style:family="paragraph">
      <style:text-properties fo:color="#800080"/>
    </style:style>
    <style:style style:name="P985" style:parent-style-name="Normal" style:family="paragraph">
      <style:text-properties fo:color="#800080"/>
    </style:style>
    <style:style style:name="P986" style:parent-style-name="Normal" style:family="paragraph">
      <style:text-properties fo:color="#800080"/>
    </style:style>
    <style:style style:name="P987" style:parent-style-name="Normal" style:family="paragraph">
      <style:text-properties fo:color="#800080"/>
    </style:style>
    <style:style style:name="T988" style:parent-style-name="DefaultParagraphFont" style:family="text">
      <style:text-properties fo:color="#800080"/>
    </style:style>
    <style:style style:name="T989" style:parent-style-name="DefaultParagraphFont" style:family="text">
      <style:text-properties fo:font-style="italic" style:font-style-asian="italic" fo:color="#800080"/>
    </style:style>
    <style:style style:name="P990" style:parent-style-name="Normal" style:family="paragraph">
      <style:text-properties fo:color="#800080"/>
    </style:style>
    <style:style style:name="P991" style:parent-style-name="Normal" style:family="paragraph">
      <style:text-properties fo:color="#800080"/>
    </style:style>
    <style:style style:name="P992" style:parent-style-name="Normal" style:family="paragraph">
      <style:text-properties fo:color="#800080"/>
    </style:style>
    <style:style style:name="T993" style:parent-style-name="DefaultParagraphFont" style:family="text">
      <style:text-properties fo:color="#800080"/>
    </style:style>
    <style:style style:name="T994" style:parent-style-name="DefaultParagraphFont" style:family="text">
      <style:text-properties fo:font-style="italic" style:font-style-asian="italic" fo:color="#800080"/>
    </style:style>
    <style:style style:name="T995" style:parent-style-name="DefaultParagraphFont" style:family="text">
      <style:text-properties fo:color="#800080"/>
    </style:style>
    <style:style style:name="P996" style:parent-style-name="Normal" style:family="paragraph">
      <style:text-properties fo:font-style="italic" style:font-style-asian="italic" fo:color="#800080"/>
    </style:style>
    <style:style style:name="P997" style:parent-style-name="Normal" style:family="paragraph">
      <style:text-properties fo:font-style="italic" style:font-style-asian="italic" fo:color="#800080"/>
    </style:style>
    <style:style style:name="P998" style:parent-style-name="Normal" style:family="paragraph">
      <style:text-properties fo:color="#800080"/>
    </style:style>
    <style:style style:name="P999" style:parent-style-name="Normal" style:family="paragraph">
      <style:text-properties fo:color="#800080"/>
    </style:style>
    <style:style style:name="T1000" style:parent-style-name="DefaultParagraphFont" style:family="text">
      <style:text-properties fo:font-style="italic" style:font-style-asian="italic" fo:color="#800080"/>
    </style:style>
    <style:style style:name="P1001" style:parent-style-name="Normal" style:family="paragraph">
      <style:text-properties fo:color="#800080"/>
    </style:style>
    <style:style style:name="P1002" style:parent-style-name="Normal" style:family="paragraph">
      <style:text-properties fo:color="#800080"/>
    </style:style>
    <style:style style:name="P1003" style:parent-style-name="Normal" style:family="paragraph">
      <style:text-properties fo:color="#800080"/>
    </style:style>
    <style:style style:name="T1004" style:parent-style-name="DefaultParagraphFont" style:family="text">
      <style:text-properties fo:color="#800080"/>
    </style:style>
    <style:style style:name="T1005" style:parent-style-name="DefaultParagraphFont" style:family="text">
      <style:text-properties fo:font-style="italic" style:font-style-asian="italic" fo:color="#800080"/>
    </style:style>
    <style:style style:name="T1006" style:parent-style-name="DefaultParagraphFont" style:family="text">
      <style:text-properties fo:color="#800080"/>
    </style:style>
    <style:style style:name="P1007" style:parent-style-name="Normal" style:family="paragraph">
      <style:text-properties fo:color="#800080"/>
    </style:style>
    <style:style style:name="P1008" style:parent-style-name="Normal" style:family="paragraph">
      <style:text-properties fo:color="#800080"/>
    </style:style>
    <style:style style:name="P1009" style:parent-style-name="Normal" style:family="paragraph">
      <style:text-properties fo:color="#800080"/>
    </style:style>
    <style:style style:name="P1010" style:parent-style-name="Normal" style:family="paragraph">
      <style:text-properties fo:color="#800080"/>
    </style:style>
    <style:style style:name="P1011" style:parent-style-name="Normal" style:family="paragraph">
      <style:text-properties fo:color="#800080"/>
    </style:style>
    <style:style style:name="P1012" style:parent-style-name="Normal" style:family="paragraph">
      <style:text-properties fo:color="#800080"/>
    </style:style>
    <style:style style:name="P1013" style:parent-style-name="Normal" style:family="paragraph">
      <style:text-properties fo:color="#800080"/>
    </style:style>
    <style:style style:name="P1014" style:parent-style-name="Normal" style:family="paragraph">
      <style:text-properties fo:color="#800080"/>
    </style:style>
    <style:style style:name="P1015" style:parent-style-name="Normal" style:family="paragraph">
      <style:text-properties fo:color="#800080"/>
    </style:style>
    <style:style style:name="P1016" style:parent-style-name="Normal" style:family="paragraph">
      <style:text-properties fo:color="#800080"/>
    </style:style>
    <style:style style:name="P1017" style:parent-style-name="Normal" style:family="paragraph">
      <style:text-properties fo:color="#800080"/>
    </style:style>
    <style:style style:name="P1018" style:parent-style-name="Normal" style:family="paragraph">
      <style:text-properties fo:color="#800080"/>
    </style:style>
    <style:style style:name="P1019" style:parent-style-name="Normal" style:family="paragraph">
      <style:text-properties fo:color="#800080"/>
    </style:style>
    <style:style style:name="T1020" style:parent-style-name="DefaultParagraphFont" style:family="text">
      <style:text-properties fo:font-style="italic" style:font-style-asian="italic" fo:color="#800080"/>
    </style:style>
    <style:style style:name="P1021" style:parent-style-name="Normal" style:family="paragraph">
      <style:text-properties fo:color="#800080"/>
    </style:style>
    <style:style style:name="P1022" style:parent-style-name="Normal" style:family="paragraph">
      <style:text-properties fo:color="#800080"/>
    </style:style>
    <style:style style:name="P1023" style:parent-style-name="Normal" style:family="paragraph">
      <style:text-properties fo:color="#800080"/>
    </style:style>
    <style:style style:name="P1024" style:parent-style-name="Normal" style:family="paragraph">
      <style:text-properties fo:color="#800080"/>
    </style:style>
    <style:style style:name="P1025" style:parent-style-name="Normal" style:family="paragraph">
      <style:text-properties fo:color="#800080"/>
    </style:style>
    <style:style style:name="P1026" style:parent-style-name="Normal" style:family="paragraph">
      <style:text-properties fo:color="#800080"/>
    </style:style>
    <style:style style:name="P1027" style:parent-style-name="Normal" style:family="paragraph">
      <style:text-properties fo:color="#800080"/>
    </style:style>
    <style:style style:name="P1028" style:parent-style-name="Normal" style:family="paragraph">
      <style:text-properties fo:color="#800080"/>
    </style:style>
    <style:style style:name="P1029" style:parent-style-name="Normal" style:family="paragraph">
      <style:text-properties fo:color="#800080"/>
    </style:style>
    <style:style style:name="P1030" style:parent-style-name="Normal" style:family="paragraph">
      <style:text-properties fo:color="#800080"/>
    </style:style>
    <style:style style:name="P1031" style:parent-style-name="Normal" style:family="paragraph">
      <style:text-properties fo:color="#800080"/>
    </style:style>
    <style:style style:name="P1032" style:parent-style-name="Normal" style:family="paragraph">
      <style:text-properties fo:color="#800080"/>
    </style:style>
    <style:style style:name="P1033" style:parent-style-name="Normal" style:family="paragraph">
      <style:text-properties fo:color="#800080"/>
    </style:style>
    <style:style style:name="P1034" style:parent-style-name="Normal" style:family="paragraph">
      <style:text-properties fo:color="#800080"/>
    </style:style>
    <style:style style:name="P1035" style:parent-style-name="Normal" style:family="paragraph">
      <style:text-properties fo:color="#800080"/>
    </style:style>
    <style:style style:name="P1036" style:parent-style-name="Normal" style:family="paragraph">
      <style:text-properties fo:color="#800080"/>
    </style:style>
    <style:style style:name="P1037" style:parent-style-name="Normal" style:family="paragraph">
      <style:text-properties fo:color="#800080"/>
    </style:style>
    <style:style style:name="T1038" style:parent-style-name="DefaultParagraphFont" style:family="text">
      <style:text-properties fo:font-style="italic" style:font-style-asian="italic" fo:color="#800080"/>
    </style:style>
    <style:style style:name="P1039" style:parent-style-name="Normal" style:family="paragraph">
      <style:text-properties fo:color="#800080"/>
    </style:style>
    <style:style style:name="P1040" style:parent-style-name="Normal" style:family="paragraph">
      <style:text-properties fo:color="#800080"/>
    </style:style>
    <style:style style:name="P1041" style:parent-style-name="Normal" style:family="paragraph">
      <style:text-properties fo:color="#800080"/>
    </style:style>
    <style:style style:name="T1042" style:parent-style-name="DefaultParagraphFont" style:family="text">
      <style:text-properties fo:color="#800080"/>
    </style:style>
    <style:style style:name="T1043" style:parent-style-name="DefaultParagraphFont" style:family="text">
      <style:text-properties fo:font-style="italic" style:font-style-asian="italic" fo:color="#800080"/>
    </style:style>
    <style:style style:name="P1044" style:parent-style-name="Normal" style:family="paragraph">
      <style:text-properties fo:color="#800080"/>
    </style:style>
    <style:style style:name="P1045" style:parent-style-name="Normal" style:family="paragraph">
      <style:text-properties fo:color="#800080"/>
    </style:style>
    <style:style style:name="P1046" style:parent-style-name="Normal" style:family="paragraph">
      <style:text-properties fo:color="#800080"/>
    </style:style>
    <style:style style:name="P1047" style:parent-style-name="Normal" style:family="paragraph">
      <style:text-properties fo:color="#800080"/>
    </style:style>
    <style:style style:name="P1048" style:parent-style-name="Normal" style:family="paragraph">
      <style:text-properties fo:color="#800080"/>
    </style:style>
    <style:style style:name="P1049" style:parent-style-name="Normal" style:family="paragraph">
      <style:text-properties fo:color="#800080"/>
    </style:style>
    <style:style style:name="P1050" style:parent-style-name="Normal" style:family="paragraph">
      <style:text-properties fo:color="#800080"/>
    </style:style>
    <style:style style:name="P1051" style:parent-style-name="Normal" style:family="paragraph">
      <style:text-properties fo:color="#800080"/>
    </style:style>
    <style:style style:name="P1052" style:parent-style-name="Normal" style:family="paragraph">
      <style:text-properties fo:color="#800080"/>
    </style:style>
    <style:style style:name="P1053" style:parent-style-name="Normal" style:family="paragraph">
      <style:text-properties fo:color="#800080"/>
    </style:style>
    <style:style style:name="P1054" style:parent-style-name="Normal" style:family="paragraph">
      <style:text-properties fo:color="#800080"/>
    </style:style>
    <style:style style:name="P1055" style:parent-style-name="Normal" style:family="paragraph">
      <style:text-properties fo:color="#800080"/>
    </style:style>
    <style:style style:name="P1056" style:parent-style-name="Normal" style:family="paragraph">
      <style:text-properties fo:color="#800080"/>
    </style:style>
    <style:style style:name="P1057" style:parent-style-name="Normal" style:family="paragraph">
      <style:text-properties fo:color="#800080"/>
    </style:style>
    <style:style style:name="P1058" style:parent-style-name="Normal" style:family="paragraph">
      <style:text-properties fo:color="#800080"/>
    </style:style>
    <style:style style:name="P1059" style:parent-style-name="Normal" style:family="paragraph">
      <style:text-properties fo:color="#800080"/>
    </style:style>
    <style:style style:name="T1060" style:parent-style-name="DefaultParagraphFont" style:family="text">
      <style:text-properties fo:color="#800080"/>
    </style:style>
    <style:style style:name="T1061" style:parent-style-name="DefaultParagraphFont" style:family="text">
      <style:text-properties fo:font-style="italic" style:font-style-asian="italic" fo:color="#800080"/>
    </style:style>
    <style:style style:name="T1062" style:parent-style-name="DefaultParagraphFont" style:family="text">
      <style:text-properties fo:color="#800080"/>
    </style:style>
    <style:style style:name="P1063" style:parent-style-name="Normal" style:family="paragraph">
      <style:text-properties fo:color="#800080"/>
    </style:style>
    <style:style style:name="P1064" style:parent-style-name="Normal" style:family="paragraph">
      <style:text-properties fo:color="#800080"/>
    </style:style>
    <style:style style:name="P1065" style:parent-style-name="Normal" style:family="paragraph">
      <style:text-properties fo:color="#800080"/>
    </style:style>
    <style:style style:name="P1066" style:parent-style-name="Normal" style:family="paragraph">
      <style:text-properties fo:color="#800080"/>
    </style:style>
    <style:style style:name="P1067" style:parent-style-name="Normal" style:family="paragraph">
      <style:text-properties fo:color="#800080"/>
    </style:style>
    <style:style style:name="T1068" style:parent-style-name="DefaultParagraphFont" style:family="text">
      <style:text-properties fo:font-style="italic" style:font-style-asian="italic" fo:color="#800080"/>
    </style:style>
    <style:style style:name="P1069" style:parent-style-name="Normal" style:family="paragraph">
      <style:text-properties fo:color="#800080"/>
    </style:style>
    <style:style style:name="P1070" style:parent-style-name="Normal" style:family="paragraph">
      <style:text-properties fo:color="#800080"/>
    </style:style>
    <style:style style:name="P1071" style:parent-style-name="Normal" style:family="paragraph">
      <style:text-properties fo:color="#800080"/>
    </style:style>
    <style:style style:name="P1072" style:parent-style-name="Normal" style:family="paragraph">
      <style:text-properties fo:color="#800080"/>
    </style:style>
    <style:style style:name="P1073" style:parent-style-name="Normal" style:family="paragraph">
      <style:text-properties fo:color="#800080"/>
    </style:style>
    <style:style style:name="P1074" style:parent-style-name="Normal" style:family="paragraph">
      <style:text-properties fo:color="#800080"/>
    </style:style>
    <style:style style:name="P1075" style:parent-style-name="Normal" style:family="paragraph">
      <style:text-properties fo:color="#800080"/>
    </style:style>
    <style:style style:name="P1076" style:parent-style-name="Normal" style:family="paragraph">
      <style:text-properties fo:color="#800080"/>
    </style:style>
    <style:style style:name="P1077" style:parent-style-name="Normal" style:family="paragraph">
      <style:text-properties fo:color="#800080"/>
    </style:style>
    <style:style style:name="P1078" style:parent-style-name="Normal" style:family="paragraph">
      <style:text-properties fo:color="#800080"/>
    </style:style>
    <style:style style:name="P1079" style:parent-style-name="Normal" style:family="paragraph">
      <style:text-properties fo:color="#800080"/>
    </style:style>
    <style:style style:name="P1080" style:parent-style-name="Normal" style:family="paragraph">
      <style:text-properties fo:color="#800080"/>
    </style:style>
    <style:style style:name="T1081" style:parent-style-name="DefaultParagraphFont" style:family="text">
      <style:text-properties fo:font-style="italic" style:font-style-asian="italic" fo:color="#800080"/>
    </style:style>
    <style:style style:name="P1082" style:parent-style-name="Normal" style:family="paragraph">
      <style:text-properties fo:color="#800080"/>
    </style:style>
    <style:style style:name="P1083" style:parent-style-name="Normal" style:family="paragraph">
      <style:text-properties fo:color="#800080"/>
    </style:style>
    <style:style style:name="P1084" style:parent-style-name="Normal" style:family="paragraph">
      <style:text-properties fo:color="#800080"/>
    </style:style>
    <style:style style:name="P1085" style:parent-style-name="Normal" style:family="paragraph">
      <style:text-properties fo:color="#800080"/>
    </style:style>
    <style:style style:name="P1086" style:parent-style-name="Normal" style:family="paragraph">
      <style:text-properties fo:color="#800080"/>
    </style:style>
    <style:style style:name="P1087" style:parent-style-name="Normal" style:family="paragraph">
      <style:text-properties fo:color="#800080"/>
    </style:style>
    <style:style style:name="P1088" style:parent-style-name="Normal" style:family="paragraph">
      <style:text-properties fo:color="#800080"/>
    </style:style>
    <style:style style:name="P1089" style:parent-style-name="Normal" style:family="paragraph">
      <style:text-properties fo:color="#800080"/>
    </style:style>
    <style:style style:name="P1090" style:parent-style-name="Normal" style:family="paragraph">
      <style:text-properties fo:color="#800080"/>
    </style:style>
    <style:style style:name="P1091" style:parent-style-name="Normal" style:family="paragraph">
      <style:text-properties fo:color="#800080"/>
    </style:style>
    <style:style style:name="P1092" style:parent-style-name="Normal" style:family="paragraph">
      <style:text-properties fo:color="#800080"/>
    </style:style>
    <style:style style:name="P1093" style:parent-style-name="Normal" style:family="paragraph">
      <style:text-properties fo:color="#800080"/>
    </style:style>
    <style:style style:name="P1094" style:parent-style-name="Normal" style:family="paragraph">
      <style:text-properties fo:color="#800080"/>
    </style:style>
    <style:style style:name="P1095" style:parent-style-name="Normal" style:family="paragraph">
      <style:text-properties fo:color="#800080"/>
    </style:style>
    <style:style style:name="P1096" style:parent-style-name="Normal" style:family="paragraph">
      <style:text-properties fo:color="#800080"/>
    </style:style>
    <style:style style:name="P1097" style:parent-style-name="Normal" style:family="paragraph">
      <style:text-properties fo:color="#800080"/>
    </style:style>
    <style:style style:name="P1098" style:parent-style-name="Normal" style:family="paragraph">
      <style:text-properties fo:color="#800080"/>
    </style:style>
    <style:style style:name="P1099" style:parent-style-name="Normal" style:family="paragraph">
      <style:text-properties fo:color="#800080"/>
    </style:style>
    <style:style style:name="P1100" style:parent-style-name="Normal" style:family="paragraph">
      <style:text-properties fo:color="#800080"/>
    </style:style>
    <style:style style:name="P1101" style:parent-style-name="Normal" style:family="paragraph">
      <style:text-properties fo:color="#800080"/>
    </style:style>
    <style:style style:name="P1102" style:parent-style-name="Normal" style:family="paragraph">
      <style:text-properties fo:color="#800080"/>
    </style:style>
    <style:style style:name="P1103" style:parent-style-name="Normal" style:family="paragraph">
      <style:text-properties fo:color="#800080"/>
    </style:style>
    <style:style style:name="P1104" style:parent-style-name="Normal" style:family="paragraph">
      <style:text-properties fo:color="#800080"/>
    </style:style>
    <style:style style:name="P1105" style:parent-style-name="Normal" style:family="paragraph">
      <style:text-properties fo:color="#800080"/>
    </style:style>
    <style:style style:name="P1106" style:parent-style-name="Normal" style:family="paragraph">
      <style:text-properties fo:color="#800080"/>
    </style:style>
    <style:style style:name="P1107" style:parent-style-name="Normal" style:family="paragraph">
      <style:text-properties fo:color="#800080"/>
    </style:style>
    <style:style style:name="P1108" style:parent-style-name="Normal" style:family="paragraph">
      <style:text-properties fo:color="#800080"/>
    </style:style>
    <style:style style:name="P1109" style:parent-style-name="Normal" style:family="paragraph">
      <style:text-properties fo:color="#800080"/>
    </style:style>
    <style:style style:name="P1110" style:parent-style-name="Normal" style:family="paragraph">
      <style:text-properties fo:color="#800080"/>
    </style:style>
    <style:style style:name="P1111" style:parent-style-name="Normal" style:family="paragraph">
      <style:text-properties fo:color="#800080"/>
    </style:style>
    <style:style style:name="P1112" style:parent-style-name="Normal" style:family="paragraph">
      <style:text-properties fo:color="#800080"/>
    </style:style>
    <style:style style:name="P1113" style:parent-style-name="Normal" style:family="paragraph">
      <style:text-properties fo:color="#800080"/>
    </style:style>
    <style:style style:name="P1114" style:parent-style-name="Normal" style:family="paragraph">
      <style:text-properties fo:color="#800080"/>
    </style:style>
    <style:style style:name="P1115" style:parent-style-name="Normal" style:family="paragraph">
      <style:text-properties fo:color="#800080"/>
    </style:style>
    <style:style style:name="P1116" style:parent-style-name="Normal" style:family="paragraph">
      <style:text-properties fo:color="#800080"/>
    </style:style>
    <style:style style:name="P1117" style:parent-style-name="Normal" style:family="paragraph">
      <style:text-properties fo:color="#800080"/>
    </style:style>
    <style:style style:name="P1118" style:parent-style-name="Normal" style:family="paragraph">
      <style:text-properties fo:color="#800080"/>
    </style:style>
    <style:style style:name="P1119" style:parent-style-name="Normal" style:family="paragraph">
      <style:text-properties fo:color="#800080"/>
    </style:style>
    <style:style style:name="P1120" style:parent-style-name="Normal" style:family="paragraph">
      <style:text-properties fo:color="#800080"/>
    </style:style>
    <style:style style:name="P1121" style:parent-style-name="Normal" style:family="paragraph">
      <style:text-properties fo:color="#800080"/>
    </style:style>
    <style:style style:name="P1122" style:parent-style-name="Normal" style:family="paragraph">
      <style:text-properties fo:color="#800080"/>
    </style:style>
    <style:style style:name="P1123" style:parent-style-name="Normal" style:family="paragraph">
      <style:text-properties fo:font-style="italic" style:font-style-asian="italic" fo:color="#800080"/>
    </style:style>
    <style:style style:name="P1124" style:parent-style-name="Normal" style:family="paragraph">
      <style:text-properties fo:color="#800080"/>
    </style:style>
    <style:style style:name="P1125" style:parent-style-name="Normal" style:family="paragraph">
      <style:text-properties fo:color="#800080"/>
    </style:style>
    <style:style style:name="P1126" style:parent-style-name="Normal" style:family="paragraph">
      <style:text-properties fo:color="#800080"/>
    </style:style>
    <style:style style:name="P1127" style:parent-style-name="Normal" style:family="paragraph">
      <style:text-properties fo:color="#800080"/>
    </style:style>
    <style:style style:name="P1128" style:parent-style-name="Normal" style:family="paragraph">
      <style:text-properties fo:color="#800080"/>
    </style:style>
    <style:style style:name="P1129" style:parent-style-name="Normal" style:family="paragraph">
      <style:text-properties fo:color="#800080"/>
    </style:style>
    <style:style style:name="P1130" style:parent-style-name="Normal" style:family="paragraph">
      <style:text-properties fo:color="#800080"/>
    </style:style>
    <style:style style:name="P1131" style:parent-style-name="Normal" style:family="paragraph">
      <style:text-properties fo:color="#800080"/>
    </style:style>
    <style:style style:name="P1132" style:parent-style-name="Normal" style:family="paragraph">
      <style:text-properties fo:color="#800080"/>
    </style:style>
    <style:style style:name="P1133" style:parent-style-name="Normal" style:family="paragraph">
      <style:text-properties fo:color="#800080"/>
    </style:style>
    <style:style style:name="P1134" style:parent-style-name="Normal" style:family="paragraph">
      <style:text-properties fo:color="#800080"/>
    </style:style>
    <style:style style:name="P1135" style:parent-style-name="Normal" style:family="paragraph">
      <style:text-properties fo:color="#800080"/>
    </style:style>
    <style:style style:name="P1136" style:parent-style-name="Normal" style:family="paragraph">
      <style:text-properties fo:color="#800080"/>
    </style:style>
    <style:style style:name="P1137" style:parent-style-name="Normal" style:family="paragraph">
      <style:text-properties fo:color="#800080"/>
    </style:style>
    <style:style style:name="P1138" style:parent-style-name="Normal" style:family="paragraph">
      <style:paragraph-properties fo:break-before="page"/>
      <style:text-properties fo:color="#800080"/>
    </style:style>
    <style:style style:name="P1139" style:parent-style-name="Normal" style:family="paragraph">
      <style:text-properties fo:color="#800080"/>
    </style:style>
    <style:style style:name="P1140" style:parent-style-name="Normal" style:family="paragraph">
      <style:text-properties fo:color="#800080"/>
    </style:style>
    <style:style style:name="P1141" style:parent-style-name="Normal" style:family="paragraph">
      <style:paragraph-properties fo:break-before="page"/>
      <style:text-properties fo:color="#800080"/>
    </style:style>
    <style:style style:name="P1142" style:parent-style-name="Normal" style:family="paragraph">
      <style:text-properties fo:color="#800080"/>
    </style:style>
  </office:automatic-styles>
  <office:body>
    <office:text text:use-soft-page-breaks="true">
      <text:h text:style-name="P1" text:outline-level="1"/>
      <text:h text:style-name="P2" text:outline-level="1"/>
      <text:h text:style-name="P3" text:outline-level="4">Stories</text:h>
      <text:p text:style-name="P4"/>
      <text:p text:style-name="P5"/>
      <text:p text:style-name="P6"/>
      <text:p text:style-name="P7"/>
      <text:h text:style-name="P8" text:outline-level="1"/>
      <text:h text:style-name="P9" text:outline-level="1"/>
      <text:h text:style-name="P10" text:outline-level="1"/>
      <text:table-of-content text:name="_TOC0">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1"><text:span text:style-name="T12">Assepoester</text:span><text:tab/>2</text:p>
          <text:p text:style-name="P13">De stiefmoeder<text:tab/>2</text:p>
          <text:p text:style-name="P14">De stiefzusters<text:tab/>3</text:p>
          <text:p text:style-name="P15">De prins<text:tab/>4</text:p>
          <text:p text:style-name="P16">De boetedoening<text:tab/>5</text:p>
          <text:p text:style-name="P17">Het bal<text:tab/>6</text:p>
          <text:p text:style-name="P18">Thuiskomst<text:tab/>7</text:p>
          <text:p text:style-name="P19"><text:span text:style-name="T20">De boeiende reis</text:span><text:tab/>8</text:p>
          <text:p text:style-name="P21">Bestemming<text:tab/>8</text:p>
          <text:p text:style-name="P22">Doezelig<text:tab/>9</text:p>
          <text:p text:style-name="P23">Neger<text:tab/>10</text:p>
          <text:p text:style-name="P24">Rituelen<text:tab/>11</text:p>
          <text:p text:style-name="P25">Openbaring<text:tab/>12</text:p>
          <text:p text:style-name="P26">De reactie<text:tab/>14</text:p>
          <text:p text:style-name="P27"><text:span text:style-name="T28">Thuis</text:span><text:tab/>21</text:p>
          <text:p text:style-name="P29"><text:span text:style-name="T30">Vissen</text:span><text:tab/>23</text:p>
          <text:p text:style-name="P31"><text:span text:style-name="T32">De vriendin</text:span><text:tab/>33</text:p>
          <text:p text:style-name="P33">De bewerking<text:tab/>33</text:p>
          <text:p text:style-name="P34">Het spel<text:tab/>34</text:p>
          <text:p text:style-name="P35">Strippoker<text:tab/>35</text:p>
          <text:p text:style-name="P36">De winnaar<text:tab/>36</text:p>
          <text:p text:style-name="P37">De biecht<text:tab/>37</text:p>
          <text:p text:style-name="P38">De beloning<text:tab/>38</text:p>
          <text:p text:style-name="P39"><text:span text:style-name="T40">Roodkapje</text:span><text:tab/>39</text:p>
          <text:p text:style-name="P41"><text:span text:style-name="T42">Cleopatra</text:span><text:tab/>41</text:p>
        </text:index-body>
      </text:table-of-content>
      <text:h text:style-name="P43" text:outline-level="1"/>
      <text:h text:style-name="P44" text:outline-level="1"><text:bookmark-start text:name="_Toc489630059"/><text:soft-page-break/>Assepoester<text:bookmark-end text:name="_Toc489630059"/></text:h>
      <text:p text:style-name="P45"/>
      <text:h text:style-name="P46" text:outline-level="2"><text:bookmark-start text:name="_Toc489630060"/>De stiefmoeder<text:bookmark-end text:name="_Toc489630060"/></text:h>
      <text:p text:style-name="P47"/>
      <text:p text:style-name="P48">Het is al laat op de middag. Vader is de hele dag al ongeduldig aan het wachten op de komst van zijn kersverse echtgenote. Hij maakt zich zorgen. Dan besluit hij haar tegemoet te rijden. Na een lange rit ziet hij een koets in de verte stilstaan, zonder koetsier. Nog meer zorgen overvallen hem. Hij schreeuwt zijn echtgenotes naam en geeft zijn paard de zweep. De voorheen schommelende koets is nu ineens bewegingsloos. Even later volgt een gemopper en geraas. De gordijnen van de koets gaan open. Het is stiefmoeder. Ze kijkt verschrikt. Dan bedenkt ze zich niet, opent de koetsdeur en rent Assepoesters vader tegemoet. <text:s/>Ze valt in zijn armen en laat ze zich op zijn paard tillen. De blik die vader ontvangt bij het optillen van zijn vrouw doet hem alle zorgen vergeten. In alle opwinding vergeet hij de koets en begeeft zich haastig en ongeduldig op weg naar huis.</text:p>
      <text:p text:style-name="P49"/>
      <text:p text:style-name="P50">Eenmaal thuisgekomen is de aandacht van Assepoesters stiefmoeder en haar vader geheel gericht op elkaar. Haar stiefmoeder heeft Assepoester nog geen blik gegund. Vader probeert nog Assepoester aan haar voor te stellen, maar voordat hij hier de kans voor krijgt zijn ze verwikkelt in een innige omhelzing. De handen van vader bevestigen wat zijn ogen al hadden opgemerkt. De stiefmoeder fluistert de vader iets in zijn oor. Direct daarop kijkt ze voor het eerst Assepoester aan. De minderwaardige blik die volgt maakt Assepoester bang. Vader zegt; “Meisje, ik laat even je moeder het huis zien.” Waarop de stiefmoeder fel reageert; “Even voor alle duidelijkheid, ik ben haar stiefmoeder, niet haar moeder!” De toon is gezet. Het beteuterde gezicht van vader wordt snel weer in de plooi getrokken door een intense kus van stiefmoeder.</text:p>
      <text:p text:style-name="P51"/>
      <text:p text:style-name="P52">Assepoester zit stilletjes in de keuken. Ze hoort gestommel en gekreun in de slaapkamer, dan de badkamer, zolder, haar slaapkamer en vervolgens op de trap. Na een lange stilte komen de twee weer naar beneden. Nu pas wordt Assepoester voorgesteld aan haar nieuwe moeder.</text:p>
      <text:p text:style-name="P53"/>
      <text:p text:style-name="P54">In de dagen die volgen mist Assepoester het contact met haar vader. Steeds meer gaat hij op in zijn nieuwe vrouw. <text:s/>Steeds meer ook, merkt ze dat haar stiefmoeder de touwtjes over neemt. Haar vader vindt alles goed wat ze voorstelt. Wanneer hij dreigt te protesteren, weet ze hem middels haar charme weer snel in te binden. Zo gebeurt het dat Assepoester volledig onder het juk van haar stiefmoeder valt. Haar vader is buitenspel gezet. Dit wordt nog sterker wanneer haar vader plotseling wordt weggeroepen voor zijn nieuwe baan bij de broer van zijn vrouw. <text:s/>Stiefmoeder wenst het huis voor zich alleen, Assepoester wordt verbannen naar de bijkeuken.</text:p>
      <text:p text:style-name="P55"/>
      <text:p text:style-name="P56">Sinds haar vader weg is komen er regelmatig mannen op bezoek. Voordat dit gebeurt wordt Assepoester altijd opgedragen zich in de bijkeuken te begeven en daar vooral niet uit te komen. Ze houdt zich daar strikt aan tot ze op een keer een luide kreet hoort. Ze vreest dat haar stiefmoeder iets is overkomen en rent de trap op naar haar ouders slaapkamer. Daar is niemand. Dan hoort ze een kort gelach uit haar slaapkamer. Voorzichtig opent ze haar deur. Een wildvreemde man ligt in haar bed samen met haar stiefmoeder. Onthutst en verward door deze aanblik wil ze de slaapkamer weer verlaten. Haar stiefmoeder sommeert haar te blijven.</text:p>
      <text:p text:style-name="P57"/>
      <text:p text:style-name="P58">De man neemt Assepoester van top tot teen op. Ondertussen vraagt haar stiefmoeder; “Wat denk je hier gezien te hebben, meisje?” “Ik weet het niet, mevrouw”, antwoordt ze. “Dan wordt het tijd dat je dat leert!”. De stiefmoeder eist van Assepoester dat ze het schouwspel dat volgt nauwlettend gadeslaat. Assepoester wil haar ogen wegdraaien maar wordt daarop door haar stiefmoeder terechtgewezen. Assepoester moet zelf haar bed weer verschonen, en de rommelige kamer weer ordenen. Als ze vervolgens de trap afgaat om naar de bijkeuken te gaan wordt ze door haar stiefmoeder tegengehouden.</text:p>
      <text:p text:style-name="P59"/>
      <text:p text:style-name="P60">“Hoe durf je mijn bevelen te negeren. Als je niet luisteren wilt dan moet je maar voelen.” Haar stiefmoeder legt Assepoester als een klein kind over haar benen voor een flinke portie billenkoek. Assepoester ondergaat de behandeling ingetogen, wat duidelijke irritatie bij haar stiefmoeder opwekt. Ze wijt de tekortschietende vernedering aan de enige bescherming die Assepoester tegen een werkelijk striemen tegengaat. “Dat heb je niet meer nodig”, zegt ze terwijl ze het kledingstuk van onder haar rokje wegtrekt. <text:s/>De korte aanblik die hiervan het gevolg is doet de stiefmoeder opwinden. In plaats van de billenkoek te vervolgen schuift ze het rokje van Assepoester voorzichtig terug. Op het moment dat haar handen het opengelegde zaakje dreigen te verkennen, is er gestommel aan de deur. Stiefmoeder is uit haar trance en springt op. Assepoester wordt naar de bijkeuken verwezen. Aan de deur zijn de twee dochters van stiefmoeder. Assepoester krijgt dit nog net mee als ze de bijkeuken ingaat. Ze is erg verbaasd. Ze heeft haar vader of stiefmoeder nooit over twee stiefzusters horen praten.</text:p>
      <text:p text:style-name="P61"/>
      <text:p text:style-name="P62"/>
      <text:h text:style-name="P63" text:outline-level="2"><text:bookmark-start text:name="_Toc489630061"/>De stiefzusters<text:bookmark-end text:name="_Toc489630061"/></text:h>
      <text:p text:style-name="P64"/>
      <text:p text:style-name="P65">De kennismaking van de stiefzusters verliep totaal anders dan Assepoester gehoopt had. Als enig kind zag ze uit naar het moment dat haar stiefzusters naar de bijkeuken komen om zich voor te stellen. Het enige wat ze echter van haar nieuwe zussen vernam was een luid kabaal. Vermoeid en gedesillusioneerd valt Assepoester al wachtend op de bijkeuken vloer in slaap. Dan gaat de deur open, een van de zussen komt binnen. Ze is gekleed in de jurk die Assepoester van haar moeder heeft gekregen. Omdat ze niet direct de relatie met haar zus op het spel wil zetten, houdt ze hierover haar mond. De zus daarentegen niet. “Zo jij bent Allespoetser”. <text:s/>Assepoester protesteert niet. “Nou dan mag je dit laken wassen, ten minste als je in het vervolg niet meer op deze vieze vloer wilt slapen”. Assepoester kijkt verbaasd als haar zus het laken midden in een teil met gebruikt afwaswater smijt. “Je begrijpt natuurlijk dat wij als echte dochters een eigen slaapkamer en kleding nodig hebben. Jij als stiefdochter, zo zei moeders, neemt genoegen met de bijkeuken en de vodden die je nu aan hebt”.</text:p>
      <text:p text:style-name="P66"/>
      <text:p text:style-name="P67">Nog bijkomend van deze ontmoeting begint Assepoester het laken uit de teil te vissen om deze vervolgens te wassen en te laten drogen. Het is intussen diep in de nacht. Verdrietig valt ze weer in slaap. De volgende ochtend wordt ze luid gewekt door haar stiefmoeder. “Wat denk je wel, dat ik nog huishoudelijk werk ga doen nu mijn dochters al mijn aandacht opeisen. Kom op, in de benen en dweil het huis grondig. In deze vuiligheid wil ik mijn dochters niet ontvangen.” Assepoester vraagt haar stiefmoeder vriendelijk of ze schone kleding mag pakken. “Je zus was toch duidelijk”, is haar reactie. Assepoester begint op haar zere knieën de grond grondig schoon te schrobben.</text:p>
      <text:p text:style-name="P68"/>
      <text:p text:style-name="P69">Het is al laat in de middag als ze bijna de vloer schoon heeft. Haar stiefmoeder vond namelijk steeds weer een plek wat nog beter geschrobd moest worden. De zussen komen nu pas uit hun nest en kijken met veel voldoening naar de schrobbende Assepoester. Ze vragen Assepoester beide een stoel neer te zetten zodat ze haar schoonmaak werk goed kunnen superviseren. De zussen zijn nog erger dan haar stiefmoeder. Telkens als ze denkt klaar te zijn vinden ze weer een plek. Altijd een plek waarbij ze haar van achter kunnen bekijken. En dat terwijl Assepoester zich al zo onbedekt voelt sinds haar billenkoek van gisteren.</text:p>
      <text:p text:style-name="P70"/>
      <text:p text:style-name="P71">Assepoester vindt het steeds minder erg haar dagen in de bijkeuken door te brengen. Als ze in huis is moet ze immers schoonmaken, koken, haar zussen en stiefmoeder wassen en alle andere huishoudelijke klusjes doen. Daarnaast is het huis meestal vol met mannen die haar alleen maar lastig vallen als ze in de buurt is. En haar stiefmoeder lacht alleen maar als dat gebeurt. Er is echter een moment wanneer ze zich weer echt thuis voelt in haar huis, als de bezoekers weg zijn en haar zussen en stiefmoeder op pad zijn. Natuurlijk moet ze dan weer schoonmaken. Maar zonder pottenkijkers heeft ze tenminste het huis voor zich alleen en kan ze wat uitrusten. Hiervoor krijgt ze echter steeds minder tijd. Het kost haar moeite haarzelf en haar enige kleding nog schoon en net te houden. Hetgeen sowieso niet prettig is omdat ze tijdens haar eigen verzorging geen vervangende kleding kan aantrekken. En deze verzorging is zeer gewenst op momenten dat haar zussen Assepoester als wasmand gebruiken. De plakkerige vlekken die ze dan voelt, en die ze overal in tegenkomt, maken dat ze zich vies voelt. Dit gevoel wordt nog versterkt door de toevalligheid dat haar zussen alleen haar bezoeken als ze zich aan het verschonen zich. Terwijl zij zich voor die omstandigheid schaamt lijken haar zussen juist geprikkeld te worden zich juist dan door haar te laten wassen.</text:p>
      <text:p text:style-name="P72"/>
      <text:p text:style-name="P73">Ondanks deze onprettige situaties hoopt Assepoester op een beter contact met haar stiefzusters. Soms lijkt dit te ontstaan. De zusters stellen immers vaak voor een spelletje te spelen, maar altijd spelletjes waar ze niet van houdt. <text:s/>Om haar zusters niet geheel teleur te stellen is ze wel bereid het spel te aanschouwen. Ook vergeeft ze haar zusjes de aanrakingen die bij het wassen per ongeluk gebeuren. Het zijn immers haar zussen.</text:p>
      <text:p text:style-name="P74"/>
      <text:p text:style-name="P75"/>
      <text:h text:style-name="Heading2" text:outline-level="2"><text:bookmark-start text:name="_Toc489630062"/>De prins<text:bookmark-end text:name="_Toc489630062"/></text:h>
      <text:p text:style-name="P76"/>
      <text:p text:style-name="P77">Assepoester is weer eens alleen thuis. Ze gebruikt dit moment om zichzelf eens goed op te knappen. Haar stiefmoeder en –zusters zijn naar een bal. De zusters waren vol verwachting daar een prins aan de haak te slaan. Wachtend op het drogen van haar kleding, hoort ze een koets arriveren. Nu al denkt ze. Door het bijkeukenraam ziet ze naast de koets van haar stiefmoeder een andere werkelijk sprookjesachtig mooie koets voor haar huis stoppen. Uit de koest stapt een prins aan beide armen omringd door haar stiefzusters. De prins geniet duidelijk van deze aandacht en laat ze door de zusters het huis in leiden gevold door een apetrotse moeder. Assepoester probeert het gezicht van de prins te zien maar deze wordt door de hoge kraag van zijn mantel niet prijs gegeven. Alleen de ogen van de prins kan ze waarnemen en ze schrikt als deze kort in haar richting draaien. Assepoester verschuilt zich betrapt achter de gordijnen. De prins schudt even zijn hoofd en knippert zijn ogen alsof hij een waanbeeld heeft gezien.</text:p>
      <text:p text:style-name="P78"/>
      <text:p text:style-name="P79">Assepoester wacht op haar drogende kleding. Ze hoort vanuit haar slaapkamer een gelach, gekreun en allerlei haar inmiddels zo bekende geluiden. Dan hoort ze voetstappen op de trap die via de keuken in haar richting komen. Ze wil zich verschuilen, maar voordat dit lukt gaat de bijkeukendeur open. Assepoester buigt geschrokken haar hoofd en sluit van schaamte haar ogen. De prins stapt binnen en kijkt haar aan. Dan gaan zijn ogen naar beneden en ontstaat er een brede glimlach op zijn gezicht. “Ik dacht, ik haal even iets lekkers op. En warempel ik heb het gevonden.” Assepoester verontschuldigt zich, nog steeds zonder op te kijken, voor haar hoedanigheid. De prins accepteert haar excuses niet en zegt; “deze onbeleefdheid kan ik niet over mijn kam laten gaan.” Assepoester valt op haar knieën en smeekt om vergiffenis. Ze belooft de prins alles te doen haar schuld in te lossen. Dan voelt ze een hand onder haar kin. Haar ogen zijn nog steeds gesloten als haar hoofd weer op kijkt. De hand van de prins streelt Assepoesters hoofd en met zijn duim en wijsvinger opent hij haar mond. Verwart en angstig houdt Assepoester de ogen gesloten als de prins zijn andere hand naar zijn gulp leidt. Dan stapt één van haar stiefzusters de bijkeuken binnen. De prins doet snel een stap terug. De verontwaardigde blik doet de prins de bijkeuken verlaten, waarop Assepoester alleen met haar stiefzuster achterblijft. “Zo, schijnheilig sletje, en ons maar doen geloven dat je zo’n heilig boontje bent. Ik denk dat moeder erg verrast zal zijn hierover te horen.” Geschrokken opent Assepoester haar ogen als haar zus kwaad de bijkeuken verlaat.</text:p>
      <text:p text:style-name="P80"/>
      <text:p text:style-name="P81">Assepoester heeft slecht geslapen. Ze verwacht elk moment op het matje te worden geroepen door haar stiefmoeder. Dagen lang blijft een confrontatie met haar moeder uit. Wel heeft ze nu veel meer last van haar zusters. Die accepteren na haar akkefietje niet meer zo snel een afwijzing. De ongelukjes, zoals ze eerst dacht dat ze waren, blijken nu bewust te zijn. Ze heeft geen keuze dan ze te accepteren. Om dit ongemak te ontlopen wast Assepoester zichzelf en haar kleding in het nabije beekje.<text:s/></text:p>
      <text:p text:style-name="P82"/>
      <text:p text:style-name="P83">De laatste keer dat ze daar kwam, had iemand een beker met heerlijke rode wijn achtergelaten. Deze aanlokkelijke drank kon Assepoester niet weerstaan. Na een heerlijke dronk viel ze aangeschoten en duizelig in een diepe slaap onder een grote eikenboom. Ze droomt van al het lekkers dat ze al zo lang moet missen. Taartjes, koekjes en ijsjes alles passeert de revue. Dan schiet weer het beeld van de schaamtevolle situatie met de prins in haar hoofd. Nu echter is de plaats niet de bijkeuken maar de plek bij het beekje. Weer voelt ze de vingers van de prins haar mond openen. Vanuit dit beeld schieten haar gedachten weer over naar het proeven van al dat zo gemiste lekkers. Ze beeldt zich in dat in haar geopend mond de kop van een heerlijk ijsje verdwijnt. Ze is verbaasd als ze geen kou maar juist warmte voelt. Dit weerhoudt haar niet het ijsje ten nuttigen. Vreemd is echter dat hoe ze ook zuigt en likt, ze proeft geen ijs. Ze wil daarom het ijsje niet langer, maar in haar droom is ze machteloos. <text:s/>Na een lang verzet, proeft ze eindelijk het ijsje. Het smaakt vreemd en onprettig en ze wordt daarop wakker. Naast haar ligt prachtige nieuwe kleding en mooie rode roos. <text:s/></text:p>
      <text:p text:style-name="P84"/>
      <text:p text:style-name="P85">Terwijl Assepoester zich in haar nieuwe outfit trekt, vindt ze een briefje in haar sok. De brief heeft een koninklijk stempel. De brief begint als volgt; “lief onbekend meisje, onze eerste ontmoeting is mij bij gebleven. Zie dit geschenk als een teken van mijn oprechte interesse voor jou. Nu de schuld is vereffend, hoop ik dat we elkaar bij mijn volgend bal opnieuw kunnen ontmoeten. Ik zal jou herkennen aan de kledij die ik je hierbij schenk, de prins.” Het onbegrip van Assepoester maakt snel plaats voor een warm gevoel. Ze besluit de kleding weer uit te trekken en verborgen te houden tot de dag van het bal.</text:p>
      <text:p text:style-name="P86"/>
      <text:p text:style-name="P87"/>
      <text:p text:style-name="P88"/>
      <text:p text:style-name="P89"/>
      <text:p text:style-name="P90"/>
      <text:p text:style-name="P91"/>
      <text:h text:style-name="Heading2" text:outline-level="2"><text:bookmark-start text:name="_Toc489630063"/>De boetedoening<text:bookmark-end text:name="_Toc489630063"/></text:h>
      <text:p text:style-name="P92"/>
      <text:p text:style-name="P93">Volkomen in haar sas keert Assepoester terug naar huis. Aangekomen wacht haar stiefmoeder haar op in de bijkeuken op. Haar blik is veelzeggend. “Eerst hoor ik over de schaamteloze wijze waarop je de prins van je zussen probeert te verleiden, en dan merk ik ook nog dat je stiekem het huis verlaat. Meisjes die dit soort gedrag vertonen verdienen een andere behandeling. Van nu af aan heet je niet meer Assepoester maar sletje. En op die manier zul je ook worden behandeld.” Vol schaamte buigt Assepoester haar hoofd als haar stiefmoeder de bijkeuken verlaat.</text:p>
      <text:p text:style-name="P94"/>
      <text:p text:style-name="P95">Het huis is weer vol met bezoekers. Assepoester heeft zich opgesloten in haar bijkeuken. Dan hoort ze ineens haar naam roepen. Dat wil zeggen; “sletje!!!!!”. Eerst reageert ze niet, maar als de stem van haar stiefmoeder dreigender begint te klinken weet ze dat zij bedoeld wordt. Aarzelend gaat ze de woonkamer in. Haar stiefmoeder en –zusters zijn omringd door zeker vijftien mannen, die verwachtingsvol op haar komst zitten te wachten. “Dit is nu het sletje, waar ik het over had.” De mannen kijken Assepoester indringend aan. “Laat zien hoe jij er bij vreemde prinsen bijloopt.” Assepoester kijkt haar stiefmoeder niet begrijpend aan. “Uit met die vodden, sletje!” Met zichtbare tegenzin ontdoet Assepoester zich van haar laatste schamele bedekking. De mannen reageren opgetogen en kunnen zich moeilijk bedwingen naar Assepoester toe te gaan. “Neem nu de houding aan die je bij prinsen ook aanneemt.” Assepoester valt op haar knieën en buigt haar hoofd, “Nee, nee zo heeft je zuster je niet aangetroffen”. Assepoester opent haar mond en heft haar hoofd. “Sluit nu je ogen”, sommeert stiefmoeder. Ze hoort iemand opstaan en in haar richting lopen. Dan is in de verte ineens het geraas van een aanstormende koets te horen. Ineens staan allerlei mensen snel op en maken zich uit de voeten. Assepoester durft echter haar ogen niet te openen. Dan wordt het stil, de buitendeur gaat open en in de inmiddels lege ruimte loopt iemand met ferme stappen naar binnen en gaat voor haar staan. Dan hoort ze de stem van haar vader; “Meisje, wat ben jij in hemelsnaam aan het doen?”.</text:p>
      <text:p text:style-name="P96"/>
      <text:p text:style-name="P97">Stiefmoeder en haar dochters hadden zich net op tijd uit de voeten weten te maken. Ze hebben de vader overtuigd van de schaamteloosheid van zijn dochter. Assepoester is al dagen zonder kleding en voedsel door haar vader opgesloten in kolenhok. Hoewel haar vader de stiefzusters opdracht had gegeven wel voor water te zorgen, hebben zij zich aan deze opdracht ontrokken. Haar dorst is niet meer te houden en ze kan niet anders dan haar vader ongehoorzaam te zijn en water uit de put te halen. Haar vader die verder op het land aan het werk is ziet hoe zijn knechten gestimuleerd door het schouwspel zich niet kunnen bedwingen en Assepoester belagen. Hij kan net op tijd ingrijpen. Wederom teleurgesteld in haar gedrag, besluit hij haar niet alleen op te sluiten maar ook vast te binden. Wel is hij zo begripvol voor haar noodgreep, om de plaats van de straf te verplaatsen naar een nieuwe slaapkamer die hij inmiddels voor haar heeft ingericht.</text:p>
      <text:p text:style-name="P98"/>
      <text:p text:style-name="P99">De zusters houden zich nu wel strikt aan de afspraak. Niet zozeer omdat ze medelijden met Assepoester hebben, maar meer omdat Assepoester nu totaal weerloos tegen hun handelingen is. Assepoester ervaart onder druk van haar zusters gevoelens die ze liever bij haar prins had ontdekt. Dit schaamtegevoel gebruiken haar zusters om hun handelingen te rechtvaardigen. Haar schuldgevoel wordt hierbij zo versterkt dat ze zich verplicht voelt alle wensen van haar zusters in te willigen. Haar zusters overtuigen Assepoester dat ze eigenlijk zelf deze vernedering wenst.</text:p>
      <text:p text:style-name="P100"/>
      <text:p text:style-name="P101"/>
      <text:p text:style-name="P102"/>
      <text:h text:style-name="Heading2" text:outline-level="2"><text:bookmark-start text:name="_Toc489630064"/>Het bal<text:bookmark-end text:name="_Toc489630064"/></text:h>
      <text:p text:style-name="P103"/>
      <text:p text:style-name="P104">Assepoesters vader is weer opgeroepen voor zijn werk. Op de dag dat hij het huis verlaat, besluit hij de straf van Assepoester op te heffen. Na zijn vertrek vreest Assepoester het ergste. Ze wacht in de bijkeuken op wat komen gaat. Dan hoort ze buiten een omroeper de mensen informeren over een groot koninklijk bal. De zusters en de stiefmoeder zijn zo bezig met de voorbereidingen hiervoor dat ze Assepoester met rust laten. <text:s/>Nadat Assepoester de dames heeft gewassen en gekleed, gaan ze zonder een woord te zeggen op weg naar het paleis. Dan is het de beurt aan Assepoester. Ze is de uitnodiging niet vergeten. Wederom wast ze zich in haar beekje en haalt de verborgen kleding te voorschijn.<text:s/></text:p>
      <text:p text:style-name="P105"/>
      <text:p text:style-name="P106">Dan bekruipt haar een beklemmend gevoel. Hoe komt ze naar het paleis. Teleurgesteld wil ze zich huiswaarts keren als ze ineens het gehinnik van een paard hoort. Bedachtzaam gaat ze richting de achter de bomen verscholen koets. Uit de bosjes komt ineens een koetsier te voorschijn. Haastig maakt hij zijn kleding in orde. Assepoester herkent de haar zo bekende vlekken op zijn hand en broek. Betrapt kijkt de koetsier mee, en reageert snel; “uwe maagdelijkheid, de prins verzoekt u gebruik te maken van zijn nederig vervoersmiddel, om hem zo te vergezellen op zijn bal.” Verheugd neemt Assepoester plaats in de koets, die haar rustig maar gedwee naar het koninklijk palies brengt.</text:p>
      <text:p text:style-name="P107"/>
      <text:p text:style-name="P108">Assepoester heeft op het bal allang haar stiefmoeder gezien. Luidruchtig als ze is. Toch heeft deze haar in de prachtige kleding die ze nu aan heeft totaal niet herkend. Assepoester is verder niet in haar geïnteresseerd maar probeert juist tevergeefs haar prins te vinden. <text:s/>Het enige wat haar opvalt is dat prinsessen af en aan in een kamer naast de balzaal worden gevoerd. Telkens teleurgesteld terugkerend. Dan vraagt ze een van de prinsessen wat zich in de kamer afspeelt. “Weet je dat niet, dat is de slaapkamer van de prins. Elk meisje dat wil, wordt door hem geïnspecteerd en uitgeprobeerd. Maar tot nu toe is geen enkel prinsesje door hem als nieuwe partner aangewezen. Dus als je niet voor niets je onbevlektheid wilt verliezen dan zou ik geen poging wagen.” Assepoester begrijpt niet veel van haar verhaal behalve dat de prins zich in de kamer bevindt. Ze besluit de kamer binnen te gaan.</text:p>
      <text:p text:style-name="P109"/>
      <text:p text:style-name="P110">De kamer blijkt een gang te zijn. In de gang is een wachter bezig met een prinses op een manier dat ze ongewild al zo vaak heeft gezien. De wachter lijkt Assepoester te herkennen. Direct stoppend met zijn bezigheden, begeeft hij zich naar haar toe en bekijkt het symbool waarmee haar jurk bedekt is. “Welkom, uwe hoogheid, de prins verwacht u.” Hij leidt vervolgens Assepoester de gang door, waarbij zij moeite doet zijn hoedanigheid niet te aanschouwen. <text:s/>De prinses nog liggend in de gevonden positie klaagt dat de wachter haar had beloofd toegang te geven in ruil voor haar diensten. “De prins is niet geïnteresseerd in bevlekte bloemen”, is zijn botte reactie.</text:p>
      <text:p text:style-name="P111"/>
      <text:p text:style-name="P112">De prins, met de rug naar Assepoester gedraaid, laat zich net door zijn dienstmeisjes een mantel aandoen. De dienstmeisjes zijn van boven ontkleed, hetgeen Assepoester doet kleuren. Aan de andere kant van de immense kamer is een groot koninklijk bed, dat net door een dienstmeisje wordt verschoond. Twee dienstmeisjes vergezellen Assepoester naar een apart gelegen badruimte. Assepoester heeft nog steeds de prins niet gezien. Zonder haar te vragen ontkleden de dienstmeisjes Assepoester routinematig. Nu wordt Assepoester zelf gewassen en verzorgd. Haar huid voelt prettig prikkelend door de zalf die is aangebracht. Ze wordt gehuld in een dunne doorzichtige japon, waarop ze terug wordt gebracht naar de prins. In tegenstelling tot haar dromen is de prins een lelijk gedrocht. Ze kan met moeite haar afschuw verbergen. Hoffelijk neemt ze plaats aan een ronde eettafel tegenover de prins.</text:p>
      <text:p text:style-name="P113"/>
      <text:p text:style-name="P114">De prins herkent haar en is blij dat ze toch is komen opdagen. Hij vraagt haar of ze zich wil laten testen op haar geschiktheid als zijn toekomstig metgezel. Assepoester reageert gereserveerd, haar interesse in de prins is totaal verdwenen en heeft plaats gemaakt voor een gevoel van walging. Toch besluit ze uit beleefdheid de maaltijd met de prins te delen. De gehele maaltijd kijkt de prins haar vol lustgevoelens aan. Elke zinspeling op een verdere kennismaking gaat Assepoester, getraind door al haar eerdere ervaringen met opdringende bezoekers, kundig uit de weg. De prins raakt langzamerhand zijn geduld kwijt. Maar probeert dit te verbergen. Als afsluiting van de maaltijd krijgt Assepoester een beker met rode wijn voorgeschoteld. <text:s/>Ze herkent de beker, het is dezelfde als die bij het beekje. De eerst prettige herinnering aan de ontmaskering bij het beekje is nu vervangen door een onprettig schaamtegevoel. De vieze smaak spoelt ze weg met het rode vocht. Een waas trekt voor haar ogen en ze duikelt in een diepe slaap.</text:p>
      <text:p text:style-name="P115"/>
      <text:p text:style-name="P116"/>
      <text:p text:style-name="P117"/>
      <text:h text:style-name="Heading2" text:outline-level="2"><text:bookmark-start text:name="_Toc489630065"/>Thuiskomst<text:bookmark-end text:name="_Toc489630065"/></text:h>
      <text:p text:style-name="P118"/>
      <text:p text:style-name="P119">De ontwaking is verwarrend. De mist in haar ogen verdwijnt langzaam als Assepoester merkt dat ze op een groot leeg bed ligt in een vreemd vertrek. Naast haar ligt de doorzichtige japon. In haar buik voelt ze een lichte trekkende pijn. Tussen haar benen voelt ze een plakkerige substantie. Ze doet de japon aan en gaat de kille kamer uit. Assepoester passeert een glunderende wachter als ze via de gang weer de balzaal betreedt. Als de wachter de deur opent staat ze recht tegenover haar zusters. Deze zijn ontzet en lichten direct hun stiefmoeder in. De stiefmoeder is buiten zinnen. De stiefmoeder scheurt de dunne japon van haar lijf en zegt dat ze zelf maar moet zorgen thuis te komen. Beschaamd rent Assepoester de drukke balzaal door waar ze door de gasten luidt wordt uitgelachen. Buiten gekomen gaat ze direct naar de koets die haar naar het paleis heeft gebracht. De koestier kijkt zeer geïnteresseerd naar de naar hem toe hollende Assepoester.<text:s/></text:p>
      <text:p text:style-name="P120"/>
      <text:p text:style-name="P121">Assepoester klimt de koets in en vraagt de koestier haar naar huis te brengen. De koetsier stapt echter van zijn stoeltje af en gaat ook de koets binnen. Met de vodden die ze nog in de koets heeft liggen bedekt Assepoester snel haar kuisheid. De koetsier wil Assepoester alleen brengen als hij haar nogmaals in vol ornaat mag aanschouwen. Zonder echt af te wachten tot Assepoester aan zijn verzoek voldoet drukt hij voorzichtig haar vodden weg. Assepoester kruipt beschaamd ineen, terwijl de koestier voor haar gaat staan. Ze sluit haar ogen en hoort een ritsend geluid. Ze hoort boven zich een zacht geschuif dat steeds sneller gaat. Dan hoort ze een kreun en voelt een haar bekende substantie over haar huid druppen. Terwijl ze nog steeds ingedoken wacht op wat nog komen gaat voelt ze dat de koets in beweging komt. Ze begrijpt dat ze naar huis wordt gebracht en kleedt zich met haar vodden aan. Ze valt in een diepe slaap.</text:p>
      <text:p text:style-name="P122"/>
      <text:p text:style-name="P123">Dan voelt Assepoester <text:s/>dat ze valt. <text:s/>In een oogopslag merkt ze dat ze door de koetsier uit de rijdende koest wordt gegooid. De harde val maakt dat haar vodden niet meer dan reepjes aan haar huid zijn. Ze loopt al schuilend achter de bomen door het bos naar huis. Uren later komt ze thuis aan. Het is stil in huis. Blijkbaar is haar stieffamilie nog niet gearriveerd. Ze besluit kleding van haar zusters te lenen. Als ze in de woonkamer komt heeft ze de schrik van haar leven. Luidt lachend wordt ze ontvangen door haar stiefmoeder vergezeld door een tiental ontklede mannen. Ze begrijpt dat ze voor haar misgedragingen een extreme boetedoening moet doen. Een boetedoening die de rest van haar leven zal bepalen. Eindelijk heeft haar stiefmoeder haar doel bereikt. De stieffamilie gaat met Assepoesters diensten niet alleen een toekomst vol verwennerij tegemoet maar ook één met genoeg inkomsten voor een weelderig leven.</text:p>
      <text:p text:style-name="P124"/>
      <text:p text:style-name="P125">Eind goed, al goed.</text:p>
      <text:p text:style-name="P126"/>
      <text:p text:style-name="P127"/>
      <text:h text:style-name="P128" text:outline-level="1"><text:bookmark-start text:name="_Toc489630066"/><text:soft-page-break/>De boeiende reis<text:bookmark-end text:name="_Toc489630066"/></text:h>
      <text:p text:style-name="P129"/>
      <text:h text:style-name="Heading2" text:outline-level="2"><text:bookmark-start text:name="_Toc489630067"/>Bestemming<text:bookmark-end text:name="_Toc489630067"/></text:h>
      <text:p text:style-name="P130"/>
      <text:p text:style-name="P131">Vertellen waar ik heen ga kan ik niet. Alleen beschrijven waar ik vandaan kom. Mijn reis ben ik al lang geleden aangegaan op zoek naar de waarheid. De waarheid over mijzelf. Mijn logboek startte vanaf de vorige bestemming, de sprookjeswereld. Vandaar leidde de weg naar de huidige realiteit. Soms zal ik samen met mijn levenspartner reizen. Soms splitsen onze wegen. Aan het eind zullen we volkomen samen zijn. Vrouwen eerst.</text:p>
      <text:p text:style-name="P132"/>
      <text:p text:style-name="P133">………………..</text:p>
      <text:p text:style-name="P134"/>
      <text:p text:style-name="P135">De zon schijnt prettig en licht. Emmy streelt haar bruin getinte huid. Een prikkelend laagje schuurt plezierig onder haar handen. Onwennig knijpt zij haar onbeschermde ogen. Vechtend tegen de verblindende schittering van het helderblauwe zeewater. Het zeeffijne spierwitte zand wordt geplet onder haar voeten. Voordat ze pijn ervaart, hebben haar gekoelde voeten de hitte getemd. Haar voeten verruilen het hete strandzand voor lauwe laddertreden. De smalle houten latten breken bijna haar ondervoet. Nog even en ze kan rusten. Al starend <text:s/>ervaart ze een paradijselijke rust. Een kalmte gedeeld door alle aanwezigen. Overgevend aan de sfeer doezelt ze in.</text:p>
      <text:p text:style-name="P136"/>
      <text:p text:style-name="P137">……….</text:p>
      <text:p text:style-name="P138"/>
      <text:p text:style-name="P139">De spanning is van haar gezicht af te lezen. Het schuldgevoel, de bezorgdheid, de angst om straks te missen maken dat ze twijfelt. Het zoveelste gesprek over de voors en tegens wordt gevoerd. Nu zijn de tegens onoverkoombaar. Dus blijft niets anders dan het stellen van het gedwongen feit; “Er is geen weg meer terug”. Een feit bevestigt door het begroetende getoeter dat ons steegje indreunt. De auto die de dames naar het vliegveld zal brengen. <text:s/>“Ach”, is de passerende gedachte in onze hoofden, “als ze maar in de lucht zijn”.</text:p>
      <text:p text:style-name="P140"/>
      <text:p text:style-name="P141">Haar geliefden verdwijnen wuifend uit haar zicht. Emmy denkt terug aan het gesprek dat tot dit alles heeft geleid. De gezellige middag samen naar een zwemplas. Wij, de mannen, die opscheppen over onze kwaliteiten als ouder. Het stoutmoedige voorstel de zorg voor onze kinderen exclusief aan ons over te laten. Het plan om de vrouwen op reis te sturen. Toen had ze haar bedenkingen. Nu weet ze het zeker. Het zal haar niet gemakkelijk vallen. Evita lijkt deze gevoelens niet te delen. Goed, zij heeft deze trip al eens eerder ondernomen. Dat maakt Emmy terughoudend haar reservering te uiten. Haar energie wendt ze aan de zinloze wemeling te doorbreken. De vakantie wordt hoe dan ook een succes.</text:p>
      <text:p text:style-name="P142"/>
      <text:p text:style-name="P143">……..</text:p>
      <text:p text:style-name="P144"/>
      <text:p text:style-name="P145">Haar zintuigen registeren de warmte om haar heen. Rood licht dringt haar gewaarwording binnen. Ze ontwaakt uit een klein slaapje. Met het openen van haar ogen ontdekt ze de wekkende reden. Pesterig druppelt Evita het frisse smeltvocht van een soft-ijsje op haar verhitte navel. Deze keer leidt de prikkeling tot een beduusd opspringen. <text:s/>De ondeugende glimlach van Evita wordt gedeeld. Het heerlijke presentje neemt ze dankbaar aan.</text:p>
      <text:p text:style-name="P146"/>
      <text:p text:style-name="P147">Zonder een woord te wisselen kijkt het duo elkaar genietend aan. Het smelten van de koude romige massa in hun warme geopende monden. Evita neemt haar ijsje met steeds meer passie tot zich. Het witte bergje op haar hoorntje wordt met lange rollingen van haar tong omzichtig geaaid. Slurpend wordt het zachte goedje naar binnen gezogen. Een ingetogen kreunend genot volgt. Deze overdrijving doen de wenkbrauwen van Emmy Emmy <text:s/>fronsen. Met een korte zijwaartse beweging geven de ogen van Evita antwoord. Opzichtig draait Emmy om. Een grote negroïde man staart genoegzaam het tweetal aan. De glimlach van Evita is weer ondeugend. “Nee hé!”. De wenkbrauwen trekken omhoog, de ogen verwijden als Evita bevestigend knikt.</text:p>
      <text:p text:style-name="P148"/>
      <text:p text:style-name="P149">De man is ondertussen het duo genaderd. In tegenstelling tot de plaatselijke bevolking is hij groot en donkerzwart. Zo donker dat nauwelijks een profiel in zijn gelaat is te herkennen. Het inktzwart wordt alleen onderbroken door een beschilderd tangaslipje. Een gebloemd kledingstuk dat de decadentie van de persoon benadrukt. “Zo dames, alleen hier?”. De verre van originele openingszin weerspiegelt de simpelheid. Overmoedig worden de dames zonder schroom van top tot teen geïnspecteerd. Emmy weet wel raad met deze ongeplaatste zelfzekerheid Emmy wijst de aap koel en denigrerend af. De kaarten zijn snel geschud. De man richt zich alleen nog tot Evita. Emmy excuseert zich en hangt achterover. In het katoen dat haar een moment eerder al zo heerlijk in dromenland wiegde.</text:p>
      <text:p text:style-name="P150"/>
      <text:p text:style-name="P151">……….</text:p>
      <text:h text:style-name="P152" text:outline-level="2"><text:bookmark-start text:name="_Toc489630068"/><text:soft-page-break/>Doezelig<text:bookmark-end text:name="_Toc489630068"/></text:h>
      <text:p text:style-name="P153"/>
      <text:p text:style-name="P154">Sanda, blijkt de naam van de licht debiele man. Emmy leert dat de neger een indiaan is. Een oerwoudbewoner die van tijd tot tijd de beschaving opzoekt. De harstocht waarmee Evita vertelt vinden geen gehoor. Emmy wil echter Evita niet afvallen. Zoals ze nooit iemand kan afvallen. Zo komt het dat ze wordt overgehaald naar het hart van het vakantie-eiland te reizen. Het woongebied van de repi-indianen. Onderweg werpt Evita zich op als geroutineerd reisleidster. In een paar korte gesprekken met Sanda is ze blijkbaar goed geïnformeerd. Het is Evita die als eerste het geboortedorp opmerkt.<text:s/></text:p>
      <text:p text:style-name="P155"/>
      <text:p text:style-name="P156">Het dorp is zoals Emmy zich had voorgesteld. Rieten hutjes op hoge palen. Gelegen op een kleine open plek aan de verder dicht begroeide oevers van de rivier. Een lange houten steiger is de uitnodigende plek om aan te leggen. Hun komst is niet onopgemerkt gebleven. Een groot aantal repi-indianen staat het drietal verwachtingsvol op te wachten. De bezoekers zien alleen de mannelijke bewoners van het dorp. Ze vormen een gang waardoor de bezoekers als vorsten naar de ontvangstruimte worden geleid. Een grote ronde zandplaats deels overdekt door een rieten puntdak.<text:s/></text:p>
      <text:p text:style-name="P157"/>
      <text:p text:style-name="P158">Emmy kijkt de indianen geïnteresseerd en vriendelijk aan. De tijgervellen broekjes van de familieleden zijn een stuk modieuzer dan het zonnebloemen vod van Sanda. “Wat maakt de westerse samenleving veel kapot”, denkt ze als ze de broekjes bestudeert. <text:s/>De broekjes die niet meer zijn dan een lapje voor en een touwtje om het middel. Deze bewustwording laat haar vooruit kijken. Vooruitkijken om de broekjes van opzij te zien. Ergens hopen dat een indiaan door zijn beweging…….. <text:s/>Even erbij blijven! Ze richt zich tot Evita die zichtbaar geniet. Het ontvangst is dan ook bijzonder hartelijk.<text:s/></text:p>
      <text:p text:style-name="P159"/>
      <text:p text:style-name="P160">Sanda blijkt de enige man die engels spreekt. Daarom staat hij in het midden van de ontvangstruimte de menigte toe te spreken. Aandachtig luisterend zitten de dames naast hem op de mulle zandgrond. De indianen zitten in een grote cirkel om het drietal heen. Opkijkend valt Emmy weer op hoe groot Sanda is. Tussen zijn familieleden valt hij als zodanig niet op. Het zijn allen grote, sterk ogend, pikzwarte mannen. Zo donker dat Emmy nog steeds geen duidelijke tronie kan opmaken.<text:s/></text:p>
      <text:p text:style-name="P161"/>
      <text:p text:style-name="P162">De avond begint in te vallen en het wordt snel donker. De eerder nauwelijks opgemerkte vreugde vuren geven nu het enige licht in de duisternis. Grote groene bladeren met duimdikke nerven produceren meer warmte, meer rook. De volle maan wordt door de opstijgende dampen weggenomen. Een zeer sterke zoetsappige geur vult de lucht. Een aroma dat aan de mysterieuze sfeer een berustend, rustgevend maar vooral bedwelmende effect toevoegt. <text:s/>Het opzwellende ritme van de trommellende bongo´s wordt aan de zwoel dansende indianen opgelegd. De dames worden gefascineerd en betoverd door de bewegingen van al die duistere silhouetten. Zwetende lichamen die niet meer zijn te onderscheiden. Alleen een soep van donkere handen, voeten, benen en heupen die glimmend in het duister van de nacht kronkelen. Zich dichter en dichter naar de gasten bewegen. Emmy zoekt contact met Sanda of Evita. Beseft verbaasd dat ze alleen is. <text:s/>Hulpeloos zoekt ze steun. De immer naderende lijven, met hun flapperende lapjes, nemen het laatste licht weg. Nee, nee kermt zich zachtjes in zichzelf.</text:p>
      <text:p text:style-name="P163"/>
      <text:p text:style-name="P164">…………….</text:p>
      <text:p text:style-name="P165"/>
      <text:p text:style-name="P166">“Wat is er?”, vraagt Evita met haar hand zachtjes de hangmat schuddend; “een opwindend droompje?”. Zweetdruppeltjes versterken de prikkende stralen van de zon. Emmy voelt zich nat. Plakkerig nat. Het besef van de realiteit doet haar goed. Het effect van de langzaam verdwijnende schemerzone doet haar blozen. Niet het zweet dat de warmte van haar droom verraad. Maar het koele vocht in haar kruis dat onweerlegbaar haar opwinding bewijst. Vertraagd door de felle zon wordt langzaam de troebele aanblik van Evita scherper. De aanwezigheid van Sanda, meekijkend over Evita schouder, versterkt de schaamte. Al gauw komt de bezorgdheid. Haar slipje zo gericht in hun richting laat toch niet de erotiek van haar middagslaapje zien?<text:s/></text:p>
      <text:p text:style-name="P167"/>
      <text:p text:style-name="P168">“Goh, jij was even diep weg!”. Emmy is gerustgesteld. De gezichten verraden geen ontdekking van haar intieme belevenis. Zonder verdere uitleg leunt Emmy naar voren om te gaan zitten in haar inmiddels niet meer zo comfortabele slaapplaats. Belangstellend kijkt ze het tweetal aan. Alsof ze een verklaring verlangt van hun samenzijn. “We waren in een diep gesprek toen het Sanda opviel dat je in een diepe slaap was gedompeld. Toen we dichter bij kwamen hoorden we je zachtjes kermen en namen aan dat je niet prettig droomde.” <text:s/>Opgelucht wil Emmy een zucht slaken als ze ineens een ingeving krijgt. Sanda! “Hoe kan ik in mijn droom Sanda al kennen, we zijn nog niet voorgesteld”, denkt ze verbijsterd. Waarschijnlijk heeft ze een deel van het gesprek gehoord voordat ze echt weg is gezakt.</text:p>
      <text:p text:style-name="P169"/>
      <text:p text:style-name="P170"/>
      <text:p text:style-name="P171"/>
      <text:h text:style-name="Heading2" text:outline-level="2"><text:bookmark-start text:name="_Toc489630069"/>Neger<text:bookmark-end text:name="_Toc489630069"/></text:h>
      <text:p text:style-name="P172"/>
      <text:p text:style-name="P173">Als Sanda weg is, kan Emmy het niet nalaten Evita ter verantwoording te roepen. “Wat heb je toch met die Sanda?”. “Ach gewoon even ouwehoeren, even opnaaien, eventjes spelen”, reageert Evita geruststellend. “Maar waarom met die simpele ziel? Hij is volgens mij in geringe mate geestelijk gehandicapt”. “Simpel qua geest, maar zijn lichaam mag er toch zijn.” Emmy wil dit niet beamen, maar herinnert zich haar droom. Ze kan niet ontkennen. Ze wil ontkennen. Niet toegeven aan haar lichamelijke lust. Zonder geestelijke aantrekking mag ze niet. Kan ze niet overgeven aan………</text:p>
      <text:p text:style-name="P174"/>
      <text:p text:style-name="P175">De avond is zwoel. Emmy kan niet slapen in het klamme bed. Ze besluit haar beproefde slaapplek te proberen. Al hangend aan de touwen schuift ze haar lichaam in een prettige positie. Het zachte ziebriesje is niet verkoelend genoeg. Haar bloesje gaat uit evenals haar rokje. “Ja dit is precies goed”, denkt ze als ze opnieuw een slaaphouding aanneemt. De wind neemt haar geest al spoedig mee naar de dromenwereld.</text:p>
      <text:p text:style-name="P176"/>
      <text:p text:style-name="P177">…………</text:p>
      <text:p text:style-name="P178"/>
      <text:p text:style-name="P179">Ze voelt een hand naar haar reiken. Ze verwacht er meer en meer. De hand is verrassend zacht. Het is de hand van Evita. Evita versluierd door de naderende indianen en de verduisterende rookwolken. De indianen lijken ineens een stuk verder weg. Een verklaring voor dit alles zoekend vraagt ze. “Voel jij je ook zo verdoofd?” Met haar geneeskundige kennis verklaart Evita de bedwelming. Cocaine in de cocabladeren heeft een verdovend effect. En een lust opwekkend effect voegt ze lachend toe.<text:s/></text:p>
      <text:p text:style-name="P180"/>
      <text:p text:style-name="P181">Even plots als de sfeer ontstond verdwijnt hij weer. Sanda slaakt een onverstaanbare kreet. “De goden zijn <text:s/>nu gunstig gestemd”, legt Evita uit; “we kunnen ons nu verzorgen”. Al deze kennis over een vreemd volk verbaast Emmy en ze kan zich niet bedwingen Evita uit te horen. “Hoe weet je dit toch allemaal?”. “Kun je een geheimpje bewaren. Twee jaar geleden ben ik hier ook al geweest. Toen al heb ik Sanda leren kennen. Je hebt ook al wel gemerkt dat deze kennismaking niet tot praten beperkt is gebleven.” Emmy is maar deels geschokt, ergens had ze altijd wel verwacht dat Evita tot ontrouw in staat zou zijn. In Evita´s wereld staan Evita´s wensen immers centraal. Vol trots kon ze over haar eerste verovering, haar huidige man, praten. Zonder schaamte meldde ze haar eerste intieme samenzijn met hem. Details als de vele handdoeken die daarbij benodigd waren.<text:s/></text:p>
      <text:p text:style-name="P182"/>
      <text:p text:style-name="P183">De wens door een grote aantrekkelijke neger genomen te worden verbaast Emmy in het geheel niet. “Ik zie dat je wel begrijpt waarom ik me tot hem voel aangetrokken. Niets geestelijks, puur lichamelijks.” De invloed van de gerookte drugs laten Emmy de waarheid zeggen. “Dus dan begrijp je ook wel dat toen ik hem weer zag ik toch eventjes weer kennis wilde maken. En inderdaad, ik ben de eerste keer ook al mee geweest naar zijn dorp. Een belevenis die ik jou niet wilde onthouden”. <text:s/></text:p>
      <text:p text:style-name="P184"/>
      <text:p text:style-name="P185">Tijdens dit gesprek zijn de dames van de ontvangstruimte begeleid naar de hoger gelegen provisorische wasruimtes. Geheel in het donker, de vuren staan te ver weg, maar daardoor gelukkig ongezien, nemen de dames een verfrissend bad. Het water streelt de vette huiden. Weer dreigt Emmy in bedwelming te geraken als Evita haar verhaal vervolgt. “Deze indianenstam is heel uniek. Behalve Sanda is nog geen van de mannen ooit in de beschaafde wereld geweest.” “Waar zijn dan de vrouwen en kinderen?”, is de brandende vraag op Emmy´s lippen. Een ondeugende lachje volgt. Een verdere <text:s/>uitleg wordt onderbroken door de stem van Sanda. “Het is zover!” Vragend kijkt Emmy Evita aan. “Nu krijg je antwoord op je vraag. De repi-stam heeft geen vrouwen. Eens in de zoveel tijd lokt een repi-indiaan een vrouwtje naar zijn dorp, voor een rituele bevruchting door de stam. De vrouw wordt vervolgens verstoten. Alleen een jongetje wordt als hij de leeftijd van 18 jaar door de stam opgezocht en opgenomen. Zo kan de stam alleen uit mannen bestaan. Natuurlijk is in de moderne tijd dit niet meer mogelijk waardoor de stam gedoemd is uit te sterven”.</text:p>
      <text:p text:style-name="P186"/>
      <text:h text:style-name="P187" text:outline-level="2"><text:bookmark-start text:name="_Toc489630070"/><text:soft-page-break/>Rituelen<text:bookmark-end text:name="_Toc489630070"/></text:h>
      <text:p text:style-name="P188"/>
      <text:p text:style-name="P189">Na deze uitleg over de stamgewoontes verlaat Evita het bad. Emmy kan dit alleen horen. Het is te donker om verder iets te zien. Dan een korte flits, een lucifer ontsteekt. De kaars die daardoor ontbrandt laat het totaal ontklede lichaam van Evita zien. Het water glijdt van haar nog vette huid. Vanuit de veilige wastoren klimt ze in het licht van de vreugde vuren naar beneden. Vanuit haar bad kan Emmy alles gadeslaan. De indianen wachten al dansend de komst van Evita af. Plichtmatig doet ze haar armen boven haar hoofd. Twee grote zwarte handen verbinden de polsen met een stuk liaan. Vaag ziet Emmy dat twee indianen ook lianen aan haar enkels aanbrengen. Dan dragen de indianen haar boven hun hoofden naar het midden van de vreugde vuren. Het licht van de vuren splijten haar lichaam. Een onzichtbare duistere achterkant. Een door rode gloed omgevende voorkant. Vele zwarte handen betasten haar. Stevige handen knijpen knotjes in haar haren. De borsten zijn totaal bedekt door de donkere klauwen. Tussen de masserende verschijnen de harde helderrode tepels. Haar mond is gevuld met forse duimen die haar binnenste ruw verkennen. Alleen haar poesje blijft onaangetast.</text:p>
      <text:p text:style-name="P190"/>
      <text:p text:style-name="P191">Door een bliksemshift getroffen voelt Emmy weer die bekende vloeistof in haar poesje. “Ik droom!”, realiseert ze zich. Wakker worden is niet wat ze wil. De opwinding richt haar aandacht weer op Evita.<text:s/></text:p>
      <text:p text:style-name="P192"/>
      <text:p text:style-name="P193">Evita wordt gelegd in een spinsel van touwen. Een meter boven de grond kan ze zo vrij rondzweven. De lianen aan voeten en handen worden verbonden met het web. Ze kan zich niet bewegen. Deze beklemming is te bedreigend. Haar wulpse heupbewegingen worden door de lianen gedempt. Deze nieuwe houding geeft de belagers de ruimte. De ruimte haar naaktheid volledig te verkennen. De opzwepende atmosfeer wordt krachtiger. De handelingen van de hitsige mannen eveneens. Deze ontwikkeling vergroot de benauwing alsmede haar verzet. De strakke boeien probeert ze met overtuiging te breken. Een poging die door de vele machtige handen wordt verijdeld. De grote sterke gehavende duimen <text:s/>belemmeren haar hulpkreet.<text:s/></text:p>
      <text:p text:style-name="P194"/>
      <text:p text:style-name="P195">Een uit hout gefabriceerde mondklem neemt de taak van de ruw gehavende werkduimen over. Het bit omhult haar tanden en laat haar mond deels openstaan. De lianen aan haar enkels worden verder uit elkaar getrokken. Emmy is niet naïef, ze weet waar dit naar leidt. Vol inleving neemt ze het schouwspel dat volgt waar. Het is zo dubbel. Aan de ene kant is ze blij veilig in haar bad te liggen. Aan de andere kant……..</text:p>
      <text:p text:style-name="P196"/>
      <text:p text:style-name="P197">De besmeurde Evita is verlaten. Uitgeleefd en uitgeput hangt ze bijna levensloos in de lianen. Wachtend op de ochtend. Wachtend op haar verlossing. Nee, dit is niet het beeld wat de gewenste bevrediging brengt. Door de sluimering van de vuurdampen staat ineens Sanda voor haar. Hij wordt niet meer beoordeeld op zijn idiotie. Een mannelijkheid, fier opgericht, is de maatstaaf. Ze stoort zich aan haar eigen controle over de droom. Geërgerd ligt ze onhandig in de touwen bedoeld voor Evita. Dit keer met hinderlijk ondergoed aan. Ze draait een kwartslag zodat Sanda vrij spel heeft. Het splinterdunne broekje is geen partij voor de hitsige aap. Sanda geeft niet de verwachte beloning voor haar hersenspinsels. Zoals de andere familieleden is hij gericht op zijn daad. Deze teleurstelling laat Emmy naar diepere slaapwerelden brengen. De werelden waar zij niet meer de scepter zwaait.</text:p>
      <text:p text:style-name="P198"/>
      <text:p text:style-name="P199">……….</text:p>
      <text:p text:style-name="P200"/>
      <text:p text:style-name="P201">De rustgevende geluiden van de ontwakende natuur doen Emmy in de realiteit terugkeren. Kalm neemt ze de steeds duidelijke wordende omgeving waar. Ze voelt het jeukende katoen aan haar blote lichaam. Tot haar schrik voelt ze dit ook aan haar billen. “Oeps”, denkt ze, “ik had het gisteren wel heel warm.”<text:s/></text:p>
      <text:p text:style-name="P202"/>
      <text:p text:style-name="P203">………………</text:p>
      <text:p text:style-name="P204"/>
      <text:h text:style-name="P205" text:outline-level="2"><text:bookmark-start text:name="_Toc489630071"/><text:soft-page-break/>Openbaring<text:bookmark-end text:name="_Toc489630071"/></text:h>
      <text:p text:style-name="P206"/>
      <text:p text:style-name="P207">De lezer vraagt ze misschien af hoe ik zelf de vakantie van Emmy heb doorgebracht. Tja, de drukte die de zorg voor de kinderen met zich meebrengt had ik danig onderschat. Gelukkig sprong de omgeving van tijd tot tijd bij. Volop kan ik van het korte moment van vrijheid genieten. Het zwemfeestje van Evelien, een vriendinnetje van mijn kinderen, leek een welkome afwisseling. Ik verwachtte een kordon aan huismoeders die zonder moeite ook op mijn kinderen konden letten. Dat pakte helaas anders uit. Leonara, de moeder van Evelien, had alleen een vriendin van haar gevraagd. Barbara, zou mee helpen oppassen. Het verwachte luiermiddagje werd dus een ware veldslag op mijn conditie. Continu werd ik door de kinderen gebruikt als duikplank en praatpaal.<text:s/></text:p>
      <text:p text:style-name="P208"/>
      <text:p text:style-name="P209">Eindelijk kwam de verlossende mededeling. “Het partijtje is over!.” De wilde horde kinderen worden snel en behendig door de teruggekeerde huismoeders afgevoerd. <text:s/>Mijn lot enigszins begrijpend biedt een buurvouw aan naast Evelien, mijn kinderen mee te nemen. Even genieten van de rust en ontspanning van het warme water. Op zich best een goed idee. Een zwembad af te huren naast de gangbare openingstijden. Wiegend op de eigen gemaakte golven, probeer ik mijn drukke geest te bedaren.<text:s/></text:p>
      <text:p text:style-name="P210"/>
      <text:p text:style-name="P211">Zonder het lawaai van de jeugd, kan ik de voetstappen van Barbara en Leonara, horen. Ze ruimen plichtmatig de troep op. Terwijl ik beide zo gadesla valt me weer op hoe appetijtelijk de dames eigenlijk zijn. Ik hoor het pletsen van het gemorste zwemwater aan de rand van het bad. Het contact tussen hun gladde voethuid en het geperste water windt me op. Ik wil me gaan verliezen in een erotische fantasie als ik bedenk dat ik daarvoor niet het geschikte zwemgoed aan heb. Het strakke elastische sportzwembroek kan de gevolgen van mijn gedachten niet verhullen. Spijt van mijn keuze besluit ik mijn gedachten te remmen.</text:p>
      <text:p text:style-name="P212"/>
      <text:p text:style-name="P213">Teleurgesteld in mijzelf verlaat ik na enige tijd het steeds kouder aanvoelende water. De dames zijn inmiddels verdwenen. De kleedhokjes zijn zakelijk kil. Toch schieten de beelden van Leonara en Barbara mijn hoofd binnen. Leonara in een sportief blauw badpak, Barbara in een strakke gele bikini. De aandacht richt ze meer en meer op het beeld van Barbara. Van op zij zie ik de mooie lijnen van haar lichaam door de gele vlakken <text:s/>geaccentueerd. Ik volg de lijnen in mijn gedachten. Haar hoofd overslaand begin ik met haar borsten. Ze zijn zeer rond en vullen de bikini precies. Het handformaat waar ik liefhebber van ben. <text:s/>Haar heupen en achterste kunnen wat mij betreft worden beschouwd als het perfecte vrouwenlichaam. Machtig over mijn gedachten laat ik Barbara draaien. Van voren gezien lijken de proporties nog nadrukkelijker.<text:s/></text:p>
      <text:p text:style-name="P214"/>
      <text:p text:style-name="P215">Dan twijfel ik even over wat er nu komen gaat. Niet te snel! Het bikinibroekje, bezig was te zakken, gaat terug op de oude plaats. Het gemis van een partner laat echter een rustige opbouw niet toe. De spanning wordt te groot en ik dwing in mijn gedachten Barbara op haar knieën Mijn handen grijpen haar hoofd. Mijn vingers zijn stevig omringd door haar lange blonde haren. Ik kijk vertederd naar het opgerichte hoofdje. Haar ogen zijn als een barbiepopje opgemaakt en doen me smelten. Haar mondje is gewillig. De daad die volgt is noodzakelijk.<text:s/></text:p>
      <text:p text:style-name="P216"/>
      <text:p text:style-name="P217">…………</text:p>
      <text:p text:style-name="P218"/>
      <text:p text:style-name="P219">De poging om de avond te herinneren wordt verstoord door de aankomst van Evita. Even wil ze snel in beweging komen. Het is te laat. Ze berust in haar situatie. De verwachte reactie blijft niet uit. “Wat een lef om zo in je hangmat te liggen. Je hebt gisteren zelf gemerkt hoe bronzig hier het manvolk is.” Emmy deelt Evita´s terechte bezorgdheid. Het was niet haar bedoeling, maar de wijn, de sterke lokale wijn, heeft de helderheid van haar geest ondermijnd. Evita begrijpt. Ook zij heeft het narcotiserende effect van de wijn ervaren.</text:p>
      <text:p text:style-name="P220"/>
      <text:p text:style-name="P221">……………………..</text:p>
      <text:p text:style-name="P222"/>
      <text:p text:style-name="P223">Routinematig verwijder ik elk bewijs van mijn ondeugd. Opgelucht verlaat ik de kleedhokjes, als tegelijkertijd ook Leonara en Barbara hun opwachting maken. Even voel ik me opgelaten maar al snel kletsen we honderduit in de nabij gelegen pub. Bijkomend van de hektik van daarvoor. In het gesprek word ik overmand door een bekend instinctief gevoel. Een gevoel bij de dames apart ervaren. Nooit gezamenlijk. Het gevoel dat me duidelijk maakt dat de interesse niet eenzijdig is. Er is nog meer. De manier waarop ze elkaar bejegenen. De stoute blikken naar elkaar.</text:p>
      <text:p text:style-name="P224"/>
      <text:p text:style-name="P225">De kinderen slapen. Uitgeput door de inspanningen van de dag. Gek genoeg ben ik nog kwiek. Gewapend met de babyfoon besluit ik een ommetje te maken. Onbewust word ik geleid naar het huis van Barbara. Die middag vertelde ze waar ze woonde. Het bleek niet ver. Het ongemak van de bewustwording maakt snel plaats door een interesse opwekkende ontdekking. In het huis van Barbara zie ik Leonara de gordijnen dichten. De bedoeling van Leonara lukt niet geheel. Een dunne spleet blijft bestaan. Mijn nieuwsgierig is niet te bedwingen. Ik neem een positie in die me in staat stelt het gebeuren te aanschouwen. Mijn voorzichtigheid vertraagt het gluren naar de onzorgvuldig verdoezelde gebeurtenissen. Leonara ligt poedelnaakt op Barbara.<text:s/></text:p>
      <text:p text:style-name="P226"/>
      <text:p text:style-name="P227">…………………………….</text:p>
      <text:p text:style-name="P228"/>
      <text:p text:style-name="P229">Het vaste ontbijt ritueel doet alle zorgen en belevenissen van de nacht vergeten. Ontspannen volgen de dames de perikelen op het eiwitte strand, de opzwellende golven van de ruwe zee, de verre rust aan de horizon die nog steeds rozig gekleurd is. “Shit, daar heb je die idioot weer”. Evita wijst en na even zoeken ziet Emmy Sanda <text:s/>naderen. De nacht komt even in mijn geest terug. De aanblik van de aap van Jongo, zoals Evita hem noemt, laat geen enkele prikkeling herreizen. Fantasie en werkelijkheid. Ze staan soms ver van elkaar af. Of? “Ik was je nog vergeten dit terug te geven”, is het vervelende gemompel van Sanda. De ogen van de vrouwen puilen uit als een bekend slipje op tafel wordt gelegd.</text:p>
      <text:p text:style-name="P230"/>
      <text:p text:style-name="P231">………………………<text:s/></text:p>
      <text:p text:style-name="P232"/>
      <text:p text:style-name="P233"/>
      <text:h text:style-name="Heading2" text:outline-level="2"><text:bookmark-start text:name="_Toc489630072"/>De reactie<text:bookmark-end text:name="_Toc489630072"/></text:h>
      <text:p text:style-name="P234"/>
      <text:p text:style-name="P235">De tape die Emmy en ik bij tijd en wijle aan het volspelen zijn, gaat gehaast in mijn camera. Vlug check ik de batterijen. Met grote spoed terug naar de plek des heils. De positie van de stoeipoezen is nauwelijks veranderd. Nog steeds is Leonara boven. Nog steeds geeft de opening niet genoeg zicht op delen van het schouwspel die me het meest boeien. Leonara is met haar rug naar me toegekeerd. Barbara deels bedekt door een satijnen laken. De camera legt onbetwistbaar vast hoe Leonara haar onderlichaam over Barbara schuift.<text:s/></text:p>
      <text:p text:style-name="P236"/>
      <text:p text:style-name="P237">Langzaam schuift ze verder en verder naar boven. De zo lekker uitziende borsten van Barbara worden zichtbaar. Het hoofd van Barbara is geheel opgenomen door de heupen van Leonara. Haar bewegingen worden feller en feller. De voldoening wordt gesymboliseerd door de juichbeweging die haar armen in de lucht maken. Dan staat ze ineens op. Het onverwachte doet me terugdeinzen. Het gekraak van het aardewerk dat onder mijn voeten verpulverd wordt versteend me. Mijn ogen willen zich van het gebeuren onder me richten op het raam. Leonara kijkt me recht in het gezicht aan. Hevig geschrokken. Ze sluit pardoes het venster naar hun samenzijn.</text:p>
      <text:p text:style-name="P238"/>
      <text:p text:style-name="P239">………………..</text:p>
      <text:p text:style-name="P240"/>
      <text:p text:style-name="P241">Evita begrijpt niet, Emmy wel. De openbaring, het inzicht dat haar vriendin niet zo preuts en wereldvreemd is als Evita dacht. Haar houding veranderd als sneeuw voor de zon. Ze voelt zich bedrogen. Neemt het koene besluit zich niet meer te laten misleiden. De bedrogen Evita wil Emmy dit alles laten voelen. <text:s/></text:p>
      <text:p text:style-name="P242"/>
      <text:p text:style-name="P243"><text:s/>Sanda gebruikt zijn bewijs van verovering om opdringerig aan tafel plaats te nemen. Zonder enige vorm van beleefdheid oppert hij brutaal aan Evita ook eens van zijn diensten gebruik te maken. Kleiner en kleiner lijkt Emmy te worden als haar schaamte protestloos de oneerbare voorstellen aanhoort. In zichzelf gekeerd heeft ze geen contact met het gesprek aan tafel. Pas als het tevreden haantje de aftocht blaast, lijkt ze uit haar roes te komen.</text:p>
      <text:p text:style-name="P244"><text:s/></text:p>
      <text:p text:style-name="P245">“Ongelooflijke schijnheil!. Tegen mij het heilig boontje spelen. En ondertussen zelf de bloemetjes buiten zetten.” Emmy begrijpt de kritiek en laat gewillig de schelddorades over zich heen komen.<text:s/></text:p>
      <text:p text:style-name="P246"/>
      <text:p text:style-name="P247">De avond brengt de onderlinge verstandhouding op een hanteerbaar peil. Weer vloeit de wijn kostelijk. Niet omdat Emmy dat wil. Ze durft niet nee te zeggen. Tegen Evita die niet nog meer bedrog en schijnheiligheid moet voelen. Ze laat zich meevoeren. Evita doet actief mee. Nog steeds gekwetst wil ze de gedane belofte testen. Testen of de ware Emmy opduikt.<text:s/></text:p>
      <text:p text:style-name="P248"/>
      <text:p text:style-name="P249">De komst van Sanda tijdens het oprukken van de nacht, verbaast Emmy. Haar herinnering aan het heftige ontbijt doen haar beseffen dat dit samenzijn is besproken. Nu protesteren zou als schijnheilig worden uitgelegd. Laat het gebeuren dus maar over je komen. De verdoving van de wijn speelt een niet te onderschatten rol.<text:s/></text:p>
      <text:p text:style-name="P250"/>
      <text:p text:style-name="P251">……………..</text:p>
      <text:p text:style-name="P252"/>
      <text:p text:style-name="P253">Thuis gekomen bekijk ik in allerijl de opgenomen feiten. Het is niet veel, maar voldoende. Weer zie ik de beklemming in de ogen van Leonara. Ik zie meer. De lens van de camera heeft geen voorkeur. Het richt zich niet op een onderdeel van het beeld. Laat alles zien. Nu pas zie ik hoe Barbara is gebonden aan het bed. Haar armen wijd boven haar hoofd uitgespreid. Handen gekoppeld aan de metalen stangen van haar bed. Haren vochtig, het gezicht rossig geschuurd. Geschaafd door de felle bewegingen van Leonara´s heupen.<text:s/></text:p>
      <text:p text:style-name="P254"/>
      <text:p text:style-name="P255">De komende dagen ben ik door de stimulerende ervaringen in mijn sas. De opvoeding en verzorging van mijn kinderen lijken als vanzelf te gaan. Steeds spelen de gebeurtenissen door mijn gedachten. Leonara en Barbara heb ik niet meer gezien.</text:p>
      <text:p text:style-name="P256"/>
      <text:p text:style-name="P257">…………..</text:p>
      <text:p text:style-name="P258"/>
      <text:soft-page-break/>
      <text:h text:style-name="P259" text:outline-level="2">De waarheid<text:s/></text:h>
      <text:p text:style-name="P260"/>
      <text:p text:style-name="P261">Het stugge weerbarstige blad dat haar tanden proberen te slechten smaakt zoet. Evita volgt wantrouwend haar kaakbewegingen. De geruststelling laat Evita zelf het groene goedje tot zich nemen. Sanda kijkt verwachtingsvol toe. De dreigende gebeurtenissen wegen niet op tegen de vrees het vertrouwen van haar vriendin te verliezen. Het cocablad heeft de uitwerking die bedoeld was. De dames raken in een prettige diepe bedwelming. Tijd lijkt nu niet meer te bestaan. Korte momenten van lichte helderheid worden <text:s/>gevolgd door een diep wegzakken.<text:s/></text:p>
      <text:p text:style-name="P262"/>
      <text:p text:style-name="P263">Het zijn fragmenten die haar geest nog bereiken. Fragmenten waarin ze de tronie van Sanda ziet glunderen. Fragmenten waarin ze erkenning vraagt van Evita. Wiens haviksblik steeds milder wordt. De entourage wisselt. De eettafel op het terras gaat over in het tweepersoons bed in hun slaapkamer. Dan weer ziet ze Evita´s donkere ogen. Dan weer het bezwete gezicht van Sanda. Deze indrukken komen ongevraagd binnen. Ze heeft geen macht. Ze wenst dat ingrijpen als ze ziet hoe de mongolide man Evita ontkleedt.<text:s/></text:p>
      <text:p text:style-name="P264"/>
      <text:p text:style-name="P265">De beelden worden steeds vager. Voelen is het nog enige duidelijk contact met de buitenwereld. De lapjes stof die haar huid zo gewend zijn glijden over haar lichaam. Totdat alleen nog de lakens en lucht haar naaktheid betasten. Lang of kort ligt ze met deze gewaarwording. Nog vaag ziet ze beelden waarin Sanda de ontblote Evita neemt. Dan wordt de waas te sterk en sluiten haar ogen voorgoed. De tast is het zintuig dat overneemt. Handen zacht en ruw die haar lichaam strelen. Eerst mild, dan steviger. Steeds meer in de buurt van haar intimiteit. Ze wil niet maar kan niet anders. Er is geen controle alleen overgeven.</text:p>
      <text:h text:style-name="P266" text:outline-level="1"/>
      <text:p text:style-name="BodyText3">De harde werkelijkheid ontsnappend keert Emmy terug naar haar schemerwereld. Ook daar is de inkt-kleurige Sanda aanwezig. Ze ligt weer. Dwars gedraaid in de buik van haar hangmat. Sanda nadert voorzichtig. Bang haar te wekken. Als een veertje licht hij Emmy´s heupen op. Dit geeft hem de mogelijkheid haar onderboekje zonder argwaan langs haar benen te laten afglijden. Even schuurt het stof onder haar onbedekte billen als Sanda deze bijna gewichtsloos laat zakken. Als een schim in de nacht verdwijnt hij. Dit is de waarheid denkt Emmy. Ik ben bedrogen. Wordt in de echte wereld misbruikt door een achterbakse leugen. <text:s/>De roes is verdwenen. Het beeld helder en wakker. Evita en Sanda worden weggeduwd.<text:s/></text:p>
      <text:p text:style-name="P267"/>
      <text:p text:style-name="P268">De uitleg is kort en ontnuchterd. Ook voor Evita. Met de staart tussen zijn benen verlaat Sanda de scene of the crime. <text:s/>De dames hebben hiervoor geen oog. De blik is op elkaar gericht. De muren zijn gevallen. De schaamte voor het wantrouwen maakt Evita berouwvol. Het begrip van Emmy brengt de hartvriendinnen in elkaars armen. Het uitwerken van de cocaïne brengt de zo gemiste realiteit. Deze is voor Emmy weliswaar confronterend maar niet ontluisterend. Evita is niet zo gelukkig. De hoop op illusie blijkt tevergeefs. De beelden van Emmy zijn helaas niet vertekend. Evita is geschonden. Het verdriet en de woede delen ze. De onherstelbare schade niet. De intense emoties kunnen de vermoeidheid niet tegenhouden. De drank en drugs gunnen het gekwetste duo de genezende slaap.<text:s/></text:p>
      <text:p text:style-name="P269"/>
      <text:p text:style-name="P270">…………..</text:p>
      <text:p text:style-name="P271"/>
      <text:p text:style-name="P272">De lianen striemen haar lichaam. Ze voelt zich opengesteld. Open voor alles en ieder die haar wil. Dit kan ze niet weerstaan. Haar diepe zijn neemt de controle over. Evita is verdwenen. Zij heeft haar plaats ingenomen. De dwingende vingers laten geen plek onberoerd. Het middel is doeltreffend. Al gauw is Emmy klaar voor de volgende fase in het ritueel.<text:s/></text:p>
      <text:p text:style-name="P273"/>
      <text:p text:style-name="P274">Haar hoofd deinst achterover als de eerste wildeman binnendringt. De stoten zijn dierlijk. De geur van transpirerende lichamen is doordringend. Kleffe handen verkennen de uithoeken van haar wezen. Onverstoorbaar schuift de stroeve knots in en uit. Meegeholpen door de schommeling van het lianenweb. In een ritme bepaald door de bongo´s. Een kandans overgenomen door de dikke vingers die haar gezwollen tepeltjes kneden. Het lage basgeluid doet de onderbuik van Emmy meevibreren. Sneller en sneller gaan de slagen. Het kloppen van de hete staaf die haar opening vult luidt het onvermijdelijke in. Nog nooit heeft een onbekende haar genomen. Ze wil het beest dat net in haar is gekomen in de ogen kijken. <text:s/></text:p>
      <text:p text:style-name="P275"/>
      <text:p text:style-name="P276">Hiervoor krijgt ze geen kans. Een volgende indringer heeft zijn plaats ingenomen. Ook deze belager kan ze niet bekijken. Haar hoofd wordt namelijk krachtig gedraaid door de eerste woesteling uit een groep bezig met haar bovenlichaam. De mondklem is verrassend effectief. Zonder enige kans op verzet duwt een lange stang zich recht in haar keel. De sterke kotsneiging verdwijnt even als de knots terugtrekt voor een nieuwe stoot. De ontlading van de staaf, eindigt niet de vernedering. Even plots als de staf wordt verwijderd vult een nieuwe de opengevallen plaats.</text:p>
      <text:p text:style-name="P277"/>
      <text:soft-page-break/>
      <text:p text:style-name="P278">De lang onderdrukte <text:s/>verlangens van haar belagers doen de eerste ronde binnen een uur verstrijken. De overdadige sappen van de daders lopen sijpelend haar poesje uit. Verschillende smaken prikkelen nog steeds de zintuigen in haar gehemelte. Proeven doet ze het klamme zweet dat onbedoeld in haar mond is gemorst. Met haar tong verwijdert ze de kriebelende haren tussen haar tanden. De nog onverwerkte klodders zaad uit de mondhoeken meenemend.<text:s/></text:p>
      <text:p text:style-name="P279"/>
      <text:p text:style-name="P280">Het oeroude ritueel schrijft voor dat de oerwoudbewoners hun krachten aanvullen. Manden vol lekkers worden de piste opgedragen. Languit rustend doen de indianen zich te goed aan hetgeen de natuur hen brengt. Rijk gevulde bekers met boswijn spoelen de etensresten weg. De rust wordt verstoord door Sanda die het volgende onderdeel aankondigt. In haar oren klinkt de echo van de uitleggende Evita. De indianen gaan wisselen. Een positie innemend tegenover de nog niet gepenetreerde opening van het ontvankelijk speeltje. De ontembare opgekropte last van de eerste ronde is ontladen. De tweede ronde zal vele malen langer duren.</text:p>
      <text:p text:style-name="P281"/>
      <text:p text:style-name="P282">De beleving van het spel is nog steeds dubbel. Het genot is eenzijdig. Hoe opwindend ook, haar poesje wordt niet verwend. Dat kan niet in deze setting. In dit verhaal geeft zij. Hoe zeer wenst ze ook zelf bevredigd te worden. Het brandje in haar kruis moet geblust worden. Het geluid van een openslaande deur. De onmogelijkheid van dit gebeuren in de huidige setting laat het besef te dromen groeien.</text:p>
      <text:p text:style-name="P283"/>
      <text:p text:style-name="P284">……….</text:p>
      <text:p text:style-name="P285"/>
      <text:p text:style-name="P286">Veel tijd om te herstellen krijgen de ladies niet. Sanda is teruggekeerd. Als gewonde katten zinnen ze op wraak. De klauwen gekromd, de nagels scherp en uitgeschoven, lijkt Sanda boete te gaan doen. Vlak voor het bloedige contact verschijnt een wapen. Een revolver kunnen de twee katjes vaststellen. Ze deinzen terug. Een kort moment van bezinning en verkenning van de situatie volgt.<text:s/></text:p>
      <text:p text:style-name="P287"/>
      <text:p text:style-name="P288">Dit laten ze zich niet gebeuren. De woede van het gebeurde en de angst voor wat staat te gebeuren overwint de dreiging van het pistool. Weer zinnen ze op genoegdoening als ze met kwade ogen Sanda tegemoet treden. De oorverdovende knal neemt het laatste restje moed weg. Sanda speelt het spel bedreven. Niet het lijfsbehoud van het individu zelf. Het leven van de ander is de chanterende inzet. De verwachte berusting laat Sanda genoegzaam grinniken.</text:p>
      <text:p text:style-name="P289"/>
      <text:p text:style-name="P290">Een grote limousine arriveert. De compagnon van Sanda laat zich zien. Samen dragen ze de geboeide dames naar het ruime vervoersmiddel. Op de brede achterbank zitten Evita en Emmy met felle agressieve blikken. Blikken want de monden zijn vakkundig door wit montage tape gesnoerd. De bestuurder neemt vanuit zijn achteruitkijkspiegel de situatie geïnteresseerd waar. De hand van Sanda houdt de geboeide enkels van Emmy op zijn rechterknie. Haar blote benen liggen smakelijk over zijn schoot. Haar opgetrokken benen bedekken deels haar zwarte erotische lingeriesetje. Evita eveneens in zwarte negligé kijkt verwijtend toe als Sanda zijn arm om Emmy heen slaat. Ook haar naakte benen zijn opgetrokken en aan elkaar gebonden. De armen van het onfortuinlijke tweetal zijn ongemakkelijk striemend achter de rug samengebracht.</text:p>
      <text:h text:style-name="P291" text:outline-level="1"/>
      <text:p text:style-name="BodyText3">Ondanks de voortdurende dreiging van het vuurwapen, geven de meisjes weerstand tegen de avances van Sanda. De strubbelingen leiden tot een pijnlijke stoot in zijn kruis. Dit voorval doen de ontvoerders besluiten de weerbarstige speeltjes te verdoven met een zakdoek vol chloroform.</text:p>
      <text:h text:style-name="P292" text:outline-level="1"/>
      <text:p text:style-name="BodyText3">……….</text:p>
      <text:p text:style-name="P293"/>
      <text:p text:style-name="P294">Het niets vernemen van Barbara en Leonara maken we onrustig. Na lang peinzen kan ik niet anders dan concluderen dat ik niet betrapt ben. Weliswaar was Leonara een gluurder gewaar. Beschermd door de duisternis kan ze mij niet hebben herkend. Gesterkt door dit inzicht vraag ik Leonara te komen schoonmaken. Het huis is een bende. Zeker nu de verzorgende handen van Emmy ontbreken. Het aanbod wordt dankbaar aangenomen.</text:p>
      <text:p text:style-name="P295"/>
      <text:p text:style-name="P296">Vloekend en tierend rij ik terug naar huis. Het vergeten van mijn aktetas overkomt me nooit. Iets te wild aankomend verlaat ik pardoes mijn nog lopende auto. De deur van mijn huis staat op een kier. Natuurlijk, ik heb Leonara vandaag gevraagd. Om niet overhaast te vetrekken parkeer ik alsnog mijn auto. Het gestommel op zolder bevestigden de schoonmaakactiviteiten. Rustig schenk ik alvast haar favoriete drankje in. Ze is net begonnen. Ik breng haar dit drankje om haar niet onnodig te laten pauzeren. Stilletjes hopend haar in een prikkelende schoonmaakhouding aan te treffen. Een begin tot een leuke fantasie?<text:s/></text:p>
      <text:p text:style-name="P297"/>
      <text:soft-page-break/>
      <text:p text:style-name="P298">Tot mijn verbijstering zie ik Barbara en Leonara mijn spullen doorzoeken. Voordat ik kan reageren is de vraag gesteld. “Waar is de opname?” Verbouwereerd door het ongegronde zelfconclusie verstijf ik. De stilte maakt de dames onzeker over hun overtuigingskracht. De tactiek wijzigt. “We zijn bereid ervoor te betalen”. Nog steeds overmand door de vreemde situatie, blijf ik stoïcijns zwijgen. Even peinzend en onderwijl mijn gelaatsuitdrukking inspecterend neemt ze me plots aan de hand mee. Een etage lager. Barbara volgt onderdanig. Niet begrijpend word ik geleid naar de badkamer. De WC dient als stoel als ik gadesla hoe Leonara de kleding van de verschrikte Barbara verwijderd. Barbara ondergaat alles met een ongekende slaafsheid. Vernederd volgt ze braaf het commando een douche te nemen. Een open hand van Leonara symboliseert de uitnodiging het gebeuren te aanschouwen.</text:p>
      <text:p text:style-name="P299"/>
      <text:p text:style-name="P300">De volmaakte schoonheid die door de waterpartij wordt benadrukt drijft me naar ongekende hoogten. Dichte volle bundels water vallen van de geopende mond. Stromend van haar nederige kin. Langs haar fantastisch lijf naar beneden. De weerspiegeling van het water vervormt de gave huid. Ik volg de doorzichtige waterstroom. Stop gefascineerd bij het zwarte kruisje. Het harige poesje dat ik eerder zo miste. Haar hoofd is licht zijwaarts in mijn blikveld gedraaid. Met gesloten ogen streelt ze haar tepels. Het erotisch centrum van haar perfect gevormde voorgevel. Het bijwonen van dit zalig verschijnsel is een ongekende belevenis. De atmosfeer is als uit een droom. De dwingende opdrachten van Leonara maken het geheel compleet.<text:s/></text:p>
      <text:p text:style-name="P301"/>
      <text:p text:style-name="P302">De verstomming door de schokkende omstandigheden leidt tot het vasthouden van de ijskoude uitstraling. Dit maakt dat Leonara verder gaat in haar vergoeding. Terwijl haar slavin de kledij afneemt draait Leonara met haar hoofd. De sluike donkerrode haren zwaaien in het rond. De ontblote Leonara hoeft haar hulpje niet meer instrueren. Ervaren masseert ze haar dominante spelkameraadje. De opwinding is bij de dames aan het stijgen. Vertwijfeld kijken de dames me aan, als ze merken dat de kilheid van mijn gelaat niet is veranderd. Hoewel me dat erg veel moeite kost. Dan gebeurt het onvermijdelijke. Leonara geeft het sein. Barbara protesteert. De dodelijke blik van haar meesteres laat haar snel inbinden.<text:s/></text:p>
      <text:p text:style-name="P303"/>
      <text:p text:style-name="P304">Met zichtbare tegenzin bevrijdt Barbara mij van de laatste blokkade die een ongehoord fijn samenzijn tegenhoudt. Zonder emotie streelt haar tong mijn naakte lichaam. Vastberaden naar die ene plek. De plek die mijn starheid bijna doet bezwijken. Nog even volhouden. De beloning blijft niet achterwege. Ook Leonara betaalt haar aandeel. Nauwelijks ben ik bewust van dit unieke moment. Een moment zo vaak in gedachten <text:s/>nagespeeld. De werkelijkheid overstijgt alles. De notie van het gebeuren. Het onverwachte gevoel dat het orale wisselen meebrengt is overweldigend. Mijn gezicht verzacht. Nog net kan ik de benodigde eisen stellen. Het product van mijn genot wordt niet gemorst. De verbondenheid met de rol van Leonara is zichtbaar als ik mijn ogen open. Vooral Barbara heeft de tol moeten betalen.<text:s/></text:p>
      <text:p text:style-name="P305"/>
      <text:p text:style-name="P306">…….</text:p>
      <text:p text:style-name="P307"/>
      <text:p text:style-name="P308">Nog steeds uitgeleefd ligt Evita in het breiwerk van touwen, als het morgenrood de hemel begint te verlichten. Gelijkend een heftig slagveld ligt de ontvangstruimte vol donkere levensloze lichamen. De gedane inspanning is zichtbaar. Het is Sanda die de zwarte bende in de benen krijgt. Gebroken door de nacht strubbelen de voorheen zo potige indianen naar een positie aan de rand van de cirkel. De cirkel met het fel witte zand. De cirkel met in het midden Evita als herinnering aan het voorgaande.</text:p>
      <text:p text:style-name="P309"/>
      <text:p text:style-name="P310">Emmy heeft haar inmiddels koud geworden bad als schuilplaats voor de nacht gebruikt. De stam is haar vergeten bedenkt ze gerustgesteld. Evita is ondertussen ontwaakt. Nog steeds wordt haar spreken tegengehouden door de irriterende mondklem. De mondklem die zorgde dat ze geen andere keuze had dan te slikken. De lichaamsappen van de wrede verkrachters tot zich nemend. Een zacht kermend geluid uit haar mond wordt opgemerkt. Emmy vraagt zich af waarom ze haar niet uit haar leiden verlossen. Ze heeft toch het ritueel volbracht. Het ritueel dat ze vrijwillig en tegelijk gedwongen onderging.</text:p>
      <text:p text:style-name="P311"/>
      <text:p text:style-name="P312">Inlevend in Evita´s situatie ziet ze dat Sanda zijn oor te luister legt. Sanda wijst naar de plek waar Emmy is verscholen. Kraait enkele vreemde kreten. Daarop besluit ze moedig haar schuilplaats te verlaten. De gezichtsuitdrukkingen van de halfnaakte mannen beneden brengen de spijt. Om zich heen kijkend beseft Emmy haar hopeloze situatie. Omringd door tronies waarin het ochtendgloren voor het eerst een duidelijk gezichtlijn tevoorschijn tovert. Een uitdrukking vol verwachting. Een uitdrukking die haar beangstigd maar ook dwingt tot afdalen. Het geestelijk overwicht van de dwingende ogen maken haar willoos. Gehypnotiseerd leiden de mannen haar naar Evita.<text:s/></text:p>
      <text:p text:style-name="P313"/>
      <text:soft-page-break/>
      <text:p text:style-name="P314">De voeten van de liggende Evita worden aan haar handen worden gebonden. Haar knieeen prikken daardoor ergerlijk onder haar ellebogen. Het kantelen van haar bekken maken dat haar intimiteit naar boven is gericht. Een aanblik waarachter het gezicht van Evita zichtbaar is. Omringd door de V die haar benen en armen vormen. Pas vlak voor Evita vraagt Emmy zich af wat er gaat gebeuren. Al kijkend naar de afwachtende ogen van Evita voelt ze ineens stevige hand in haar nek. De impuls van de greep is zo groot dat ze doorzakt. Dan weet ze wat er van haar wordt verwacht. Ze wil de droom veranderen. Dit keer heeft ze geen controle. De nekgreep is te machtig. Waarom vechten, het is maar een droom.</text:p>
      <text:p text:style-name="P315"/>
      <text:p text:style-name="P316">De opzwepende oergeluiden van de aandachtig kijkende indianen brengen Emmy in extase. Het knijpen laat haar tong uitsteken. Onwennig likt ze voorzichtig de vochtige opening. Langzaam dringt de smaak binnen. Herkenbaar uit de momenten met mij. De proefbare mengeling van haar en mijn lichaamsvocht. De zelfbeheersing komt bij vlagen terug. Op die momenten verzet ze zich tegen het gebeuren. Gedreven door het inzicht het sap van Evita en al die wildemannen op haar tong te nemen. <text:s/>De enorme nekkracht die haar laat doorgaan brengt haar terug in trance. Niet kijken naar de lustgrot. Ze richt haar ogen op die van Evita. Waterig doorlopen sluiten deze op het moment dat haar heupen het bereiken van het hoogtepunt berichten. Een resultaat dat naast walging haar bevrijdt van haar kwelling.</text:p>
      <text:p text:style-name="P317"/>
      <text:p text:style-name="P318">De ogen van Evita zijn verre van verwijtend. Liefdevol kijkt ze naar Emmy wiens hoofd niet langer is begraven tussen haar benen. <text:s/>De muzikale achtergrond is gestopt. Weer luistert Sanda naar de klanken die onverstaanbaar voor anderen uit de mond van Evita komen. Grinnikend geeft hij een opdracht. De bekende klem in haar nek leert haar dat het spel nog niet over is. De stam houdt van kwantiteit. De liefdesgrot is geheel uitgedroogd als eindelijk de marteling voorbij is. <text:s text:c="2"/></text:p>
      <text:p text:style-name="P319"><text:s/></text:p>
      <text:p text:style-name="P320">………………..</text:p>
      <text:p text:style-name="P321"><text:s/></text:p>
      <text:p text:style-name="P322"><text:s/>Het schudden van de bodem wordt veroorzaakt door een slecht aangelegd klinkerpad. De weg leidt naar een <text:s/>enorme villa kil omgeven door een ijzeren gordijn van prikkeldraad en hekwerk. De limo rijdt zonder onderbreking naar de openstaande garage. De auto komt rustig tot stilstand als ondertussen de automatisch sluitende garagedeuren het felle daglicht wegnemen. De ontvoerders verdwijnen uit zicht.<text:s/></text:p>
      <text:p text:style-name="P323"/>
      <text:p text:style-name="P324">Het duurt uren voordat er plots licht de garage vult. Een onbekende man in strak pak loopt routinematig naar binnen. Door de invallende zon ziet Emmy dat Evita nog in een diepe slaap is. Verheugd dat er eindelijk een einde komt haar de bijtende boeien, wacht Emmy op wat komen gaat. De man begeeft zich echter niet naar de autoportieren waarachter het tweetal zich bevinden. Haar blik weer gericht op de mysterieuze man ziet ze hoe deze de kofferbak opent. Tot haar verbijstering verschijnt in de armen van de man een jong donkerblond meisje. De witte sokjes en bootschoentjes doen Emmy haar leeftijd op maximaal 16 schatten. De lichtblauwe legging wordt bij haar gebogen knieeen door touwen begrensd. Touwen die ook haar handen binden. Touwen die haar met blauwe balletjes gedecoreerde bloesje doordringen. Touwen die de platte tienerborstjes omhoog drukken. De dragende armen ondersteunen haar nek en gebogen benen. Een houding waardoor haar hoofd licht naar achter knikt. Haar blik opzij is wanhopig. Versterkt door de strakheid van de doek die haar mond afknelt. Haar lange haren vallen gedwee over de dragende arm. <text:s/></text:p>
      <text:p text:style-name="P325"/>
      <text:p text:style-name="P326">In de vele uren die ten tweede malen verstrijken ontwaakt ook Evita. Samen weten ze de boeien van Emmy te slechten. Bezig met het verwijderen van de beknelling van Evita, is opeens het licht weer teruggekeerd. Geschrokken veinst Emmy weer geboeid te zijn. De knecht neemt tot haar ontzetting Evita mee. Als de duisternis terugkeert gebruikt Emmy de gelegenheid de luxe automobiel te verlaten. Voorzichtig opent ze deur waar de ontvoerders hun slachtoffers meenemen. Naderende geluiden doen haar vluchten naar de bossen die ze via een openstaande deur ziet liggen.<text:s/></text:p>
      <text:p text:style-name="P327"/>
      <text:p text:style-name="P328">De bomen weerspiegelen in klein bosmeertje. In de rug afgeschermd door hoge struiken begeeft ze zich naar dit meertje. Haar schrik is groot als ze een bedeesd meisje op een bankje ziet zitten. Vastgebonden aan handen en voeten. Haar stem wordt verstomd door een knijpend zakdoek. Haar aanwezigheid lijkt ze totaal niet op te merken. Haar blik is ver. Verdoofd door de extreme handelingen. Zo redeneert Emmy. Ze staat recht voor het meisje dat zit op haar bijeengetrokken benen. Rood van het contact met het hardhout. Haar zwart shirtje kleurt mooi bij haar bijeen geknopte haren. Haar spijkerrokje is zo strak dat haar dijen tegen elkaar geplakt zijn. Een donkere uitnodigende schaduw tussen de mooie ronde dijen en het rechte rokje streelt de nieuwsgierigheid. Leidend tot een instinctieve drang tot onderzoeken. De afwezigheid van het meisje neemt de laatste remming weg. Een korte inspectie bevestigd Emmy´s vermoeden. Het is duidelijk dat de ontvoerders haar hier hebben geplaatst. Geplaatst voor die momenten waarin speciale verlangens hen hier dirigeren.<text:s/></text:p>
      <text:p text:style-name="P329"/>
      <text:soft-page-break/>
      <text:p text:style-name="P330">Op zoek naar haar metgezel verkent ze het terrein. De voetstappen op het marmeren terras rondom de luxe vesting doen haar in dekking gaan. Zonder te aarzelen duikt ze in het aangrenzende zwembad. Een recent ontvoerd meisje wordt geleid naar het basketbalveld verderop. Om het gebeuren te kunnen volgen verlaat ze geruisloos het water. Doorweekt laat ze haar lingerie achter. Gekleed of niet is in de huidige omgeving niet relevant. Een ontdekking die wordt onderschreven als de mannen het ontdane meisje aan de paal van de basket binden. Gelijkend veehandel laat de “verkoper” de potentiële klant de koopwaar inspecteren. Al knielende schuift de geïnteresseerde koper het rokje omhoog. Alsof het slipje nog niet genoeg doorschijnt wordt ook dit kledingstuk opzijgeschoven. Ondertussen heeft de handelaar het truitje opgetild om de overgebleven handelswaar te tonen. <text:s/>De mondinspectie, bekend bij de paardenhandel, wordt gedaan middels een enorme dildo op de hoogste stand. De deal is rond. Niet afwachtend op de consumptie gaat Emmy verder.</text:p>
      <text:p text:style-name="P331"/>
      <text:p text:style-name="P332">Het huis is de plaats waar ze haar vriendin zal vinden. Ze trekt de stoute schoenen aan en sluipt de helse villa binnen. Sanda loopt tevreden een kamer uit. Emmy wacht weggedoken tot hij is verdwenen. Het kamertje is vol met TV-schermen. De knoppen zijn verwarrend. Al proberend krijgt Emmy beeld. Op het scherm ziet ze een vrouw wijdbeens op een bed liggen. Ze heeft alleen een bloesje en hoge hakschoenen aan. De vrouw kijkt recht in de camera. Alsof ze weet dat iemand zit te kijken. Quasi verveeld zit een man geknield naast het bed. De <text:s/>duim ondersteunt zijn kin. De wijs- en ringvinger drukken op zijn wang. Hierdoor kan hij ontspannen de reacties van de vrouw volgen. Zijn andere wijsvinger ligt zachtjes wrijvend op de clitoris. Wachtend op het doorbreken van haar ijzige houding.</text:p>
      <text:p text:style-name="P333"/>
      <text:p text:style-name="P334">Vingers drukken ongeduldig de zachte bediening in als het beeld verandert. <text:s/>Weer is een bed zichtbaar. Ditmaal ligt het mondgesnoerde gezicht van een Aziatische vrouw zijwaarts geperst in satijnen lakens. <text:s/>De camera zoomt langzaam uit. Een dikke leren jas en een dikke touwen omringen haar verschenen rug. Een effectieve dwangbuis die alleen ruimte geeft aan haar ontblote borsten. Slechts één is te zien. <text:s/>Tergend langzaam, Emmy kan nauwelijks wachtend, wordt het beeld groter. Zichtbaar wordt een behaarde hand die het uiteinde van het jasje in een stevige greep ombuigt. Het uitvergroten laat de strakke onbedekte bilpartij overgaan in de onderbuik van de eigenaar van de hand.<text:s/></text:p>
      <text:p text:style-name="P335"/>
      <text:p text:style-name="P336">Het paniekerige gestoei met het controlepaneel leidt tot het volgende scherm. De kaders laten het hoofd en de voeten van de ontvoerder buiten beeld. Wel zichtbaar is een geknielde in leergehulde brunette. <text:s/>De geleerde lingerie bestaat uit jarretels maar zonder onderbroekje. Ook het zwartleren hemdje verzuimt haar kleine ballontjes te beschermen. Pijnlijk zijn klemmetjes aan haar uitgestulpte tepels. <text:s/>Ook de ijzeren pinnen aan haar handboeien zullen haar onbehagen. Als afronding van de onderdrukkende kledij dient de leren riem om de nek. Een zware last door koppeling aan een lange stalen ketting. De losjes hangende ketting wordt vastgehouden door de dominerende man. De andere hand stuurt het hoofd van de willoze vrouw. De opwindende pose van de extreem aantrekkelijke vrouw laat zijn gelid wijzen. Wijzen naar de mond die de onderliggende opdracht zonder protest uitvoert. Met ogen dicht geeft de vrouw zich over.</text:p>
      <text:p text:style-name="P337"/>
      <text:p text:style-name="P338">Vertwijfeld probeert Emmy te ontsnappen aan de beklemmende beelden. Gelukkig laat de besturing een andere camera actief worden. Helaas weer niet haar vriendin. Maar wel het onschuldige blonde ding dat zo gewetensloos werd weggedragen. Ook zij heeft stekende leren boeien rond haar enkels, polsen en nek. Haar polsboeien zijn verbonden aan kettingen die weer aan het plafond zijn bevestigd. Al hangend in de ketting volgt Emmy de schakels van de ketting naar boven. Wederom geen hoofd van de dader. Wel een dikke buik die de met doodskoppen versierde shirt van de man te hoog optilt. Zijn behaarde onderbuik blootleggend. Ook de met teer besmeurde spijkerbroek draagt bij aan de walging van de toeschouwster. Vooral al ze ziet dat het arme kind zittend op haar geboeide voeten haar hoofd <text:s/>naar achter buigt. Een actie die voorkomt dat de enorme lozingen over haar prachtig ongeschonden lichaam haar gezicht bereiken. Vol medelijden aanschouwt Emmy de gele papperige stralen die via haar kin, borsten, navel haar poesje overstromen. De vetklep verwijdert de tape van de mond van de beeldschone. Emmy weet het voorspelbare vervolg te voorkomen.</text:p>
      <text:p text:style-name="P339"/>
      <text:p text:style-name="P340">De eerste fragmenten laten een verlaten fitnessruimte zien. De camera zoekt en vindt eindelijk Evita, liggend op een glimmend rode fitnessbank. Normaal de plaats voor bankdrukken. Nu de tralie die Evita kooit middels de boeien verbonden aan draagpalen. De steunen waar normaliter de halters in rusten. De camera is ingesteld op het vinden van de ontvoerde lustobjecten. Daarom zoemt deze in totdat Evita het beeld geheel vult. Haar zwarte lingerie is vervangen door een besmettelijk wit sportpakje. Het rokje is ietwat teruggevouwen. Een transparant maagdelijk slipje met fleurige witte bloemen bloot leggend. Een zelfde effect wordt bereikt door het terugklappen van de zijdelen van haar sportjasje. Deze voorbereiding voor een eventuele belager legt zonder schroom de goedgevormde boezem bloot. <text:s/></text:p>
      <text:p text:style-name="P341"/>
      <text:soft-page-break/>
      <text:p text:style-name="P342">Haastig zoekt Emmy naar een plattegrond. Overtuigd van de aanwezigheid doorzoekt ze het meubilair. Daar, aan de met confronterende posters behangen wanden, ziet ze het ontwerp van het omvangrijke object. Het huis blijkt een doolhof. <text:s/>Ze prijst zich gelukkig niet als een wilde stier door de villa te zijn geraasd. Nu kan ze misschien zonder ontdekt te worden haar vriendin bereiken. Ongeduldig zoekt ze naar de fitnessruimte. “Waar ben ik nu?” Enige tijd verstrijkt voordat Emmy een veilige route heeft bepaald.<text:s/></text:p>
      <text:p text:style-name="P343"/>
      <text:p text:style-name="P344">Omkerend naar de enorme TV schermen is haar schrik groot. Evita wordt bereden door een gepensioneerde <text:s/>lilliputter. De kleine gerimpelde opdonder zit op haar borsten. De grijsbejaarde gedrongen beentjes klemmen stevig om de zijkanten van haar bovenlichaam. <text:s/>De ene hand respecteert de bescherming van het fragiele slipje niet. De vingers drukken door de ijsbloemetjes. De penetratie laat het slipje meeschuiven. De andere hand dirigeert het mondje van Evita. De schrompelige kleinood verdwijnt in zijn geheel. Neus en lippen gedrukt tegen het zilvergrijze bosje schaamhaar. De kin tussen de miniballetjes. Het schouwspel doet Emmy rennen. Met de snelheid van het licht bereikt ze de noodlottige plek. De lilliputter is geen partij voor de razende bevrijdster.<text:s/></text:p>
      <text:p text:style-name="P345"/>
      <text:p text:style-name="P346">De kneveling is snel weggenomen. “Geen kolen op het al helse vuur gooien”. De gedachte die Emmy doet zwijgen. Zwijgen over de vlekken op de huid van haar verdoofde reisgenoot.</text:p>
      <text:p text:style-name="P347"/>
      <text:p text:style-name="P348">……………….</text:p>
      <text:p text:style-name="P349"/>
      <text:p text:style-name="P350"/>
      <text:p text:style-name="P351">De perikelen met Leonara en Barbara zijn voorbij. De schuld is ingelost. Het machtsmiddel overgedragen. Naast de herstellende realiteitszin is geen ruimte voor een gesprek. Leonara gaat verder met de schoonmaak. Barbara druipt af. Ik besluit ik die dag niet meer op pad te gaan. Het gebrek aan privacy voorkomt echter een verwerking door zelfbevrediging. Hierdoor is mijn seksuele spanning spoedig weer op peil. Juist op dat moment heeft Leonara haar activiteiten afgerond. De lichte aanraking van haar hand als ik haar het geld overhandig produceert een allesomvattende chemie. De verbintenis die al eerder lichtjes was opgemerkt. Nu veel sterker door het wegnemen van de barrières een paar uur eerder.</text:p>
      <text:p text:style-name="P352"/>
      <text:p text:style-name="P353">“Het zou me enorm opwinden als ik ook andere betaalde taken voor je moet vervullen.” Direct begrijp ik dat Leonara ook mij wil schoonmaken. Symbolisch overhandig ik haar een gulden. De gulden laat ze tussen haar decolleté glijden. In slow motion leunt ze terug in de fauteuil tegenover me. <text:s/>Door het onkruizen van haar benen kom ik tot een plasante ontdekking. Overtuigd van haar bedoeling loop ik in haar richting. Leg kordaat mijn handen onder haar knieën. Til deze in de lucht. Haar schoonmaakrokje schuift naar boven. Mijn handen drukken haar bovenbenen naar haar bovenlichaam. Haar handen ritsen mijn mannelijkheid vrij. Het moment waarop mijn eikelvormig uiteinde de tintelende donsharen bereiken, wordt ik gedwongen tot bezinning.<text:s/></text:p>
      <text:p text:style-name="P354"/>
      <text:p text:style-name="P355">De openslaande voordeur bezegelt het einde van de boeiende reis die mijn vrouw heeft meegemaakt. Ze is thuis.</text:p>
      <text:p text:style-name="P356"/>
      <text:h text:style-name="P357" text:outline-level="1"><text:bookmark-start text:name="_Toc489630073"/>Thuis<text:bookmark-end text:name="_Toc489630073"/></text:h>
      <text:p text:style-name="P358"/>
      <text:p text:style-name="P359">De drukkende dunne stralen water die mijn rug masseren worden onderbroken door mijn hoofd die eventjes achterwaarts keert. Heerlijk streelt het warme water mijn huid als het geleidelijk maar gestaag via de volgelopen haren over het rooddoorlopen gezicht en dan naar mijn naakte lichaam afglijd. De verlangens naar nog meer verwenning leiden mijn rechterhand. Tot plots de regelmatige zelf beheersbare watervingers die de dagspanning wegnemen veranderen in stekende ijspegels. Emmy vergeet mijn moment van intens met mezelf samenzijn. “Sorry!”</text:p>
      <text:p text:style-name="P360"/>
      <text:p text:style-name="P361">Onverstoord ga ik verder. Ik stuur mijn gedachten terug naar het zwembad. Naar de blonde gezonde Barbara die me al eerder, inmiddels bijna een half jaar geleden, een minuutje genot gunde. Het beeld van de betrapping passeert. Opwinding wordt verdrongen door mijn verstand dat verder borduurt op de situatie. Vragen komen onstuitbaar op. Vragen die ik niet kan maar wel wil beantwoorden. Bepaal een strategie en laat het nu rusten, zegt mijn verstand. Concentratie brengt me weer naar Barbara. Mooi uitgedost in haar kanariegele badpak.</text:p>
      <text:p text:style-name="P362"/>
      <text:p text:style-name="P363">De telefoon gaat als ik me voldaan sta af te drogen. Emmy is me voor. Het is Evita. Gezien de toon waarin ze Emmy begroet, leek het me verstandig eventjes stiekem mee te luisteren. Het volgende gesprek teken ik op.</text:p>
      <text:p text:style-name="P364"/>
      <text:p text:style-name="P365">“Weet je man er van! Nee? Ik heb het Johan wel verteld. De afgelopen periode voelde hij een sterke spanning tussen ons. Ik kon het niet langer voor hem verborgen houden. Nu wil hij wraak. En jij moet daarbij helpen!” <text:s/>Mijn stille vrouw lijkt de inmiddels voor mij nog onduidelijke strekking te begrijpen. “Johan wil, wat Sanda kreeg!”, legt Evita nog minder cryptisch uit. Emmy weigert resoluut. En ik weet wat ze weigert. “Ik begrijp je, ook ik heb direct nee gezegd. Maar Johan heeft mijn relatie als inzet gesteld. Ik kan niet weigeren. En tenslotte weegt het laten ontdoen van een kledingstukje niet op tegen het kapotgaan van een huwelijk”. “Dat bepaal ik zelf wel!”, stelt Emmy terecht. “Je man weet het toch nog niet wat er gebeurd is! Ik neem aan omdat je niet wilt dat hij het te weten komt”. Eerst is er mijn verbazing als Emmy bedeesd en ontdaan op dit dreigement reageert. Vooral als ze de indruk schept op de chantage in te willen gaan. Dan volgt mijn lachend begrip als ik, ondertussen elkaar genaderd, haar geniepig gezicht aanschouw.</text:p>
      <text:p text:style-name="P366"/>
      <text:p text:style-name="P367">Vertrouwd liggen we in elkaars armen. Het nabespreken van het telefoongesprek is als snel aangewend voor een intiem onderonsje. De ondeugende conclusie over de rol van Evita in dit spel is prikkelend. Veinzen heeft na Jongo geen zin. Weliswaar vaag in beeld maar helder in beleving was de actieve benadering. Het waren haar ongebonden handen die bij het wegnemen van elke ethische barrière de integriteit van Emmy niet langer konden respecteren. Voeg daarbij de zinspelingen in het vliegtuig op de weg terug, en de zaak is uitgemaakt. Evita wil een verdere kennismaking met Emmy. Haar man als sleutelfiguur in het realiseren van haar wens wordt evenals Sanda uit nood toegestaan.</text:p>
      <text:p text:style-name="P368"/>
      <text:p text:style-name="P369">Meer nog dan de stiekeme manipulatie tot een triootje. Meer nog dan manier waarop het spel werd meegespeeld. Meer nog dan het voorstellen van de gevolgen, droeg de herinnering aan de belofte bij aan de erotiek van het telefoontje. De belofte genoegdoening te geven voor haar stoute uitspatting: Stout niet vanwege de daad, maar door het verraad. Het verraad van onze afspraak De afspraak niets te doen zonder onderling overleg. Overleg vooraf!</text:p>
      <text:h text:style-name="Heading1" text:outline-level="1"/>
      <text:p text:style-name="BodyText">Als snel liggen we in een overbekende positie. Met nog steeds deze gedachtegangen in mijn hoofd. Zelf als mijn vrouw haar biezen pakt, blijven de herinneringen aan de afgelopen week opkomen. Ik hoor een sleutel onze voordeur openen. “Mijn vrouw is vast iets vergeten”, is mijn eerste reactie. Ik lig nog ontkleed nagenietend op mijn bed als Leonora pardoes binnenstapt. <text:s/>Weer ben ik vergeten dat dit haar schoonmaakdag is. De stemming en mijn uitnodigende houding laten eerdere terughouding vallen. We maken af wat we eerder niet konden.</text:p>
      <text:p text:style-name="P370"/>
      <text:p text:style-name="P371">Nu eenmaal het gebeuren is geschied zorg ik dat ik elke schoonmaakdag een moment met Leonora alleen ben. Soms vraag ik naar Barbara. Maar elke keer laat Leonora weten dat Barbara haar speeltje is en deze niet mij wil delen. Leonora is namelijk dominant. Dat geldt echter voor ondergetekende ook. Deze overeenkomst begint ons parten te spelen. Leonora wenst steeds meer een leidende rol. Toch blijf ik ook initiatief nemen. Ze doet me daarom een verzoek.<text:s/></text:p>
      <text:p text:style-name="P372"/>
      <text:p text:style-name="P373">………………</text:p>
      <text:p text:style-name="P374"/>
      <text:p text:style-name="P375">Een middag de wensen van Leonora opvolgen.</text:p>
      <text:p text:style-name="P376">……….. <text:s text:c="2"/></text:p>
      <text:p text:style-name="P377"/>
      <text:p text:style-name="Normal">………..</text:p>
      <text:p text:style-name="Normal"/>
      <text:p text:style-name="Normal">Mijn verjaardag verloopt zoals vele anderen. Lichtjes aangeschoten verwent mijn vrouw me als afsluiting van de dag. Voldaan ga ik naar beneden om nog wat te drinken te pakken. De afstandsbediening brengt niet een televisieprogramma waar ik nog eventjes de drukte van de dag alleen kan afwenden. Na een half uurtje tevergeefs gezocht te hebben, wil ik naar boven gaan. Dan hoor ik het kleppen van de brievenbus. Er valt een brief op de mat. Verbaasd post te krijgen op dit late tijdstip ga ik nieuwsgierig kijken. Het is een kort briefje zonder afzender. Het luidt “Als beloning voor bewezen diensten en als cadeautje voor je verjaardag heb ik <text:s/>B opgedragen al je wensen te vervullen. L.”<text:s/></text:p>
      <text:p text:style-name="Normal"/>
      <text:p text:style-name="Normal">Barbara is een trouwe slavinnetje van Leonora. Dat is wel duidelijk geworden de weken na het verheugend briefje. Onwennig was de eerste keer. Niet kunnen wachten ben ik nog op mijn verjaardagavond naar het huis van Barbara gegaan. De deur stond open evenals Barbara. Nu al vele bezoekjes later heb ik geleerd dat het niet een eenmalig aanbod is geweest. Telkens als ik dat wens staat Barbara voor me klaar. Aanvankelijk wilde ik niet de zaak teveel uitbuiten en bezocht haar eens in de week. Nu, hoef ik maar zin te hebben en ik gebruik haar om me te bevredigen. Het handwerk wordt steeds meer een uitzondering. Er is iemand die bij mijn dagelijkse ontladingen van dienst kan zijn.<text:s/></text:p>
      <text:p text:style-name="Normal"/>
      <text:p text:style-name="Normal">Het rollenspel was wel even wennen. Zonder enige vorm van begroeting loop ik haar huis en haar binnen. Vaak neem ik niet eens de moeite de gang te verlaten. Het openen van mijn gulp, de druk van mijn handen op haar schouders leggen zonder verbale toelichting mijn bedoelingen vast. Juist als ik weet dat ze gekleed is voor een gala voorkom ik dat mijn genotvocht geheel wordt genuttigd en mors ik flink. Zonder medelijden of zelfs omkijken verlaat ik direct na mijn bevrediging stoïcijns haar huis. Mijn komst meld ik telefonisch aan. Ook geef ik dan soms voorbereidende instructies mee. Het enige wat ik in mij oren terughoor is “Ja, meester”. Haar naam gebruik ik zelden. Ze luister braaf naar namen van personen in mijn omgeving waar ik graag eens mee de koffer in wil. Barbara is een kei in het spelen van deze rollen.<text:s/></text:p>
      <text:p text:style-name="Normal"/>
      <text:p text:style-name="Normal">Het schoonmaken door Leonora gaat onverminderd door. Nog steeds heb ik niet van haar vernomen dat de aangeboden surprise afloopt. Daar zal mijn trouwe diensten naar haar toe zeker een rol bij spelen. Totdat na een intiem bijeenzijn Leonora over deze regeling begint. Haar slavinnetje had haar smekend gevraagd wanneer haar beproeving over zou zijn. Een beproeving zou leerde ik als gevolg van stout gedrag van Barbara. De sterke motivatie het vertrouwen van haar meesteres terug te winnen heb ik aan den lijve ondervonden. De openbaring maakte me even ongerust over hetgeen ze daarna zou gaan melden. Bang om deze bijna onmisbaar privilege te verliezen. Gelukkig was Leonora ontdaan over het stoutmoedig verzoek van Barbara. Haar reacties was dat ze niet alleen loyaliteit wenste maar zelfs dat Barbara zich met overgave op haar taak zou storten. Dit zou niet uit haar smeekbede blijken. Een nieuwe straf was op zijn plaats.</text:p>
      <text:p text:style-name="Normal"/>
      <text:p text:style-name="Normal">…………….</text:p>
      <text:p text:style-name="Normal"/>
      <text:p text:style-name="Normal">Mijn visspullen liggen uitgestald. Ik heb een hengel uitgeworpen maar nog niets gevangen. Ik wacht dan ook niet op glibberige waterdieren. Het geritsel van bladeren kondigen de komst van de gewenste vis aan. Barbara is geheel ontkleed. De nacht is overweldigend. De koele manier waarop ze eerder mijn wensen volgens de letter opvolgde is veranderd in een hete benadering. Voor het eerst verstrijken niet vele uren als ik een tweede keer haar lichaam gebruik om mijn zaad te lozen. Zonder onderbreking gooit ze al haar middelen in de strijd mij keer op keer naar een hoogtepunt te helpen. Verrast door deze ommezwaai geef ik me hieraan over.</text:p>
      <text:p text:style-name="Normal"/>
      <text:p text:style-name="Normal">Na wel geteld vijf keer zijn mijn voorraden uitgeput. Tenminste. Dit geldt niet voor de inzet van Barbara. Terwijl ik mijn aandacht op mijn dobber richt, beweegt haar hoofd onvermoeibaar tussen mijn benen. Twintig vangsten verstrijken als ik ook een zesde keer niet kan ophouden. Uitgeput laat ik me achterover zakken in het dichte gras. Weer gaat ze op me zitten. Ik dut in terwijl Barbara onverstoorbaar door gaat. Ik kan de lezer meedelen dat zulk een verwenning heerlijk is. Geen enkele inspanning anders dan de vele ontspanningen worden van mij gevraagd. Zij doet het werk, ik lever het resultaat. Hoewel ik aan Barbara merk dat de vele contacten haar intieme delen irriteren lijkt ze niet van plan haar daden te stoppen. Pas als ik zelf de brandende gevolgen van het intens samenzijn merk, besluit ik de nacht af te breken. Barbara dankt me nederig voor het helpen in het aflossen van haar schuld en verdwijnt als een dief in de nacht.</text:p>
      <text:p text:style-name="Normal"/>
      <text:p text:style-name="Normal"/>
      <text:p text:style-name="Normal"><text:s text:c="4"/></text:p>
      <text:p text:style-name="Normal">…………….</text:p>
      <text:soft-page-break/>
      <text:p text:style-name="Normal">fireirig tsip de ver</text:p>
      <text:p text:style-name="Normal"/>
      <text:p text:style-name="Normal"/>
      <text:p text:style-name="Normal"/>
      <text:p text:style-name="P378">Eens in de maand heb ik een conferentie. Tijdens deze bijeenkomsten dood ik de saaie momenten met het fantaseren over medecursiste Annabel. Ze zit meestal naast me. Ik ga altijd zo zitten dat zij in mijn blikveld zit. Dan loop ik de contouren van haar gezicht bij langs. Heel knap is ze niet. Maar ze heeft een uiterlijk wat me aanspreekt. Daarnaast merk ik aan haar dat ze me graag mag. Soms bespeur ik zelfs ontzag. Nu, is weer zo’n moment waarop ik Annabel als aangenaam tijdsverdrijf gebruik. Terwijl ik de lijnen van haar gezicht volg, bedenk ik hoe het zou zijn als mijn vingers langs haar lippen glijden. In mijn gedachten opent ze haar mond en laat mijn duim daarin rondjes draaien. Met haar tong bevochtigt ze mijn vingers. Deze voorstelling laat me dieper wegglijden.</text:p>
      <text:p text:style-name="P379"/>
      <text:p text:style-name="P380">Annabel vraagt of ik haar bij de volgende conferentie een rit kan geven. Ze weet dat ik vrij dicht langs haar woonplaats moet rijden. We spreken een tijd en plaats af. En op de bewuste dag en locatie wacht ik haar op. Ze wordt gebracht door haar vriend. Als we samen zo op weg zijn hebben we zoals altijd weer uitgebreide gesprekken over van alles en nog wat. In deze gesprekken uit Annabel regelmatig haar waardering over mijn standpunten en argumenten. De conferentie is als vanouds. Jammer genoeg is Annabel nu niet bij me komen zitten en moet ik mijn fantasie beleven met minder aantrekkelijke personen. Tot opeens Annabel aangeeft dat ze iets vergeten is en eigenlijk direct naar huis moet. Ze vraagt of ik het niet vervelend vind haar te brengen. Samen uit, samen thuis.<text:s/></text:p>
      <text:p text:style-name="P381"/>
      <text:p text:style-name="P382">Op de terugweg haalt Annabel zomaar ineens een bundeltje papier uit haar tas. Ik schrik als ik de titels herken. Het zijn mijn persoonlijk geschreven erotische fantasieën die ik per ongeluk in de auto had laten liggen. Voordat ik me kan excuseren voor haar onbedoelde vondst onderbreekt ze mijn spijtbetuiging. Ze zegt dat ze blij was mijn erotische gedachten te kunnen lezen. Al jaren loopt ze met dezelfde wensen maar nog nooit heeft ze iemand ontmoet met wie ze deze kan delen. Ze was ook blij te lezen dat ik gevoelens naar haar toe had. Ze legt daarop haar hand op mijn been. Ik besluit hetzelfde bij haar te doen. De strelende bewegingen maken duidelijk dat haar woorden wel eens zouden kunnen resulteren in daden. Dit vraagt toch wel enige bezinning van mijn kant.</text:p>
      <text:p text:style-name="P383"/>
      <text:p text:style-name="P384">We praten verder. Annabel vraagt; “ik heb het idee dat je tijdens de conferentie soms over me fantaseert”. Betrapt vraag ik hoe ze dit heeft gemerkt. De manier waarop je aandachtig naar me kijkt en de bobbel die ik daarbij in je broek zie ontstaan. Al zeggende legt ze haar hand op de bobbel die ondertussen weer is opgedoken. Dit gaat me duidelijk te snel, en voorzichtig plaats ik haar hand terug. “Vind je het niet prettig?”, vraagt ze. “Natuurlijk wel maar ik ben getrouwd”. Annabel knikt begripvol en vraagt of het niet verkeerd is dat we gewoon wat verder over intieme zaken praten. “Lijkt me geen probleem”, is mijn respons.<text:s/></text:p>
      <text:p text:style-name="P385"/>
      <text:p text:style-name="P386">Annabel vertelt; “weet je dat ik het heel prettig vind als ik merk dat je in gedachten met me speelt. Als ik dit merk dan probeer ik me voor te stellen wat er zich in je hoofd afspeelt. Voor me zie ik dan allerlei situaties waarin jouw hersengolven ons mogelijk op dat moment leiden. Leiden, leider dat is wat ik als prettig ervaar. Onschuldig meegaan in jouw erotische wensen”. Onzeker over haar reactie, besluit ik voorzichtig al vragend achter haar bedoeling te komen. “Welke erotische wensen bedoel je uit de verhalen.” “De rol van roodkapje of assepoester zou ik graag willen spelen.” Dit antwoord neemt de laatste remming weg. Annabel stelt voor de auto te parkeren bij een klein bosje omringt door weide akkervelden, ver weg van alle drukte en menselijke aanwezigheid.<text:s/></text:p>
      <text:p text:style-name="P387"/>
      <text:p text:style-name="P388">Aangekomen probeer ik de rol te gaan spelen die overeenkomt met haar wensen. Annabel volgt. “Waar breng je me naar toe?” Annabel kijkt vertwijfelt en bang. <text:s/>“Geduld sletje”. Ik rij de auto het bospad in en stop ergens in het midden. Zonder haar milde protest een moment van aandacht te gunnen, leid ik haar kordaat naar een open plek in het bosje. Zonder een woord te wisselen en met stalen gezicht ontdoe ik haar van haar kleren. Ik duw haar op haar knieën en duw mijn hete staaf zonder aarzeling in haar mond. Met mijn hand achter haar hoofd dwing ik haar mij te zuigen. Ik kom klaar over haar gezicht en commandeer haar het zaad op te likken. Vervolgens ram ik mijn staaf ineens in haar holletje en begin haar ongeremd te rammen totdat ik weer klaar kom. Beduusd kijkt ze me na als ik zonder blikken of blozen me omdraai naar de auto loop en wegrijd.</text:p>
      <text:p text:style-name="P389"/>
      <text:p text:style-name="P390">“We danken de heer Hogendorp voor zijn boeiend betoog”. Opgeschrikt klap ik snel mee met de rest van het publiek. Annabel kijkt me vriendelijk lachend aan. Ze moest eens weten.</text:p>
      <text:p text:style-name="P391"/>
      <text:p text:style-name="P392">…………………..</text:p>
      <text:p text:style-name="P393"/>
      <text:p text:style-name="P394"/>
      <text:p text:style-name="P395"/>
      <text:p text:style-name="P396"/>
      <text:h text:style-name="P397" text:outline-level="1"><text:bookmark-start text:name="_Toc489630074"/><text:soft-page-break/><text:span text:style-name="T398">Vissen</text:span><text:bookmark-end text:name="_Toc489630074"/></text:h>
      <text:p text:style-name="P399"/>
      <text:p text:style-name="P400">Eens in de zoveel tijd verruil ik de dagelijkse mallenmolen voor een rustig plekje aan het viswater. De laatste tijd om praktische redenen alleen s´ nachts. Overdag kan ik dan aan mijn gezinsverplichtingen voldoen. De buitenlucht zorgt dat de anders onderbroken slaap diep en ongestoord kan zijn. De visplas ligt ver verscholen in een afgelegen bos. Toch is de autorit door de verharde weg comfortabel en veilig. Ook zonder verlichting. Het kleine meertje is zeer dicht begroeid. Met een vaste regelmaat is kunstmatig een open plek gecreëerd. Ten dienste van de weinige vissers die gebruik maken van dit prachtig stukje natuur. De lage vangsten zullen een rol spelen.</text:p>
      <text:p text:style-name="P401"/>
      <text:p text:style-name="P402">De warmte van de dag gloeit nog na. Een tent is gezien de heldere sterrenhemel en aangename temperatuur overbodig. De gesteende bodem en het kriebelig wildgras worden op een afstand gehouden door een dik luchtbed. Met mijn handen achter mijn hoofd laat ik me achterovervallen. Het dode gewicht veert nog even kort na. Als de demping volledig is gaan mijn gedachten over de gladde waterspiegel. Terug naar de heftige gebeurtenissen van de middag.</text:p>
      <text:p text:style-name="P403"/>
      <text:p text:style-name="P404">……</text:p>
      <text:p text:style-name="P405"/>
      <text:p text:style-name="P406">De middag is broeierig warm. Emmy parkeert haar luchtgekoelde auto voor ons huis. Ze glundert ondeugend als ze uit de auto stapt en ziet dat ik haar gadesla vanuit de woonkamer. Nadat ze haar werkmateriaal opbergt vraag ik haar hoe haar dag geweest is. Ze glimlacht en zegt dat ze hiervoor uitgebreid wil zitten. Zet voor ons beiden koffie. Benieuwd hoor ik haar verhaal aan.</text:p>
      <text:p text:style-name="P407"/>
      <text:p text:style-name="P408">“Vanochtend moest ik voor controle naar de huisarts. Je weet dus wat dit voor me betekent.” Emmy heeft een oogje op deze man. Probeert al een tijdje uit te vissen hoe hij tegenover haar staat. Gezien de heftige reiservaring gun ik haar een pleziertje. Hoop dat ze haar vis aan de haak zal slaan. Een gunst die Emmy eerder weigerde. Dankbaar voor mijn onzelfzuchtigheid laat ze weten het aanbod niet te kunnen aannemen. Haar normen en waarden laten nog niet genoeg ruimte voor zulk een avontuurtje.<text:s/></text:p>
      <text:p text:style-name="P409"/>
      <text:p text:style-name="P410">“Het spreekuur liep waarschijnlijk ten einde want de wachtkamer was geheel leeg toen ik eenmaal aan de beurt was. Natuurlijk voelde ik een aangename spanning toen ik voor hem ging zitten en hem de hand gaf. Dit keer was echter anders dan anders. In plaats van een zakelijke handdruk, plaatst hij zijn hand langzaam in de mijne. Een tijd lang laat hij de milde greep aanhouden alvorens hij zachtjes zijn hand terugtrekt. O jee nu gaat het gebeuren, dacht ik.” Mijn partner fantaseert al langer over het eerlijk uitkomen van haar gevoelens voor de huisarts.<text:s/></text:p>
      <text:p text:style-name="P411"/>
      <text:p text:style-name="P412">…………..</text:p>
      <text:p text:style-name="P413"/>
      <text:p text:style-name="P414">Een zacht gebrom klinkt in de verte. De zachte nevel waarin ik gehuld ben lost geleidelijk op. Het naderende geluid wordt sterker. Het flitsen van felle lichten wordt steeds constanter. Het gebrom is overgegaan in knetterende metalen klanken. Scooters stel ik vast. Boven het schelle geluid uit klinken stoere jongenspraatjes. Het zijn die ettertjes van afgelopen week. Het schorremorrie van pakweg 18 jaar. Toen met drie veel te jonge tienermeisjes luidruchtig mijn welverdiende de rust verstorend. De kwaadheid die me een week geleden op de jongelui liet afstappen, is nu niet merkbaar. Verdrongen door een opwindende associatie. Het destijds betrappen van het stel in een nogal penibele situatie.</text:p>
      <text:p text:style-name="P415"/>
      <text:p text:style-name="P416">Dit keer besluit ik de onderbreking in mijn voordeel te gebruiken. Zoals verwacht kiezen de schurkjes dezelfde plek voor hun ondeugende daadjes. De vooraf ingerichte schuilplaats stelt me instaat ongezien het gebeuren gade te slaan. Geheel in lijn met de heersende modetrends zijn de jongens gekleed in veel te wijde pantalons. De criminele uitziende hoofden worden door puntige mutsen passend afgeschermd. De gezichten zijn op meerdere plekken verminkt door metalen piercings. Een bankbediende zal zich niet gemakkelijk voelen als deze bende het filiaal binnentreedt. Te grote ongestrikte gymschoenen soppen in de vochtige bodem. De doorsijpelende blubbervocht wordt niet opgemerkt. De aandacht is geheel gericht op de meegebrachte speeltjes.</text:p>
      <text:p text:style-name="P417"/>
      <text:p text:style-name="P418">Het viertal heeft dit keer twee jonge poesjes weten te strikken. De meisjes zijn geen uitgesproken schoonheden. Wel aantrekkelijk door hun pure naïviteit. De grietjes zijn overtuigd een goede vis aan de haak te hebben geslagen. In de dagelijkse werkelijkheid vertoeven ze aan de zijkant. Buitengesloten. Geen deel uitmakend van het hart van het schoolleven. Opgenomen door dit populair kwartet hopen ze hun positie te verbeteren. Verblind door dit verlangen doorzien ze niet de schijn. De anders zo zichtbare lelijkheid van de door smuk omgeven<text:s/><text:soft-page-break/>boeven. Bandieten die al sinds jaren misbruik maken van deze blindheid. Een reputatie die nog niet tot iedereen is doorgedrongen. De saaie irritant puberale conversaties laten mijn gedachten afdwalen.<text:s/></text:p>
      <text:p text:style-name="P419"/>
      <text:p text:style-name="P420">…………….</text:p>
      <text:p text:style-name="P421"/>
      <text:p text:style-name="P422">““Kleed je maar uit”, waren de eerste woorden die volgden. Ik was nog in de roes van het handcontact en wilde geschokt reageren op zijn directe aanpak. Gelukkig kwam ik net op tijd tot mij zinnen. Besefte dat dit onderdeel was van de routinematige controle. Mijn huisarts was echter mijn blik niet ontgaan en vroeg “of is de vraag confronterend?” Ik hoefde geen antwoord te geven, mijn gezicht verraadde alles. “Voel je niet opgelaten, je hebt toch ook wel gemerkt dat ik iets voor jou voel?” Deze openbaring, zo overeenkomend met mijn fantasieën, bracht me geheel van mijn stuk. Net doende alsof ik hem niet gehoord had, alsof er niets gezegd was vervolgde ik met uitkleden. <text:s/>“Jij komt wel heel snel tot zaken”. Ik keek hem verbaasd aan. Zijn ogen nemen mij boven naar beneden op. Tot mijn schrik bemerkte ik dat de verwarring zo groot is geweest dat ik me tegen de bedoeling in geheel heb ontkleed. Snel en beschaamd wil ik mijn kleding weer aan doen, als zijn hand me tegenhoudt. Voordat ik iets kan zeggen kust hij me. Mijn weerstand duurt kort en een innige zoenpartij volgt.”</text:p>
      <text:p text:style-name="P423"/>
      <text:p text:style-name="P424">Geschokt door dit deel van het verhaal vraag ik direct of het nog verder dan zoenen is gegaan. Emmy stelt me gerust. Na het kussen, hebben ze beiden hun zinnen weergekregen en zijn eventjes rustig over de wederzijdse gevoelens gaan praten. <text:s/>Ze kwamen tot de conclusie dat ze eerst met de achterban willen praten voordat ze verder stappen ondernemen. “Wat hadden jullie dan in gedachten?”, is mijn verontrustende vraag. Haar ondeugend gezicht geeft me al het antwoord.</text:p>
      <text:p text:style-name="P425"/>
      <text:p text:style-name="P426">……………………….</text:p>
      <text:p text:style-name="P427"/>
      <text:p text:style-name="P428">De heldere maan ontvangt mijn dankbetuiging. Het eindelijk interessant wordende schouwspel wordt meer dan voldoende belicht. De stelletjes zijn steeds meer op elkaar gefocusseerd. Het overgebleven tweetal schijnt zich hieraan niet te ergeren. Sterker nog ze slaan de ontluikende liefdesbetuigingen tevreden toe. Een goede waarnemer zal de gespeelde ervarenheid van de jochies direct ontmaskeren. Het synchroon uitvoeren van de liefdeshandelingen verraad de ingestudeerde tactiek. Precies volgens het boekje overstelpen ze de onschuldige wichtjes met complimenten. De clichés vloeien uit hun monden. Bedoeld het vriendinnetje over te halen het aangereikte whiskyglas te nuttigen. Elke volwassen vrouw weet waar dit toe leidt. Wie kan dat verwachten van deze nog ongerepte tienertjes?<text:s/></text:p>
      <text:p text:style-name="P429"/>
      <text:p text:style-name="P430">De eerste kennismaking met de krachtige werking van alcohol is zoals gepland. Remmingen verdwijnen. Terwijl het volgooien onverstoorbaar voort gaat, beginnen de heren de ruggen te strelen. Onvolwassen snorretjes drukken zich op de kleine mondjes. De indringende tong wordt afgewisseld met slokjes drank. <text:s/>De meisjes denken dat ze in de hemel zijn. Wij weten wel beter.<text:s/></text:p>
      <text:p text:style-name="P431"/>
      <text:p text:style-name="P432">Zeker spelen de popjes de avances mee. Een vertrouwelijk handelen gebaseerd op een ernstige misvatting. De illusie geroutineerd te zijn na de intensieve belevenissen van deze week. Een gekleurde opvatting gestoeld op de wensen van de manipulerende heren. Bang om hun onervarenheid te laten merken. Gedwee meegaan in de als vanzelfsprekend gepresenteerde voorstellen. Even wilden ze <text:s/>protesteren. De ongerustheid uiten over het bijeenkomen op deze plek. Niet zozeer het samenzijn met de prille partner. Het bijwonen door anderen voelde bedreigend. Genoeg was de onuitgesproken boodschap. Het signaal van onvolwassenheid dat af te lezen viel uit de verbaasde gezichten.</text:p>
      <text:p text:style-name="P433"/>
      <text:p text:style-name="P434">…………</text:p>
      <text:p text:style-name="P435"/>
      <text:p text:style-name="P436">De manier waarop de wijfjes zich als makke schaapjes laten meesleuren doet me denken aan Sonja. De studente die uit het net van een gruwelijke sekte is gevist. De documentaire die ik de avond daarvoor zo aandachtig heb gevolgd. Ook in haar verhaal is mijn verbazing over de eenvoud waarmee mensen geestelijk gehersenspoeld worden. De verhaallijn ging ongeveer als volgt.</text:p>
      <text:p text:style-name="P437"/>
      <text:p text:style-name="P438">Sonja, een aantrekkelijke derde jaars economiestudente, besloot haar studie een jaar te onderbreken. De tijd zou ze gebruiken voor een reis naar de verenigde staten. Haar kost zou ze verdienen door te werken. Een medestudente die hoogte kreeg van haar plannen gaf haar een adres mee. Aldaar zou ze in ruil voor kost, inwoning en wat zakgeld, licht huishoudelijk werk moeten verrichten. “Het is er erg gezellig. Allemaal jonge mensen. Je zult het er ongetwijfeld naar je zin hebben.” Het enthousiasme van de tot dan toe onbekende studiegenoot haalde haar over. De inschrijving ging vrij eenvoudig. Een recente foto en wat persoonlijke<text:s/><text:soft-page-break/>gegevens waren voldoende. Het getoonde bericht aangenomen te zijn deed haar destijds nog juichen van blijdschap.<text:s/></text:p>
      <text:p text:style-name="P439"/>
      <text:p text:style-name="P440">De foto´s die Sonja van haar onderneming maakte werden eveneens gepresenteerd in de documentaire. De commentator vertelt onverstoorbaar verder. Al op het vliegveld werd Sonja zeer hartelijk ontvangen. Twee bijzonder knappe jongemannen maken dat ze zich direct thuis voelt. Onderweg wordt ze ingelicht over de huisregels die in haar nieuwe verblijfplaats gelden.</text:p>
      <text:p text:style-name="P441"/>
      <text:p text:style-name="P442">“We wonen met zijn allen op een enorme farm. Iedereen werkt mee om voor elkaar te zorgen. Je zult merken dat je medebewoners erg vrij zijn in hun gedrag. De gemeenschap waarin je terechtkomt ziet iedereen als een zuster of broeder. En zo behandelen we elkaar ook.” De lange rit door afgelegen gebieden is net lang genoeg om alles aan Sonja uit te leggen. De eensgezindheid waarmee haar medepassagiers de geldende regels en gewoontes ondersteunen is unaniem. Weer herken ik een parallel. Ook hier is sprake van een ontluikende verliefdheid. De sterke aantrekking gericht op de flirtende playboys. De mannelijke aandacht voor het op dat gebied nog onzekere meisje. Verblindend gevleid <text:s/>door de interesse van de stukken. Als een vis gehaakt.<text:s/></text:p>
      <text:p text:style-name="P443"/>
      <text:p text:style-name="P444">De kriebels in haar buik en de intense sfeer van vriendschap maken dat ze vraagtekens die opkomen niet uit. Deze prachtige mensen zullen toch wel weten wat ze doen. Vertrouwend op andermans inzicht blijkt ook in Sonja´s verhaal de cruciale fout.</text:p>
      <text:p text:style-name="P445"/>
      <text:p text:style-name="P446">De beelden zijn goed gesynchroniseerd met de vertelling. De jongelui zijn erg vermoeid als ze aankomen op de boerderij. Een farm zoals uit de films wordt getoond De aankomst wordt luid aangekondigd door de klokken van een op het terrein gelegen kerkje. De tientallen aanwezigen begroeten de nieuwe bewoonster. Afgezien van haar reisbegeleiders zijn alleen jonge meisje herkenbaar. Het eerste bewijs van de hechtheid van de leefgemeenschap blijkt uit het topless rondlopen. Broers en zuster hoeven zich niet voor hun lichaam te schamen, was de uitleg.</text:p>
      <text:p text:style-name="P447"/>
      <text:p text:style-name="P448">Een blond meisjes met lang sluik haar is de eerste die in de rondleiding wordt opgezocht. Zij is verantwoordelijk voor het verzorgen van de paarden. Een foto toont het prachtige lichaam van de vrouw. Haar slipje is ongestreken slordig en hangt nonchalant losjes om haar middel. Het is duidelijk dat hier op zulke zaken niet wordt gelet. Haar tietjes drukken zachtjes tegen de manen van de witte hengst. Haar hoofd ligt liefkozend langs die van het paard. Haar hand strelend onder de wangen van het fortuinlijke dier.</text:p>
      <text:p text:style-name="P449"/>
      <text:p text:style-name="P450">Verderop zitten drie meisjes met konijntjes op hun armen. De onrustig stampende beestjes zetten zich af op de ontblote borstjes van de schoonheden. Ik weet nog dat ik verlangde naar een blik op de eigen bunnies van de liefjes. Bijna abusievelijk ontbloot door een konijntje dat strubbelend op een van de slipjes is beland. Bij het afzetten is het broekje omlaag geschoven. De rondleiding schijnt nog uren in beslag te hebben genomen.</text:p>
      <text:p text:style-name="P451"/>
      <text:p text:style-name="P452">De weken verlopen door de warme atmosfeer zeer voorspoedig. Kim wordt zelf ook steeds losser in de omgang. Eerst waagde ze zich topless. De dagelijkse praktijk leerde dat de andere bewoners meestal geen moeite doen zich überhaupt te bedekken. De eerste keer dat ze zo haar geliefde mannen zag deed haar blozen. De erotiek van het aanschouwen nam haar laatste restje schaamte weg. Toch droeg ze soms een rokje. Weliswaar zonder ondergoed. Dit om te voorkomen dat de opdringerige geiten per abuis in haar kruisje bijten. Een ongelukje die de overige meisjes probleemloos accepteerden.<text:s/></text:p>
      <text:p text:style-name="P453"/>
      <text:p text:style-name="P454">Ik wil begrijpen waarom deze meisjes zo schijnbaar gemakkelijk zijn mee te voeren. Te overtuigen dat het abnormale gebeuren de normaalste zaak van de wereld is. De drang tot dit inzicht maakt dat ik terugkeer naar de antwoorden die te vinden zijn in de werkelijkheid voor me.<text:s/></text:p>
      <text:p text:style-name="P455"/>
      <text:p text:style-name="P456">…………</text:p>
      <text:p text:style-name="P457"/>
      <text:p text:style-name="P458">De standaard volgorde van betasten heeft de gewenste uitwerking. De poesjes zijn opgehitst. Terwijl ze aansturen op meer, wenden de heren zich af. Verwachtingsvol vragen de meisjes zich af wat er komen gaat. De jongens zijn hun zaak nog niet zeker. Meer stimulerende vloeistof vult de gewillige kelen. Dan komt het stoutmoedige voorstel. “We zijn zo verliefd op jullie dat we <text:s/>jullie graag de ultieme vrouwenwens willen laten vervullen”. De meisjes zijn net zo onwetend als ikzelf. Tot de heren hun medeplichtigen erbij roepen. “Een vrouw heeft niet voor niets twee bruikbare openingen.” De wichtjes herinneren zich het onverwachte gebruik van hun mondjes. <text:s/>Onverwacht in de stimulerende uitwerking op hun partner. Het niet te onderschatten belang van dit lichaamsdeel werd bevestigd door de zo gewaarde uiting van liefde. Niet de onsmakelijke sappen maar de kreet “Ik hou van jou”. Mede hierdoor sterkte het geloof in de sterkte van de ontluikende relatie.</text:p>
      <text:p text:style-name="P459"/>
      <text:soft-page-break/>
      <text:p text:style-name="P460">Het is niet voor niets dat het partnerloze tweetal niet voorzien is van een eigen speeldingetje. Zelfs de meest extreme toepassing van moderne cosmetica, kan de afstotende puisten niet verbergen. Deze onveranderlijkheid geldt niet ten aanzien van de papperige dikheid. Het vette omhulsel dat gezicht, nek, armen, buik en benen zo bollen. De begrijpelijke walging en het onbegrip voor het voorstel doen de dames resoluut afwijzen. Aan de ene kant ben ik gelukkig met deze opleving van eigenwaarde. Aan de andere kant. De schurkjes dringen niet langer aan. Schuldig over de afwijzing doet een dametje een gewaagd tegenvoorstel. “Lieverd, je mag vanavond wel beide holletjes vullen. Als je dat wilt tenminste. En zij mogen toekijken.”<text:s/></text:p>
      <text:p text:style-name="P461"/>
      <text:p text:style-name="P462">Een van de buitengesloten spelers probeert het oorspronkelijk voorstel te verdedigen. Het belang van het gelijktijdig vullen wordt door hem aangehaald. De teleurstelling van de afwijzing druipt van zijn tegenwerpingen. De bezinnende bendeleden stellen hem gerust. Sussen zijn strubbelingen met een fluistering in zijn oor. Het hoorbare schuldgevoel heeft de ettertjes moed gegeven. De teleurstelling nog meer aandikkend, melden ze koel dat ze het voorstel in beraad zullen nemen. Het kwartet overlegt apart. De tevreden gezichten duiden de grietjes dat het voorstel goed is ontvangen. De crimineeltjes doen echter een onhoorbaar tegenbod. De onderhandelingen over de voorgestelde sandwich doen me denken aan het vervolg van Sonja´s televisieoptreden. Terwijl de tienerwijfjes het onbekende tegenbod befluisteren, dwalen mijn gedachten weer af.<text:s/></text:p>
      <text:p text:style-name="P463"/>
      <text:p text:style-name="P464">…………..</text:p>
      <text:p text:style-name="P465"/>
      <text:p text:style-name="P466">Sonja is erg jaloers. Haar verliefdheid kan moeilijk omgaan met het gegeven dat de enige mannen op het terrein zijn omgeven door naakte beauty´s. Verbaasd is ze over haar dubbele verliefdheid. Nooit eerder heeft ze meegemaakt gelijktijdig verliefd te zijn op twee vriendjes. Het flirten en spelen met de mannen doet ze om en om. Van het een komt het ander. Voordat de volgende foto wordt getoond komt eerst een waarschuwing van de verteller. De schokkende foto´s die komen zijn buiten haar weten door medebewoners gemaakt. De plaatselijke politie heeft later beslag op ze gelegd.</text:p>
      <text:p text:style-name="P467"/>
      <text:p text:style-name="P468">De waarschuwing is niet overdreven. We zien de hoogblonde Sonja geknield met het geslachtsdeel van een van haar vriendjes in haar handje en mondje. Een handeling, zo vertelt de commentator, die Sonja eerder bij haar andere vriend heeft gepleegd. De overtuiging waarmee Sonja haar vriendje verwend laten zien dat ze al danig onder de invloed van de sekte is gekomen. De invloed die duidelijk wordt bevestigd door de volgende beelden. Het blijkt dat het vrijende duo werd verrast door het overgebleven vriendje. Een conclusie zichtbaar door de tweede staaf die haar mond vult. Sonja weet dat in de leefgemeenschap groepsavontuurtjes normaal zijn. Hoewel ze die bij andere bedreigend vond. Vooral omdat het hier vrouw-vrouw interacties betroffen. Uit respect voor Sonja hebben de mannen zich hieraan niet overgegeven.<text:s/></text:p>
      <text:p text:style-name="P469"/>
      <text:p text:style-name="P470">De heftigheid van de beelden nemen toe als we zien dat Sonja op schoot van een van haar vriendjes plaats heeft. Het geiten afwerende rokje is omhooggeschoven zodat we duidelijk zien hoe de mannelijkheid half haar kruisje insteekt. De handen van de man zijn rond haar middel. Onmiskenbaar met de bedoeling de omhoogschuivende bewegingen te controleren. Een hand van haar andere vriend is op een van haar naar voren gehouden borsten geplant. De andere hand het inwendige van haar mond verkennend. Alsof ze de pook van een versnellingsbak vasthoudt heeft ze haar vingers rond de penis van haar andere vriend.</text:p>
      <text:p text:style-name="P471"/>
      <text:p text:style-name="P472">De laatste foto wordt door een nog sterkere waarschuwing vooraf gegaan. De stiekeme fotografe heeft kans gezien het gezicht van Sonja volledig in beeld te nemen. De twee vlak boven haar mondje gerichte staven druppen wit slijm op haar uitgestoken tong. De beelden van gisteren doen me brengen naar de beelden van nu. Hier staat een vergelijkbare situatie in het echt te gebeuren.</text:p>
      <text:p text:style-name="P473"/>
      <text:p text:style-name="P474">…………….</text:p>
      <text:p text:style-name="P475"/>
      <text:p text:style-name="P476">De mij onbekende deal wordt beklonken. Volgens afspraak ontkleden de trutjes zich voor de aanwezigen. Het meisje met het lichte hemdje begint. Het wichtje heeft donkerbruin haar. Gebundeld achter het kleine hoofdje. Enkele plukken voorhaar zijn niet strak naar achteren gebonden, maar hangen losjes krullend in haar gezicht. Ze raken net de mond en nek. Haar wenkbrauwen zijn donkerbruin en extra aangezet. Haar wipneusje lijkt een kuiltje naar de lippen te trekken. Haar mondje is opvallend recht. Ze slaat de wimpers boven haar ogen naar beneden. Kijkend naar het terugslaan van de bandjes om haar schouders. Het omhoogtrekken van haar shirtje. De voor haar leeftijd redelijk ontwikkelde borstjes zijn niet ondersteund door een bustehouder. Het samengevouwen hemdje bedekt nog alleen de bovenkant van de stevige tietjes.<text:s/></text:p>
      <text:p text:style-name="P477"/>
      <text:p text:style-name="P478">Voordat het snolletje verder gaat komt haar metgezellin in actie. Dit wijfje heeft felrood haar dat zeer kort is geknipt. Ze heeft donker glanzende ogen. Een onschuldig en tegelijk ondeugende uitstraling die me volledig van<text:s/><text:soft-page-break/>mijn stuk brengt. Haar bijpassend rode jurkje dat bijna tot aan haar zwarte beenband reikt schuift ze langzaam omhoog. Het verwachte ontbreekt. De deugniet! Haar vriendje houdt het tangaslipje verklarend in de lucht. Het over haar hoofd heen brengen van het kledingstuk toont dat ze geen BH draagt. Voor de kleine tienertietjes die nauwelijks zichtbaar verschijnen lijkt me dit ook overdreven.<text:s/></text:p>
      <text:p text:style-name="P479"/>
      <text:p text:style-name="P480">Het vriendinnetje heeft ondertussen haar hemdje uit gedaan. Rest nog het afknellend gerafelde spijkerbroekje. De op spanningstaande blauwe stof verhult niet de opgedrukte zijkanten van haar schaamstreek. Een schaamstreek niet bekleedt door een onderbroekje. <text:s/>Hoe wordt dit veel te strakke broekje verwijderd? Geen enkele ritssluiting is herkenbaar. Het enkele knoopje verscholen tussen de binnenkant van haar dijen beantwoord mijn vraag. De weggenomen spanning maakt dat een loshangend driehoekje voor en achter ontstaat. Haar dijen bijeenknijpend rolt ze het broekje stukje bij beetje naar beneden. Hangend aan haar gemodderde voeten schopt ze het restantje weg.<text:s/></text:p>
      <text:p text:style-name="P481"/>
      <text:p text:style-name="P482">De stramme borstjes glimmen in het maanlicht. De schaamte proberen ze tevergeefs te verbergen. De verlekkerde gezichten van de puistenkoppen tonen geen begrip. Wachten in spanning af tot ook het laatste kledingstuk is verwijderd. De ongerepte kruisjes wekken mijn medelijden. Doodzonde dat deze zo worden bevlekt. De hardheid in mijn korte broek weerhoudt me van ingrijpen. De lust overwint de last van het gebeuren.<text:s/></text:p>
      <text:p text:style-name="P483"/>
      <text:p text:style-name="P484">Zonder enige vorm van voorspel gaan de poesjes liggen in het natte gras. Het contact met de modder laat ze bijna overeind schieten. Tegengehouden door de massa van de vallende boefjes. Even draaien de jongenslichamen. Een rubberen omhulsel wordt geplaatst. Ondanks de situatie waardeer ik deze verstandige bescherming. De kereltjes lopen zelf geen gevaar. De net ontmaagde meisjes zullen geen ongeneeslijke ziektes kunnen overdragen. Dat is andersom maar de vraag meldt de herinnering aan de veroveringen van verleden week.<text:s/></text:p>
      <text:p text:style-name="P485"/>
      <text:p text:style-name="P486">…………………….</text:p>
      <text:p text:style-name="P487"/>
      <text:p text:style-name="P488">De heden ten dage belangrijke voorzichtigheid betracht door de tienerventjes, is niet terug te vinden in de regels van de sekte. Het is onnatuurlijk enige vorm van kleding te dragen. Ook al draagt die bij aan de veiligheid. De gewoontes in de leefgemeenschap zijn stuk voor stuk waterdicht onderbouwd. Tenminste zo willen de sekteleden geloven. Vanwege de beslotenheid van de groep zijn ziekten van buitenaf niet bedreigend, zo is de redenering. Een redenering die past in de stijl van de overige onderbouwingen. Het riekt naar recht praten van een kromme banaan. De banaan van de heren wel te verstaan. Net als bij de veel minder professioneel opererende schurkjes.</text:p>
      <text:p text:style-name="P489"/>
      <text:p text:style-name="P490">Het was dan ook niet verrassend dat in de reglementen alle vrijheid voor de seksuele escapes van de enige mannen wordt gegeven. Een genoten vrijheid die angstvallig voor Sonja verborgen bleek. Niet voor de kijkers. Een foto wordt weergegeven. Het prachtige meisje ter paard kijkt de camera aan. Gebogen over het middenlijf van een in wit ondergoed gehesen man. De knoopjes van het broekje zijn afgebroken. Zijn felrood doorlopen geslachtsdeel staat vochtig glimmend overeind. De lang genagelde handjes zijn gedegen geplaatst. Een hand streelt de binnenkant van de dijen. De vingers geschoven onder de pijpen van zijn besmettelijk broekje. De duimnagel prikt bovenop de stof. Haar andere hand rust op de stang die net is ontladen. De crème rond haar mondje druipt van haar kin. Onbedoeld is een klodder in haar oog terechtgekomen. En enkelen in haar lichtblonde haren die rusten op de ontblote buik van de heer.<text:s/></text:p>
      <text:p text:style-name="P491"/>
      <text:p text:style-name="P492">…………………….</text:p>
      <text:p text:style-name="P493"/>
      <text:p text:style-name="P494">Gezien het voorstel van de tienerdames is mijn hoop het op mijn televisie vastgelegde schouwspel in het echt te mogen aanschouwen. <text:s/>Mijn ogen focusseren zich op de arena zo dicht bij mijn schuilplaats. Het ontbreekt aan tederheid. Doelgericht stampen de schurkjes de omhulsels vol. De overschatting van hun mannelijkheid maakt dat deze veel te ruim zijn aangebracht. De losgeraakte zakjes worden uit de spleetjes getrokken.<text:s/></text:p>
      <text:p text:style-name="P495"/>
      <text:p text:style-name="P496">De trofeeën worden door wasknijpers aan takken van omringende bomen uitgestald. Het eerste onderdeel van de afspraak is blijkbaar volbracht. Napratend maken de stelletjes een ommetje. Verbaasd zie ik dat de overgebleven misbakseltjes ook een condoom plaatsen. Blijkbaar versterkt dit het nabeleven van het voorgaande. Snel draai ik mijn hoofd als de rechterhanden het rubber op en neer schuiven. De herkenbare geluiden signaleren de afronding van de daad. Ook nu worden de producten van intimiteit publiekelijk gepresenteerd.<text:s/></text:p>
      <text:p text:style-name="P497"/>
      <text:p text:style-name="P498">De eerder opgehangen zakjes van de stelletjes worden haastig verwijderd. Gewaarschuwd door de luide <text:s/>stemmen van de jonge paartjes. Alleen de zakjes van de puistjes blijven hangen. De nog modderige meisjeslichamen nemen weer hun eerdere positie in. Als een film die opnieuw afspeelt gaan de misdadigers over tot handelen. Het enige verschil is dat het verstand verliest van het gevoel. Het ontbreken van een beschermend<text:s/><text:soft-page-break/>vlies maakt het vleselijk contact zichtbaar intenser. Verbaasd over de jonge potentie merk ik dat het niet lang duurt. Opnieuw wordt een ditmaal riskant hoogtepunt bereikt. Ik overpeins het tegenvoorstel van de gewillige grietjes en de risico´s van de huidige pose. Verwacht daarom elk moment dat de stotende gevalletjes <text:s/>naar de verwachtingsvolle bekkies worden gebracht. <text:s/></text:p>
      <text:p text:style-name="P499"/>
      <text:p text:style-name="P500">Tot mijn ontzetting brengen de compagnons de door hen gevulde zakjes naar de krikkende paartjes. Overtuigd de sappen van hun geliefde vriendjes te ontvangen. Wachtend op tot het verlossende woord. Uit de mutsen die tegen de kinnen zijn geperst. Houden de tienermeisjes de bundeltjes boven hun gezicht. Nauwelijks hoorbaar wordt het sein gegeven. De toekijkende daders laten hun puisten glimlachen. <text:s/>Zonder argwaan slurpen de meisjes het zaad uit de zakjes. Ze doen hun best de opgerichte gezichten niet te laten merken dat het gestolde lichaamsvocht <text:s/>gruwelijk naar urine smaakt. <text:s/>Het instromende vocht tussen de benen bericht dat deze opzet is geslaagd.</text:p>
      <text:p text:style-name="P501"/>
      <text:p text:style-name="P502">Nauwelijks de wichtjes tijd geven bij te komen, komen de schurken terug op het eerste voorstel. Het buitensluiten van de goede kameraden wordt ingezet. Het eerst prikkelen en dan zo gemeen elke bevrediging te onthouden. Hopend het succes van schuld wederom uit te buiten. De verdediging is niet te doorkruizen. Dan de aandacht op de drijvende kracht achter de muur. Het stugge restje eigenwaarde wordt aangevallen. De schurken biechten de waarheid. Gal spugend reageren de vernederde tienerpoesjes verontwaardigd. De openbaring leidt niet tot het gewenste effect.</text:p>
      <text:p text:style-name="P503"/>
      <text:p text:style-name="P504">De woede van de bedrogen tietjes is groot. Ik merk dat ik ook al meega in de vandaag de dag populaire koosnaampjes. De moderne trends kan ik normaal gemakkelijk volgen. Het aanduiden van vriendinnetjes middels hun geslachtsdeeltjes niet. Hoewel, het is in hoge mate opwindend als ik me voorstel dit naar me vrouw toe te doen. Maar goed.<text:s/></text:p>
      <text:p text:style-name="P505"/>
      <text:p text:style-name="P506">Het niet kunnen omgaan met verwijten maken de emotioneel onvolgroeide vriendjes kwaad afdruipen. De schaamlipjes zijn duidelijk geschrokken van de uitwerking van het schelden. Even willen ze de verontwaardigde sukkeltjes terugroepen. Het starten van de scooters maakt hun roep onhoorbaar. Verbouwereerd kijken ze het vluchtende tweetal na. Dan richten hun blikken op de achtergebleven boeven. Alleen met deze lelijke eendjes doet de schaamte voor het onbedekt zijn stijgen. Zoekend naar kleren houden de heren twee bundeltjes omhoog. De tietjes volgen de dikkerdjes die een vissteiger oprennen.<text:s/></text:p>
      <text:p text:style-name="P507"/>
      <text:p text:style-name="P508">De onmisbare kledij wordt boven het kraakheldere water gehouden. De poesjes smeken de jongens de vracht te behouden. “Voor een wipje krijgen jullie de spullen terug”, is de repliek. De tietjes lijken te berusten in hun lot. De strategie wordt plots gewijzigd als ze onverwacht naar de bundeltjes grijpen. Ze grijpen mis. Nauwelijks is de plons een feit of de nog uitgestoken armen worden vastgegrepen. Met ruwe kracht op de rug gekeerd. De pijn doet ze omdraaien. Vrijwel meteen voelen ze een hete staaf. Glijdend langs de geïrriteerde lipjes. Geïrriteerd door het onwennig openen van de nauwe grotjes. Het resultaat van de tientallen verwijdingen eerder deze week. <text:s/>Al snel dringen de monstertjes binnen. De arm op de rug wordt gebruikt als houdgreep. Steungevend aan de snel drukkende bewegingen van de onderlijven. Dit kan ik niet toestaan. De schuilplaats wordt verlaten.</text:p>
      <text:p text:style-name="P509"/>
      <text:p text:style-name="P510">Verschrikt door mijn dreigend opduiken duwen de boefjes de tepeltjes het water in. Een slimme tactiek omdat ik zo geen tijd heb de jongetjes eens stevig onder handen te nemen. De hulpbehoevende grietjes <text:s/>worden snel uit het ijskoude water bevrijd. De jonge naaktheid vlak voor me laat me niet onbewogen.<text:s/></text:p>
      <text:p text:style-name="P511"/>
      <text:p text:style-name="P512">De in allerijl gevluchte crimineeltjes hebben nog de helderheid van geest mijn autobanden lek te steken. Een achtervolging is uitgesloten. Helaas kan ik nu de naakte tienermeisjes niet naar huis brengen. Niet wetend welke rol ik heb gespeeld huilen ze op mijn schouders uit. Ik betreur in geheel niet de hitte van de nacht. De omstandigheid die gezorgd heeft dat mijn bezwete T-shirt niet meer over mijn korte broek hangt. De twee rillende spiernaakte natte huiden tegen mijn ontblote bovenlichaam is een bekende sensatie. Mijn gedachten gaan terug naar Leonara en Barbara. Gelukkig merken de getrooste meisjes niet de gevolgen van mijn gedachten.<text:s/></text:p>
      <text:p text:style-name="P513"/>
      <text:p text:style-name="P514">Wachtend op de ingelichte hulptroepen bekijk ik onopzichtig de naakte tienertjes. Provisorisch heb ik een kampvuurtje gemaakt. Zogenaamd om de meisjes op te warmen. Meer bedoeld om mij op te warmen. De gloed van het felle vuur maakt de lijfjes nog uitnodigender. Dit aanzicht gebruik ik om een voorstelling te maken bij de rest van Sonja´s verhaal. Een eigen voorstelling omdat geen afbeeldingen beschikbaar zijn.</text:p>
      <text:p text:style-name="P515"/>
      <text:p text:style-name="P516">……………..</text:p>
      <text:p text:style-name="P517"/>
      <text:soft-page-break/>
      <text:p text:style-name="P518">De hele week is Sonja al zenuwachtig. Zaterdag zal zij officieel worden ingewijd in de hogere geledingen van de hiërarchisch georganiseerde sekte. Elke maand wordt een vrouw in deze gemeenschap gekozen tot kaderlid. Sonja zal dan hoger in de hiërarchie komen dan haar mannelijke vriendjes. De bedriegende bazen van de farm waar ze verblijft. Een promotie die ze te danken heeft aan het gepassioneerd uitvoeren van de gewoontes en braaf houden aan de regels van de sekte. Helaas betekent deze verkiezing het verlaten van de boerderij. De eer van de verkiezing weegt nauwelijks op tegen het uitzicht haar minnaars te moeten verlaten. De week wordt gebruikt om haar voor te bereiden op haar nieuwe rol. De ban waarin ze verkeerd, waardoor ze juist is uitverkoren, stelt geen vragen bij de vreemde rituelen waarin ze wordt getraind.<text:s/></text:p>
      <text:p text:style-name="P519"/>
      <text:p text:style-name="P520">De spanning neemt toe als ze de zo vaak besproken heilige berg aanschouwt. Een kale steile rotsheuvel met twee pieken als horens rond de tussengelegen volle maan. De stand die aankondigt dat het tijd is. De berg, zo verteld de overlevering, staat op dit moment in contact met de spirituele wereld. Een locatie die zorgt voor geestelijke verrijking, zoals de sekteleden het noemen. Noodzakelijk voor <text:s/>haar nieuwe rol. De beoogde kennismaking met de goeroe wiens stem zo vaak door speakers op het terrein klonk, maakt haar extra nerveus.<text:s/></text:p>
      <text:p text:style-name="P521"/>
      <text:p text:style-name="P522">De wachters leiden haar naar een enorme grot. Verlicht door fakkels in de muren gepind. Een koorgezang klinkt echoënd uit de ronde smalle opening. Groot genoeg om net een persoon doorgang te verschaffen. Doorgang naar het hol van de leeuw. Aldaar zal de inwijding plaats hebben. De wachters zijn sekteleden op leeftijd. Vanwege hun beperkte geestelijke ontwikkeling niet tot de kadertop doorgedrongen.</text:p>
      <text:p text:style-name="P523"/>
      <text:p text:style-name="P524">Het doorzichtig reisgewaad wordt door de wachters afgenomen. De geesten moeten onbedekt worden benaderd. De wachters ontdoen zich van het harnas rond hun middel. De symbolische lansen worden wel meegebracht. Midden in de grot is een grote kamer. In de steeds breder wordende gang er na toe is een heilige wasplaats. Sonja pakt een kom en vult deze met het water uit een klein bassin. Het wijwater prikt onverwacht als ze de kom over haar huid leegt. De vele oefeningen maken dat de symbolische zuivering geroutineerd wordt uitgevoerd. De onderdanige uitdrukking op haar gezicht voorkomt provocatie van de ronddwalende geesten. De onderdrukte pijn van het brandende water maakt haar ogen waterig en weemoedig.</text:p>
      <text:p text:style-name="P525"/>
      <text:p text:style-name="P526">Het gezang eindigt als de goeroe vanuit een zijgang zijn opwachting maakt. Sonja stopt abrupt met reinigen en wacht geknield de komst van haar leider af. De stokoude meester wordt gevolgd door twee onschuldige tienermeisjes. Een beeld dat ik door mijn huidige omgeving helder naar voren kan halen. De meester is als enige in het gezelschap gekleed in een groot met goud versiert gewaad. Symbolen van draken en demonen houden <text:s/>ongewenste geesten op afstand. De spirituele leider is volkomen kaal. Zijn kin wordt afgeschermd door een grijze baard. Geen vader Abraham model maar kort en open. Een kleine doodskop tatoeage op zijn kruin <text:s/>en drietandoorringen weren ongewenste spirits af. <text:s/></text:p>
      <text:p text:style-name="P527"/>
      <text:p text:style-name="P528">De goeroe kijkt Sonja inspecterend aan. Haar hoofd is eerbiedig naar de grond gericht. Het natte lichaam is extra rossig door het prikkende wijwater. Een tienermeisje heeft een fraai versierde pijp in haar handen. De pijp is een halve meter lang. Het andere meisje ontsteekt de pijp en houdt deze voor de behaarde mond. Rustig de rook inhalerend slaan zijn armen de mantel uit. Twee stappen naar voren zijn voldoende de grote mantel om de geknielde Sonja heen te slaan. Het gerimpelde lijf dat ze ontwaart, dik en met vellen huid bekleed, passen niet bij de grootsheid van de persoon. <text:s/></text:p>
      <text:p text:style-name="P529"/>
      <text:p text:style-name="P530">Sonja weet dat de goeroe vrij moet zijn van elke vorm van aards genotdrang voordat hij de heilige kamer mag binnentreden. Wat haar echter niet verteld is dat van haar wordt verwacht deze drang weg te nemen. De maandenlange inprenting en verheiligen maakt dat ze zonder schroom haar gezette meester ontdoet van deze lading. De mantel der bedekking voorkomt dat de geesten hoogte krijgen van het wegnemen van deze onpuurheid. Elk spoor is vakkundig door Sonja verwijderd als de mantel weer opent. <text:s/></text:p>
      <text:p text:style-name="P531"/>
      <text:p text:style-name="P532">Dan gaat het ritueel verder zoals ze dat kent. Het mondstuk van de vredespijp beroert haar plakkerige lippen. Honderd zware teugen moet ze zonder onderbreking nemen. Voorbereid kan ze zonder hoesten de taak volbrengen. De zware bedwelming die volgt is bekend. De gebruikte en daardoor onreine pijp wordt symbolisch gezuiverd. Het mondstuk wordt kort in de kruisjes van beide tienermeisjes gegleden. De gereinigde pijp wordt door de meisjes meegenomen als ze de aftocht blazen.</text:p>
      <text:p text:style-name="P533"/>
      <text:p text:style-name="P534">……………….</text:p>
      <text:p text:style-name="P535"/>
      <text:soft-page-break/>
      <text:p text:style-name="P536">De tienermeisjes kijken me verschrikt aan. Hun blik verraad waarom. De gedachten aan Sonja hebben zijn uitwerking niet gemist. Een harde paal in mijn korte broek is ontstaan. Pijnlijk is dat het uiteinde net boven het broekje uitkomt. Begrijpend dat ik ook maar een mens ben, laten ze de verwijten achterwege. “Misschien moet we toch maar iets vinden om je niet verder op te winden.” De picknickkleden waar ik normaal mijn visspullen op uitstal gebruiken de dames om daad bij woord te voegen. Ik zal maar niet vertellen dat op die ongewassen kleedjes verleden week slijmerige karpers hebben gelegen. De lichten van een naderende auto verlossen me van verder leedvermaak.</text:p>
      <text:p text:style-name="P537"/>
      <text:p text:style-name="P538">………….</text:p>
      <text:p text:style-name="P539"/>
      <text:p text:style-name="P540">In de auto vertelt Emmy dat ze samen met de partner van de huisarts tot een overeenkomst zijn gekomen. De fronsende tienermeisjes voelen zich niet geroepen iets te zeggen. Mijn vrouw is echter ongeremd enthousiast enm vergeet de passagiers als ze vervolgt. “We gaan eerst met zijn vieren gaan kennismaken.” Emmy en de huisarts hopen dat ook wij tot elkaar worden aangetrokken. Beide willen alleen verdere stappen samen met ons kunnen doormaken. De kennismaking zou plaatsvinden in ons huis. Als de meisjes zijn afgezet keren we huiswaarts. De volgende dag zal het voorgestelde plaatsvinden. De avond gebruiken we elkaar om onze verschillende erotische gebeurtenissen van de dag te verwerken.</text:p>
      <text:p text:style-name="P541"/>
      <text:p text:style-name="P542">Natuurlijk ken ik de huisarts al. Zijn vrouw nog niet. In eerste instantie oogt ze niet erg aantrekkelijk. We zitten met zijn vieren op de bank in de woonkamer. Emmy naast de huisarts en ik naast zijn vrouw. Al pratende strelen Emmy en de huisarts elkaar steeds intiemer. Tot ik op een gegeven moment zeg; “laten we niet langer om de hete brij heen draaien. Jullie willen graag elkaar leren kennen. Om dit voor jullie dragelijk te maken hopen jullie dat wij (ik wijs naar de huisarts vrouw) het ook met elkaar kunnen vinden. Of dit zo werkt, daar kunnen we heel lang over praten. Jullie wens zal echter recht overeind blijven. Dus, laten we maar tot actie overgaan, en dan verder zien.” Emmy en de huisarts blijven in de woonkamer terwijl ik met de huisarts vrouw naar onze slaapkamer ga.</text:p>
      <text:p text:style-name="P543"/>
      <text:p text:style-name="P544">Als we ons beiden ontkleed hebben gaan we bijna robotmatig over tot handelen. De vrouw is echter niet boeiend genoeg om me snel tot een hoogtepunt te brengen. De ondeugende notie van mijn eerste penetratie in een andere vrouw draagt wel bij, maar is niet voldoende. Sonja kan wel uitkomst bieden.</text:p>
      <text:p text:style-name="P545"/>
      <text:p text:style-name="P546">…………….</text:p>
      <text:p text:style-name="P547"/>
      <text:p text:style-name="P548">Het zijn de verhalen van anderen die de documentaire afronden. Sonja is nu in zo´n verdovende toestand dat ze niet meer meekrijgt wat er werkelijk gebeurd is. Wel kan zij haar contact met de spirituele wereld beschrijven. De gekozen verhaallijn in de programma switcht tussen beide visies.<text:s/></text:p>
      <text:p text:style-name="P549"/>
      <text:p text:style-name="P550">Een destijds aanwezig sektelid beschrijft hoe ze is meegelokt onder dezelfde voorwendsels als Sonja. Haar beschrijving van de goeroe is anders. In haar verhaal heeft de eveneens oude meester lang grijs haar. “Een jezus figuur”; zijn haar woorden. De man heeft een lange snor en eveneens getande oorringen. Onder de mantel ontdekte zij een zwaar grijsbehaard lichaam. Zij weigerde haar medewerking aan de ontlasting van de goeroe. De <text:s/>getuige hoefde ook niet de bijtende rook honderdmaal in te ademenen. Sterker nog ze was overtuigd dat de overlevering stelde slechts vier keer te inhaleren. Na het verdovende middel te hebben ingeademd was haar eerder verzet gebroken. Weer onder de mantel der liefde ziet ze zijn nog steeds kloppende stang. Doorboort door een harde metalen ring die haar nu gewillige tong open haalde. Het koste moeite de piercing te ontdoen van de resten van de zuiveringsdaad.<text:s/></text:p>
      <text:p text:style-name="P551"/>
      <text:p text:style-name="P552">De lichte verdoving en de ban vaagde niet de voelbare dreiging weg. De overblijfselen van haar daad nog proevend wil ze vluchten. De lansen van de wachters verijdelen dit voornemen. Polsboeien maken een volgende poging onmogelijk. De getuige gaat verder met haar relaas. Stevig in de houdgreep wordt ze de inwijdingskamer ingebracht. De protesten worden letterlijk de mond gesnoerd. Een dildo wordt haar keel ingeduwd en op de plaats gehouden door een monddoek. De inwijdingsruimte heeft de grootte van een kleine sportkantine. Tegen de drie wanden van de ruimte zijn negen zwarte stoelen gezet. De stoelen zijn zo breed dat ze gemakkelijk ruimte geven aan twee personen. Ze wordt naar een van de middelste stoelen gebracht. Al zittend wordt de ketting die haar polsen verbind met een aan het plafond bevestigd touw verbonden. Het touw wordt opgetrokken zodat haar armen licht gebogen een juichhouding aannemen. Een leren band om haar nek wordt gehaakt aan een ring die is vastgepind in de grotmuur. Haar benen worden uit elkaar geduwd en rusten op de hoge leuningen. Middels dunne touwen wordt ze hieraan vastgestriemd. Haar zwarte flink behaard poesje voor jan en alleman presenterend.</text:p>
      <text:p text:style-name="P553"/>
      <text:soft-page-break/>
      <text:p text:style-name="P554">In de vele uren die komen worden een voor een de andere stoelen op een identieke wijze bevolkt. Steeds andere goeroe´s leiden de slachtoffertjes naar binnen. Onderwijl heeft een wachter een stoel gezet recht voor haar poesje. “Die opa gaat me zeker uitgebreid observeren”, was de eerste gedachte van de getuige. De angst was groot toen een scheermesje in de hand zichtbaar werd. Gelukkig was de man geroutineerd in het verwijderen van haar donzige haartjes. Een behandeling die ook de andere kruisjes ondergingen.</text:p>
      <text:p text:style-name="P555"/>
      <text:p text:style-name="P556">In de grot zijn twee nissen uitgehakt. Blijkbaar bedoeld als standplaats voor de wachters. Vlak voor de nis steken een meter van elkaar verwijderd twee metalen palen in de grond. De bedoeling wordt duidelijk als de twee tienermeisjes, schijnbaar gereed met hun vorige taak, naar binnen komen. Als zombies gaan ze met hun gezicht naar het midden tussen de twee palen staan. Ook zij worden voorzien van een dildo en monddoek. De meegekomen wachters verbinden de vooruitgestoken bovenarmen net boven de ellebogen met dikke touwen. Hetzelfde wordt gedaan met de polsen. Dezelfde touwen koppelen de gespreide onderbenen aan de metalen stangen. Een tuigje zoals paarden normaal gedragen wordt om het hoofd geplaatst. De lange haren worden bijeengeweven. Daarmee omgedoopt tot de teugels van het tuigje. Een korte maar krachtige duw op de rug laat de dames vooroverbuigen. Handig worden de handen verbonden aan een touw tussen de gespreide bovenbenen. Het moet een onweerstaanbare pose zijn voor de glunderende wachters die daarop hun positie in de nis innemen.</text:p>
      <text:p text:style-name="P557"/>
      <text:p text:style-name="P558">Niet snel daarna wordt door een aantal naakte oudjes, duidelijk herkenbaar als de eerdere goeroe´s, een zwarte tafel de ruimte ingereden. Op die tafel een vastgebonden naakte vrouw. Later herkend als Sonja. Volledig van de wereld. Haar verhaal neemt over.</text:p>
      <text:p text:style-name="P559"/>
      <text:p text:style-name="P560">Liggend op de koude tafel hoort ze haar goeroe in haar oor fluisteren. Boven de beangstigende koorgezang uit. “Kijk naar de hoeren van het beest.” Om zich heen ziet ze de gespreide meisjes op de grote zwarte stoelen. De andere goeroes gaan naar hun eerdere slachtoffertje. In de hand een zwarte kaars. Zonder pardon wordt de kaas omgekeerd in de gleufjes geschoven. Vele malen totdat ze vochtig zijn. Een tweede kaars <text:s/>volgt en blijft op die plek zitten. De andere vochtige kaarsen worden in een houder bevestigd. Ook haar eigen goeroe plant een kaars in haar holletje. Eveneens totdat deze is bevochtigd. Deze natte kaars wordt aangestoken en gebruikt om de andere kaarsen te ontsteken. Sonja is blij voor de meisjes dat de kruisjes kaal zijn. Anders zou er wel eens iets onbedoeld kunnen ontbranden. De goeroes gaan om Sonja heen staan. Haar goeroe fluistert weer. “Jouw lichaam wordt het altaar voor de aanroep van het beest.”<text:s/></text:p>
      <text:p text:style-name="P561"/>
      <text:p text:style-name="P562">De brandende kaarsen worden uit de tafelhouder gehaald. De goeroe´s laten het kaarsvet druppen tussen de benen van Sonja. Verdoofd door het roken van de pijp en de brandende pijn raakt Sonja buiten westen. <text:s/>In haar geest is ze gesitueerd in een open plek in een groot donker angstaanjagend bos. Helemaal alleen. Het ontweert en waait als. Harder en harder. De bomen zwiepen dreigend op en neer. Sterker en sterker. Het krijsend gezang om haar heen klinkt steeds doordringender. Ze voelt dat een onheilspellend wezen zijn opwachten zal maken.</text:p>
      <text:p text:style-name="P563"/>
      <text:p text:style-name="P564">Het krijsen gaat over in een gillend gezang als een wazig beeld verschijnt. Een felrood wezen komt nader en nader. Het duivels wezen heeft geen vaste lijnen. Opgebouwd uit een rode in brand staande vloeistof. Alleen zijn demonische katogen lijken vaste vorm te hebben. Dichterbij komend voelt ze de hitte van de verbranding. Uit het midden van het monster ontstaan twee lange dikke slierten. Een sliert gaat in de richting van haar mond. De snikhete sliert dwingt haar mond open. De sliert dringt via de keel de slokdarm in. De hitte maken haar lippen vervellen. Voordat haar gehemelte verbrand stroomt haar mond vol met een koele vloeistof. Gretig slikt ze de enorme hoeveelheden naar binnen om ook inwendig de brand te blussen.<text:s/></text:p>
      <text:p text:style-name="P565"/>
      <text:p text:style-name="P566">Hevig de oneindige hoeveelheden onsmakelijk vloeistof drinkend voelt ze hoe een andere sliert pardoes haar poesje binnendringt. Hier hetzelfde effect. Net voordat haar schaamlipjes verkolen dempt ook hier een waterval de pijn. Waar ze het laat weet ze niet maar emmers vol sap lijken haar holletje in te stromen. Dagen lang proeft en slikt ze het zoute kleverige sap dat inmiddels haar lichaam volop bedekt en vult. De uitputting is ondragelijk maar aan de vernedering lijkt geen eind te komen. Dan bezwijkt ze aan de beproeving. Geheel ontkleed ontwaakt ze in de Nevada woestijn. Haar ontbering is voorbij.<text:s/></text:p>
      <text:p text:style-name="P567"/>
      <text:p text:style-name="P568">De versie van de ooggetuige verschilt. De brandende kaars in haar kruisje verschroeien de laatste haartjes rond haar schaamstreek. De ogen dichtknijpend van de pijn ziet ze hoe de oudere heren zich te goed doen aan het onschuldig wichtje in het midden van de grot. Alleen de wachters doen niet mee. Zij kijken toe.<text:s/></text:p>
      <text:p text:style-name="P569"/>
      <text:p text:style-name="P570">De gebogen tienerbilletjes lachen de waarnemende opa´s toe. Verbaasd over de fitheid van deze levende lijken, ziet de getuige hoe de verschrompelde geslachtsdelen een oprechte pose aannemen. Dit is het sein de voor hun uitgespreide paradekutjes eens stevig te verkennen. De blonde manen van de trappelende veulentjes worden<text:s/><text:soft-page-break/>krachtig naar achteren getrokken. De pony’s worden beestachtig bereden. Een eerder onopgemerkte zweepje laat de paardebilletjes in galop gaan. Ze hinniken van <text:s/>ontbering als de heren de hink stap sprong nemen. <text:s text:c="2"/></text:p>
      <text:p text:style-name="P571"/>
      <text:p text:style-name="P572">……………………..</text:p>
      <text:p text:style-name="P573"/>
      <text:p text:style-name="P574">De rest van de documentaire hoef ik me niet meer te herinneren. De bevrediging is een feit. Na de daad, komen we elkaar aankijkend al snel tot de conclusie; dit behoeft geen vervolg. Beneden nog geen signaal uitgespeeld te zijn. Niet willen storen zetten de huisarts vrouw en ik de televisie aan. Toevallig is er een erotische film op “die nackte tsarin”. Terwijl we al een tijdje samen kijken voel ik ineens een hand tussen mijn benen. Blijkbaar is de vrouw door het zien van de film in een betere stemming gebracht. Ik besluit hetzelfde bij haar te doen. De film wordt zo een stuk opwindender. Bij de aftiteling verwisseling we onze handen voor onze monden. Deze wisseling heeft zijn uitwerking. Het afstompende gezicht van de vrouw is begraven tussen mijn benen. De rest van haar body is stimulerend genoeg. Zeker tezamen met de nieuwe smaak die ik proef. Elk poesje heeft zijn soesje. De wederzijdse komst is voelbaar aanstaande.<text:s/></text:p>
      <text:p text:style-name="P575"/>
      <text:p text:style-name="P576">Beneden zijn ondertussen de hoorbare gesprekken al een gehele tijd verstomd. Omdat we vermoeden dat ze in slaap zijn gevallen gaan we samen naar beneden. Bij binnenkomst zien we dat de huisarts net in Emmy wil binnenkomen. Emmy ontdoet zich direct van de huisarts en loopt ons tegemoet. “Sorry, ik weet dat het alleen een kennismaking betreft, maar het is wat uit de hand gelopen.” De vrouw van de huisarts en ik kijken elkaar met een oeps gezicht aan en houden wijs onze mond.<text:s/></text:p>
      <text:p text:style-name="P577"/>
      <text:p text:style-name="P578">Bijgekomen van de roes heroverweegt de huisarts zijn voornemen. De gedachte aan de eerdere voorgestelde tegenprestatie doen hem afzien van verdergaan. Hij kan niet leven met het idee dat een ander zijn vrouw van tijd tot tijd ook eens doorlicht. Teleurgesteld vraagt mijn vrouw aan hem of eenmaal in de maand een avondje samen doorbrengen wel mag. Ze blijft vertwijfeld vissen of de doktor zijn roman wil afronden. “We moeten het kat niet op de spek binden of?”, is zijn teleurstellende reactie. Vooral omdat de eega vasthoudt aan het voor wat hoort wat. Voor het gemak vergetend dat ze net door een ander is geconsumeerd. Het is nooit verkeerd nog een gunst van je partner tegoed te hebben.</text:p>
      <text:p text:style-name="P579"/>
      <text:p text:style-name="P580">In de weken die volgen gooit mijn vrouw nog een aantal lijntjes naar haar doktertje uit. De vangst blijft uit. Ondanks dat ze verschillend aas toepast wil hij niet toehappen. Uiteindelijk stopt ze met vissen. <text:s text:c="2"/>De vis is definitief uit haar netten ontsnapt.</text:p>
      <text:p text:style-name="P581"/>
      <text:p text:style-name="P582"/>
      <text:h text:style-name="P583" text:outline-level="1"><text:bookmark-start text:name="_Toc489630075"/>De vriendin<text:bookmark-end text:name="_Toc489630075"/></text:h>
      <text:p text:style-name="P584"/>
      <text:p text:style-name="P585"/>
      <text:h text:style-name="Heading2" text:outline-level="2"><text:bookmark-start text:name="_Toc489630076"/>De bewerking<text:bookmark-end text:name="_Toc489630076"/></text:h>
      <text:p text:style-name="P586"/>
      <text:p text:style-name="P587">Tracy is een vriendin van Emmy. Ze doet het met een oude man. Zij is trouw. Hij hokt er vrolijk met Truus en allervrouw op los. Steeds weer weet hij haar onzekerheid te gebruiken om zich verantwoorden. Ondanks dringende adviezen van Emmy de relatie te beëindigen kan Tracy dit om onduidelijke redenen niet doen. Ze blijft haar vriend zien. Wel is Tracy daardoor in psychische nood gekomen, en vraagt Emmy vaak om hulp. Emmy weet dat ik haar graag eens zou willen verkennen. Als tegenprestatie voor mijn open houding naar haar escapes met de huisarts, bedenkt zij een plan om dit voor elkaar te krijgen.</text:p>
      <text:p text:style-name="P588"/>
      <text:p text:style-name="P589">Emmy is in opleiding voor therapeut. In het kader van deze opleiding stelt ze aan Tracy voor een sessie met haar te oefenen. Tracy is hiertoe maar al te graag bereid gezien haar huidige toestand. Ze spreekt met Tracy af om eerst samen te eten waarna ze dan de sessie krijgt. Met veel zorg heb ik het avondeten bereid als Tracy zich meldt aan de deur. Emmy laat mij openen, wetend dat ik al uit zag naar haar komst en mijn komst. Ik begroet haar vriendelijk en neem haar jas aan. Ze moest eens weten welke kleding ik op dat moment in gedachten ook al heb weggenomen. Terwijl zij naar binnen gaat om Emmy te begroeten ga ik naar boven, onder het mom van een toiletbezoek. In werkelijkheid geef ik toe aan mijn lustgevoelens met Tracy in gedachten.</text:p>
      <text:p text:style-name="P590"/>
      <text:p text:style-name="P591">Speciaal voor de gelegenheid heeft Emmy een flesje wijn meegebracht. Alleen Tracy en ik nuttigen deze drank. Ik probeer haar glas zo onopzichtig mogelijk steeds bij te vullen. Ook Emmy doet hierin mee. Emmy excuseert zich vervolgens. Ze is totaal vergeten dat ze nog ergens langs moet en vraagt of Tracy een uurtje geduld wil hebben. Tracy en ik vervolgen de maaltijd en raken in een diep gesprek. Toch durf ik het niet aan de situatie te sturen. Ik merk niet aan haar dat ze hiertoe bereid is of daar zelfs gedachten aan heeft.<text:s/></text:p>
      <text:p text:style-name="P592"/>
      <text:p text:style-name="P593">Als Emmy terugkeert ziet ze dat dit plan niet heeft gewerkt. Daarop heeft ze echter iets bedacht. In de tussentijd heeft zij een zeer sterk lustopwekkend middel gekocht. Terwijl ze thee klaarzet voor een naborrel, doet ze in het glas van Tracy deze substantie. Tracy lijkt door dit middel wel in de door ons gewenste toestand te worden gebracht. Ze begint zelf over het onderwerp erotiek te praten en hoe ze daar tegenover staat. Emmy stelt dan dat er een interessant spel is dat een gesprek over dit onderwerp stimuleert.</text:p>
      <text:p text:style-name="P594"/>
      <text:p text:style-name="P595"/>
      <text:p text:style-name="P596"/>
      <text:h text:style-name="Heading2" text:outline-level="2"><text:bookmark-start text:name="_Toc489630077"/>Het spel<text:bookmark-end text:name="_Toc489630077"/></text:h>
      <text:p text:style-name="P597"/>
      <text:p text:style-name="Normal"><text:span text:style-name="T598">Emmy vertelt: “</text:span><text:span text:style-name="T599">Erotiektriviant is een variant op het reguliere triviant spel. Doel is het elkaar op erotisch gebied beter leren kennen. Erotiektrivant maakt gebruik van het reguliere triviant spel en benodigdheden. Het bord, de fiches en de dobbelstenen zijn nodig. De vragen worden echter niet gebruikt. Deze worden door de spelers zelf gesteld. Het spel werkt als volgt. De spelers beginnen allemaal op het centrale vlak. Diegene die het hoogste gooit mag beginnen. Hij gooit nogmaals en het aantal ogen bepaald hoeveel vakjes hij zich moet verplaatsen. Als hij op een wit vakje beland dan mag hij nogmaals gooien. Als hij op een gekleurd vakje (niet een triviant vak) komt dan moet hij een vraag beantwoorden. Met deze vraag wordt zijn kennis gecheckt van de seksuele wereld van de vragensteller. De kleur van het vak bepaald welk zintuig hierbij een rol speelt:<text:s/></text:span></text:p>
      <table:table table:style-name="Table600">
        <table:table-columns>
          <table:table-column table:style-name="TableColumn601"/>
          <table:table-column table:style-name="TableColumn602"/>
        </table:table-columns>
        <table:table-row table:style-name="TableRow603">
          <table:table-cell table:style-name="TableCell604">
            <text:p text:style-name="P605">Groen</text:p>
          </table:table-cell>
          <table:table-cell table:style-name="TableCell606">
            <text:p text:style-name="P607">Zien</text:p>
          </table:table-cell>
        </table:table-row>
        <table:table-row table:style-name="TableRow608">
          <table:table-cell table:style-name="TableCell609">
            <text:p text:style-name="P610">Blauw</text:p>
          </table:table-cell>
          <table:table-cell table:style-name="TableCell611">
            <text:p text:style-name="P612">Horen</text:p>
          </table:table-cell>
        </table:table-row>
        <table:table-row table:style-name="TableRow613">
          <table:table-cell table:style-name="TableCell614">
            <text:p text:style-name="P615">Geel</text:p>
          </table:table-cell>
          <table:table-cell table:style-name="TableCell616">
            <text:p text:style-name="P617">Ruiken</text:p>
          </table:table-cell>
        </table:table-row>
        <table:table-row table:style-name="TableRow618">
          <table:table-cell table:style-name="TableCell619">
            <text:p text:style-name="P620">Roze</text:p>
          </table:table-cell>
          <table:table-cell table:style-name="TableCell621">
            <text:p text:style-name="P622">Voelen</text:p>
          </table:table-cell>
        </table:table-row>
        <table:table-row table:style-name="TableRow623">
          <table:table-cell table:style-name="TableCell624">
            <text:p text:style-name="P625">Oranje</text:p>
          </table:table-cell>
          <table:table-cell table:style-name="TableCell626">
            <text:p text:style-name="P627">Proeven</text:p>
          </table:table-cell>
        </table:table-row>
        <table:table-row table:style-name="TableRow628">
          <table:table-cell table:style-name="TableCell629">
            <text:p text:style-name="P630">Bruin</text:p>
          </table:table-cell>
          <table:table-cell table:style-name="TableCell631">
            <text:p text:style-name="P632">Denken</text:p>
          </table:table-cell>
        </table:table-row>
      </table:table>
      <text:p text:style-name="P633">Met denken wordt bedoeld een geestelijke prikkeling (situatie).<text:s/></text:p>
      <text:p text:style-name="P634">De vraag moet gaan over het zintuig, betrekking hebben op de erotische belevingswereld van de vragensteller en te beantwoorden zijn als een meerkeuze vraag (maximaal drie keuzes). De vragensteller dient het antwoord vooraf op een kladbokje te noteren. Naderhand wordt het antwoord uitgebreid besproken. Als speler overtuigd is van zijn gelijk of ongelijk dan vervolgt het spel. Bij twijfel beslist de hoogste dobbelsteenworp van speler en vragensteller. Als de speler de vraag goed heeft beantwoord mag hij verder gaan. Anders gaat de beurt over.</text:p>
      <text:p text:style-name="Normal"><text:span text:style-name="T635">Als een speler op een triviant vakje komt dan verwoord hij een wens aangaande het zintuig dat past bij de kleur van het vakje. Deze wens wordt genoteerd voor later gebruik. De spelers spreken vooraf af bij hoeveel triviants het spel stopt. Als een speler dit aantal heeft verzameld dan dient hij zo spoedig mogelijk het centrale vak te bereiken. Diegene die dit het eerst lukt is de winnaar en deze mag een vrije wens (dus kleur onafhankelijk) toevoegen aan zijn arsenaal. Beide spelers gaan vervolgens hun in het spel verzamelde wensen (niet meer en niet minder) verwezenlijken middels een zelf verzonnen verhaal. Belangrijk is het dus voorafgaande aan het spel even tijd te nemen om na te denken over de wensen en eventueel al de mogelijk situatieschets</text:span><text:span text:style-name="T636">.”</text:span></text:p>
      <text:p text:style-name="P637"/>
      <text:p text:style-name="P638">Tracy vindt het spel wel erg openhartig, maar laat zich toch aangeschoten en verdoofd overhalen te gaan spelen. <text:s/>Het Tracy verplicht laten aanhoren van onze seksuele wensen windt ons erg op. Emmy blijft dan ook Tracy gedrogeerd houden vooral op die momenten waarop het lijkt alsof Tracy moeite met het spel krijgt. Emmy wint uiteindelijk het spel. Net doende alsof dit van tevoren ook zo is afgesproken zeg ik tegen Emmy dat ze als winnaar mag kiezen welk spel we nu gaan spelen. Tracy is niet meer zo helder dat ze hiertegen protesteert. Dat wordt anders als Tracy hoort dat we strippoker gaan spelen. “Nee, sorry hoor, daar doe ik niet aan mee!”. Samen met Emmy zetten wij Tracy onder druk. “Dat kun je niet maken, je hebt zelf gekozen mee te doen aan erotiektriviant, en nu je verliest wil je de consequenties niet dragen! En het is toch een onschuldig spel, je zit toch ook naakt in een sauna” Dit en meer wijn doen Tracy met tegenzin besluiten aan te horen wat het spel precies inhoudt.<text:s/></text:p>
      <text:p text:style-name="P639"/>
      <text:h text:style-name="Heading2" text:outline-level="2"><text:bookmark-start text:name="_Toc489630078"/>Strippoker<text:bookmark-end text:name="_Toc489630078"/></text:h>
      <text:p text:style-name="P640"/>
      <text:p text:style-name="P641">Emmy haalt een beschrijving uit een lade en laat deze haar zien. Tracy zegt niet meer zo scherp te kunnen zien en Emmy leest voor:</text:p>
      <text:p text:style-name="P642"/>
      <text:p text:style-name="P643">Strippoker is een spel waarbij het doel is een ander te laten strippen door te winnen met pokeren.<text:s/></text:p>
      <text:p text:style-name="P644">De regels van het spel zijn als volgt: Het spel bestaat rondes. Elke ronde bestaat uit twee onderdelen. Als eerste onderdeel trachten de spelers een betere hand te krijgen dan hun tegenstanders. In het tweede onderdeel proberen de spelers hun hand zo effectief mogelijk te verzilveren.Bij het eerste onderdeel is het zaak een betere set kaarten te verzamelen dan je tegenstander. Een set bestaat uit vier kaarten. Een open kaart naast de stapel en drie gesloten kaarten in de hand. Dit is tevens de beginsituatie van dit onderdeel. Elke deelnemer neemt drie kaarten ongezien van de tafel en houdt deze in de hand. Vervolgens draait elke deelnemer een kaart open naast de stapel. Elke speler bezit over zijn eigen stapel speelkaarten. Afwisselend beginnend ruilen de spelers hun gesloten kaarten met gesloten kaarten van de stapel. Bij dit ruilen worden de ingeruilde kaarten open op tafel gelegd. Dit geeft de tegenstander de gelegenheid de tactiek van de andere spelers te bepalen. Ruilen kan dus met minimaal een en maximaal 3 kaarten tegelijk. Als een speler denkt een betere set te hebben dan de ander dan kan hij besluiten het ruilen te stoppen. Hij zegt dan na het ruilen dat hij past. De andere speler mag dan nog een keer ruilen. Daarna gaat de ronde over in het tweede onderdeel. Een set wordt beoordeeld op grond van de volgende criteria. Eerst wordt gekeken of de set een serie bevat. Een serie betekent kaarten die gelijk zijn in hoogte (dus een serie boeren) of gelijk zijn in kleur en elkaar opvolgend (een serie schoppen aas, twee, drie, vier). Een serie is minimaal twee en maximaal vier kaarten groot. Als een set een serie bevat dan is deze set altijd beter dan een set zonder serie. Als beide sets een serie bevatten dan wordt gekeken naar de grootte van de serie. De set met de grootste serie is beter. Als de series in een set een gelijke grootte hebben dan wordt de hoogte van de serie bepaald. De hoogte van de serie is de optelling van de hoogte van de kaarten van die serie. De volgorde daarbij is van laag naar hoog; aas, twee – negen, boer, vrouw, heer, aas. De aas kan dus bij een opvolgende serie zowel de hoogste als de laagste kaart vertegenwoordigen. Bij een gelijke serie is de aas de hoogste kaart. Als serie even hoog zijn dan wordt de restkaart meegeteld. Indien zelfs dan geen verschillen optreden dan zijn de sets even goed. Bij het tweede onderdeel gaan de spelers hun set zo goed mogelijk te verzilveren. De speler maken daarbij gebruik van het inzetten van kledingstukken of vergelijkbare goederen. Minimaal moet een speler een kledingstuk inzetten, maximaal drie kledingstukken. Naast ondergoed mag een speler slechts zes kledingstukken aanhebben. De speler die wint int de kledingstukken van de ander. De andere speler, mag indien mogelijk en alleen wanneer zijn kuisheid in het gevaar komt, de andere speler, in plaats van zelf kledingstukken uit te trekken, vragen weer kledingstukken aan te trekken. De speler die niet begonnen is met ruilen doet de eerste inzet. De tweede speler bedenkt of hij wel/niet met deze inzet meegaat of zelf deze wil verhogen (alleen mogelijk als de inzet niet al maximaal is). In het eerste geval wint de andere speler zonder dat deze zijn set kaarten hoeft te tonen. In het tweede geval tonen de spelers beiden hun kaarten en wint diegene met de hoogste set. In het laatste geval gaat de beurt terug naar de andere speler, die vervolgens dezelfde afweging moet gaan maken. In het uitzonderlijke geval dat de sets even hoog zijn dan verliezen beide spelers hun inzet.</text:p>
      <text:p text:style-name="P645">Op het moment dat een speler minder dan drie kledingstukken kan inzetten gaat de volgende fase in. Het verloop van deze fase is afhankelijk van de situatie. Als de speler zichzelf kan inzetten dan dient de betreffende speler dit nu te doen. Hij vraagt de andere speler om een wens die hij voor een vast te stellen aantal kledingstukken zal vervullen. Het aantal in te zetten kledingstukken hierbij is minimaal drie en maximaal vijf, afhankelijk van de wens of de aanpassing van de wens. De kledingstukken worden door de aanbiedende speler aangetrokken. De andere speler krijgt een wensbevestiging. Vervolgens gaat het spel op de gebruikelijk wijze voort.</text:p>
      <text:p text:style-name="P646">Als de speler zichzelf niet meer kan inzetten dan is de maximale inzet verlaagd tot het aantal kledingstukken dat hij nog bezit. Als hij verliest dan is het spel over.</text:p>
      <text:p text:style-name="P647"/>
      <text:h text:style-name="Heading2" text:outline-level="2"><text:bookmark-start text:name="_Toc489630079"/>De winnaar<text:bookmark-end text:name="_Toc489630079"/></text:h>
      <text:p text:style-name="P648"/>
      <text:p text:style-name="Normal"><text:span text:style-name="T649">Hier stopt Emmy. Ze vergeet bewust de laatste zin op het papier te noemen; “</text:span><text:span text:style-name="T650">Winnen betekent dat je de wens mag innen</text:span><text:span text:style-name="T651">.” Al gauw blijkt dat Tracy ondanks de drogering een natuurtalent in dit spel is. Voordat wij het in de gaten hebben, zitten Emmy en ik al in de gevarenzone. Ondanks dat we elkaar helpen. Dit alles tot groot leedvermaak van Tracy zelf. Ze stelt op dit moment voor om het spel te stoppen, zodat we niet in een hachelijke situatie komen. “Wij hebben gezegd het spel te spelen, dan spelen we het ook”; is onze reactie. “Ok,” lacht Tracy; “dan moeten jullie het zelf weten.” Door alle drank gaat Tracy even waggelend naar het toilet. Dan besluit ik voor de volgende ronde de kaarten te steken. Tracy verliest daarop en wij kunnen ons weer aankleden. Elke keer zorgt Emmy voor afleiding zodat ik ook de volgende rondes kan steken. Zodoende zijn weer binnen een aantal keer weer aangekleed en zit Tracy nu zelf in haar ondergoed.<text:s/></text:span></text:p>
      <text:p text:style-name="P652"/>
      <text:p text:style-name="P653">Het is nu alles of niets. Tracy begrijpt dat ze nu niet kan weigeren verder te spelen. Ze ging immers zelf in de omgekeerde situatie ook door. Mijn opwinding was al behoorlijk gestegen door de aanblik van haar ondergoed. Natuurlijk win ik de wens. Voorzichtig stel ik dat ik graag onder genot van een natuurfilm oraal bevredigd wil worden. Tracy bloost. Deze uiting en aanblik doen mijn opwinding nog verder stijgen. Beschaamd ontdoet Tracy zich langzaam van haar laatste kledingstukken. Helaas kan ik alleen hiervan de gevolgen voor haar bovenlichaam zien. Ze schuift namelijk zo dicht tegen de eettafel dat de kern van mijn interesse niet zichtbaar is. De opwinding is bij mij nou groot dat ik me moeilijk kan bedwingen haar niet direct te bespringen. Toch durf ik hier geen uiting aan te geven. Met haar handen als enige bescherming, vraagt Tracy of ze zich weer mag aankleden. Emmy reageert daarop glimlachend maar stiekem verkennend; “Je moet nog de wens inwilligen!”. Tracy lacht alsof Emmy dit grappig bedoelt. Emmy laat Tracy de beschrijving zien. Helaas ook hiermee is Tracy niet over te halen. “De drank is ons naar het hoofd gestegen. Laten we even weer bij zinnen komen,” glimlacht Tracy vriendelijk. “Maar goed, voor de winnaar wil ik wel als beloning mijn kleding aanbieden voor de duur van de avond.” Ze geeft me haar bundeltje goed en vervolgt, “misschien is het verstandig om de avond te vervolgen zoals oorspronkelijk gepland.”</text:p>
      <text:p text:style-name="P654"/>
      <text:p text:style-name="P655">Emmy gaat over tot de afgesproken sessie. Ik verlaat met Tracy’s kleding de woonkamer. Aan de blik van Emmy kan ik aflezen dat ik in de buurt moet blijven. Mijn oor is tegen de deur gedrukt als Emmy begint met het hypnotiseren van Tracy. De combinatie met drank en het genotsmiddel maken dat Tracy snel in een zeer diepe trance raakt. Op dit moment besluit ik de kamer weer in te komen. Emmy knipoogt als ik naar Tracy toe loop om de gemiste details nog minutieus en van zeer nabij te inspecteren. Terwijl ik haar zo observeer vraagt Emmy aan Tracy om eens het meest recente bijeenzijn met haar vriend te beschrijven. Met als doel te achterhalen waar de schoen nu precies wrikt.</text:p>
      <text:p text:style-name="P656"/>
      <text:p text:style-name="P657">“Dat is gisteravond. Ik kwam moe thuis na een dag werken en zag mijn vriend al bij de deur staan. Direct ervoer ik een beklemmend gevoel, vooral toen zijn tong mijn tong raakte bij de intense welkomstzoen. We gingen samen naar binnen en hij vroeg me zijn lievelingseten te bereiden. Omdat ik niet de ingrediënten in huis op, moest ik daarvoor met tegenzin nog weer op pad. Maar goed, we hadden samen lekker gegeten en terwijl ik de afwas doe gaan zijn handen onder mijn rokje. Oja, dat moet ik nog uitleggen. Als we samen zijn dan wil mijn vriend altijd dat ik een kort rokje zonder iets eronder aan doe. Het duurde hierna niet lang of ik werd van achteren op het aanrecht genomen. Daarna vertrok hij gelukkig weer.” Emmy vraagt hoe zij zelf met een vriend de avond zou willen doorbrengen.<text:s/></text:p>
      <text:p text:style-name="P658"/>
      <text:p text:style-name="P659">Tracy beschrijft eerst een zeer romantisch diner gevolgd door een fijne knuffelavond. Uiteindelijk gaat haar beschrijving over in een meer intiem samenzijn. Ze zou het fijn vinden als eerst zachtjes haar haren werden gestreeld. Nog steeds dicht bij haar naakte lichaam neem ik het koene besluit haar beschrijving in daden om te zetten, en laat mijn vingers door haar haren glijden. Tracy is zo diep weg dat ze dit als onderdeel van haar trance ervaart. Dit besef doet mij nog meer stimuleren verder te gaan. “Nadat hij mijn haren heeft gestreeld, gaan ze handen over mijn borsten.” Ik volg de instructies braaf op. “Eerst de gehele borst in twee handen, dan langzaam een vinger die al cirkelend naar mijn tepel toe werkt. De andere hand gaat verder naar beneden en streelt de haren tussen mijn benen. Ook hier gaat een vinger al cirkelend naar het midden, waar hij vervolgens langzaam in het holletje verdwijnt.” De rest laat zich raden. Tracy nog steeds in de veronderstelling dat dit alles in haar onderbewustzijn afspeelt, geeft zich aan mijn strelingen over, hetgeen al vlug naar een hoogtepunt leidt. Dit hoogtepunt neemt de laatste drempel weg een groot persoonlijk geheim op te biechten.<text:s/></text:p>
      <text:p text:style-name="P660"/>
      <text:p text:style-name="P661"/>
      <text:h text:style-name="Heading2" text:outline-level="2"><text:bookmark-start text:name="_Toc489630080"/>De biecht<text:bookmark-end text:name="_Toc489630080"/></text:h>
      <text:p text:style-name="P662"/>
      <text:p text:style-name="P663">Kun je je nog herinneren dat ik een maand of vier geleden met mijn vriend op wintersportvakantie ben geweest. Het was voor mij de eerste keer dat op ski’s stond. <text:s/>De eerste lesdag was dan ook een nieuwe ervaring. Mijn vriend die al vaker heeft geskied, had afgesproken met een aantal oud-schoolvrienden die in onze wintersport plaats wonen. Ik kon wel begrijpen dat we op deze manier elkaar overdag weinig zagen. S’avonds maakten we dit gemis weer ruimschoots goed. Tot de vierde dag ging de vakantie zo zijn gangetje. Toen gebeurde er iets vervelends. In de skilift hoorde ik een oudere Duitse dame tegen een vriendin praten over een Nederlandse man die ze tijdens het après-ski hadden leren kennen en die ze vanochtend “beter” heeft leren kennen. Toen ze de man beschreef, schrok ik. Het voldeed precies aan de beschrijving van mijn vriend. Ontzet door deze ontdekking, ben ik na de les een café ingedoken. Pratend met een medeskister over mijn problemen, goot ik de ene na de andere glüh-wein achterover.</text:p>
      <text:p text:style-name="P664">Aangeschoten kwam ik naar onze hotelkamer toe, waar mijn vriend al ongeduldig op mijn komst zat te wachten. Zonder echt te vragen naar de reden van mijn te late aankomst, begon hij mij te strelen en te zoenen. Bedwelmd en overmand was ik de eerste minuten niet in staat tegen zijn avances in te gaan. Terwijl hij druk in de weer was mijn intiem te betasten, werd ik ineens helder en druk hem van me af. Hij keek me verbouwereerd en vragend aan. Ik vroeg hem daarop direct waar hij de dag heeft doorgebracht. Geschrokken denkt hij even na. “Bij mijn vrienden! Waarom vraag je dat?”, is zijn antwoord. Ik durf hem niet onterecht te beschuldigen en reageer op deze vraag met als reden nieuwsgierigheid. Terwijl hij zijn handelingen vervolgde, bleef ik twijfelen over de waarheidsgehalte van zijn verklaring. Boven op me liggende vertelde hij mij dat zijn vrienden die avond komen kennismaken. Ik besluit tot dan te wachten om zijn antwoord te verifiëren.</text:p>
      <text:p text:style-name="P665">De avond verliep zoals al die anderen. Het niet elkaar zien overdag betekende dat mijn vriend ‘s avonds de schade moest inhalen. Tussen de bedrijven door genoot ik van het exclusieve diner dat mijn vriend op de hotelkamer heeft laten bezorgen. Dit had echter geen heilzame uitwerking op mijn aangeschoten toestand. De meegeleverde kostbare wijn kon ik volgens mijn vriend niet laten staan. En aangezien hij geen alcohol drinkt stond ik er wat dat betreft alleen voor. Het is al bijna tegen middennacht als eindelijk zijn vrienden opduiken. Ik ben door de intoxicatie en inspanning van die avond <text:s/>zweverig als ik de deur open. <text:s/>Weer wordt een glas met wijn geschonken. Dit was blijkbaar de druppel, want wat er daarna gebeurd is kan ik zelf niet meer herinneren.</text:p>
      <text:p text:style-name="P666">Als ik de volgende ochtend met een zware kater ontwaak, is de hotelkamer een grote rotzooi. Onzeker over het geheugenverlies over de afloop van die avond, probeer ik mijn vriend te vinden. De kamer is echter verlaten. Op zoek naar hem struin ik het hotel af. Ik kan hem nergens vinden. Om te ontspannen besluit ik tot een sauna bezoek. De sauna blijkt geheel verlaten op dit nog vroege uur. In een rustig hoekje waar niemand mij kan zien, ga ik languit liggen en laat de hete lucht de kater doen verzachten. Opeens hoor ik gegiechel. Een stelletje komt de sauna binnen. Oei, denk ik als ze deur achter zich op slot doen. Ze weten niet dat er iemand is en zoals nu elkaar nu omhelzen gaan ze dingen doen die niet voor andermans ogen geschikt zijn. Voordat ik de tijd had na te denken over hoe ik moet reageren als ik tevoorschijn kom, liggen de twee al in een penibele positie. Ik had geen keus, ik kon niet meer uit mijn schuilplaats komen. Ongewild sloeg ik de twee gade en zag ze dingen doen waar ik nog nooit zelfs aan gedacht had. Dan ineens herken ik de man; het is mijn vriend. Totaal ontdaan, kruip ik nog verder in mijn hoek en wacht tot de kwelling voorbij is. Zonder mijn vriend te spreken pak ik de trein terug naar huis en wil hem nooit meer zien.</text:p>
      <text:p text:style-name="P667">Een aantal dagen na mijn thuiskomst belt mijn vriend aan. Ik wil hem eerst niet binnenlaten, maar laat me toch overhalen tot een gesprek. Terwijl ik vol woede zit te wachten op zijn uitleg, haalt hij een videoband te voorschijn. Hij zegt dat deze band alles zal verklaren en de lucht tussen ons zal opklaren. Ongelovig laat ik hem de band in de videorecorder stoppen en wacht benieuwd op de eerste beelden. Tot mijn grote ontsteltenis zie ik een vrouw naakt op bed liggen, terwijl de gepensioneerde kameraden van mijn vriend om haar heen staan. De camera is gefocusseerd <text:s/>op haar onderlijf. Terwijl de zwaar gerimpelde mannenlijven ruimte maken voor de camera, zoomt deze in op haar poesje. Deze is geheel besmeurd. Dan herken ik het onderlijf, het is mijn eigen.</text:p>
      <text:p text:style-name="P668"/>
      <text:p text:style-name="P669">Mijn vriend stelt terecht dat iemand die hem dit aandoet, geen recht heeft van spreken over zijn avontuurtjes. Ik kan niet anders dan hem hierin volmondig gelijk te geven. Beschaamd als ik ben wijt ik dit aan de grote hoeveelheid drank die ik die avond onbewust heb genuttigd, maar vertel daarbij dat ik dit geen excuus vind. Gezien de gebeurtenissen stel ik voor elkaar niet verder te kwetsen door elkaar niet meer te zien en vernietig de band. “Ik heb kopieën”, is de reactie van mijn vriend. Zijn blik daarbij is veelzeggend. Nu begrijp je waarom ik niet de relatie kan beëindigen. Ik kan niet leven met het idee dat een video met deze inhoud over de toonbank gaat. Het steeds weer toegeven aan de grillige lusten van iemand waarvan ik niet meer hou, brengt me echter in psychische problemen. Nu begrijp je waarom.</text:p>
      <text:p text:style-name="P670"/>
      <text:p text:style-name="P671"/>
      <text:h text:style-name="Heading2" text:outline-level="2"><text:bookmark-start text:name="_Toc489630081"/>De beloning<text:bookmark-end text:name="_Toc489630081"/></text:h>
      <text:p text:style-name="P672"/>
      <text:p text:style-name="P673">Als Tracy uit haar hypnose ontwaakt is ze direct nuchter. Ze weet wat ze heeft verteld en schrikt als ze ziet dat ik ook ineens bij de sessie zit. Ze smeekt ons aan niemand dit geheim door te vertellen. Emmy zegt dat voor wat hoort wat. Tracy heeft nog naar mij toe een schuld openstaan. Tracy ziet aan onze gezichten dat we deze situatie willen uitbuiten en geen rekenschap gaan houden met haar. Emmy helpt Tracy op haar knieën voor me, terwijl ik rustig op de bank zit. Emmy zet een gepaste film op. <text:s/>Ik open mijn gulp en Tracy opent haar mond. Emmy zegt dat we het verder zelf wel uitzoeken en verlaat de kamer. Terwijl ik naar de pornofilm kijk, laat ik me door Tracy verder bevredigen. Dit was gezien mijn heftige staat geen langdurige opgave. Ik had wel spijt dat mijn voorraad al tijdens mijn eerder toiletbezoek was verminderd, als Tracy de voltrekking nuttigt.<text:s/></text:p>
      <text:p text:style-name="P674"/>
      <text:p text:style-name="P675">Met een beteuterd gezicht wil Tracy haar biezen pakken. Op het moment dat ze voor over buigt om haar bundeltje op te rapen kijk ik vol tussen haar benen. Ik merk dat er nog een restje opwinding in me schuilt en maak van haar houding gebruik om ook dit deel van haar te verkennen. Tracy loopt verstijfd door het langdurig innemen van deze ongemakkelijke houding, mijn taak was behoorlijk verzwaard door de eerdere inspanningen, het huis uit. Voordat ze op haar fiets stapt geef ik de geschreven wensen uit het triviant spel mee. Tracy weet zo haar opdracht elke vrijdagavond als Emmy op cursus gaat.<text:s/></text:p>
      <text:p text:style-name="P676"/>
      <text:h text:style-name="P677" text:outline-level="1"><text:bookmark-start text:name="_Toc489630082"/><text:soft-page-break/>Roodkapje<text:bookmark-end text:name="_Toc489630082"/></text:h>
      <text:p text:style-name="P678"/>
      <text:p text:style-name="P679"><text:span text:style-name="T680">Roodkapje wil graag op bezoek bij grootmoeder. Haar mama<text:s/></text:span><text:span text:style-name="T681"><office:annotation office:name="0" xml:id="1008842640"><dc:creator>Slagter</dc:creator><meta:creator-initials>J.R.</meta:creator-initials><text:p text:style-name="CommentText"><text:page-number text:fixed="false">Pagina: 1</text:page-number>Moeders doet dit met duidelijke erotische gevoelens</text:p></office:annotation>kleedt<text:s/></text:span><text:span text:style-name="T682"><office:annotation-end office:name="0"/></text:span><text:span text:style-name="T683">roodkapje aan. Ze krijgt haar netste korte jurk en een mand met lekkers mee. Al huppelend gaat roodkapje op weg. Voordat ze bij grootmoeder is, moet ze eerst door een donker bos. Het bos is het territorium van de jagers. Wolven en ander gespuis worden door hen uit het bos verdreven. Voor hun beschermende taak vragen ze aan reigers, als blijk van waardering voor hun inspanning, slechts een kleine<text:s/></text:span><text:span text:style-name="T684"><office:annotation office:name="1" xml:id="1008842815"><dc:creator>Slagter</dc:creator><meta:creator-initials>J.R.</meta:creator-initials><text:p text:style-name="CommentText"><text:page-number text:fixed="false">Pagina: 1</text:page-number>Moeder waarschuwt dat ze zo haar lekkers kan kwijtraken</text:p></office:annotation>tegenprestatie</text:span><text:span text:style-name="T685"><office:annotation-end office:name="1"/></text:span><text:span text:style-name="T686">.<text:s/></text:span></text:p>
      <text:p text:style-name="P687"><text:span text:style-name="T688">Al spoedig ontmoet roodkapje een jager. Roodkapje geeft de jager wat nog over is van het lekkers dat ze heeft meegekregen. Samen peuzelen ze het lekkers op terwijl de jager roodkapje<text:s/></text:span><text:span text:style-name="T689"><office:annotation office:name="2" xml:id="1008842611"><dc:creator>Slagter</dc:creator><meta:creator-initials>J.R.</meta:creator-initials><text:p text:style-name="CommentText"><text:page-number text:fixed="false">Pagina: 1</text:page-number>Hij aait haar blote benen</text:p></office:annotation>vriendelijk<text:s/></text:span><text:span text:style-name="T690"><office:annotation-end office:name="2"/></text:span><text:span text:style-name="T691">en geïnteresseerd van alles<text:s/></text:span><text:span text:style-name="T692"><office:annotation office:name="3" xml:id="1008842690"><dc:creator>Slagter</dc:creator><meta:creator-initials>J.R.</meta:creator-initials><text:p text:style-name="CommentText"><text:page-number text:fixed="false">Pagina: 1</text:page-number>Vooral de weg die ze gaat volgen</text:p></office:annotation>vraagt</text:span><text:span text:style-name="T693"><office:annotation-end office:name="3"/></text:span><text:span text:style-name="T694">. De jager is met het mandje tevreden, maar vraagt nog wel een<text:s/></text:span><text:span text:style-name="T695"><office:annotation office:name="4" xml:id="1008842724"><dc:creator>Slagter</dc:creator><meta:creator-initials>J.R.</meta:creator-initials><text:p text:style-name="CommentText"><text:page-number text:fixed="false">Pagina: 1</text:page-number>De jager heeft daarbij een zichtbare maar onuitgesproken voorkeur voor haar jurkje</text:p></office:annotation>aandenken<text:s/></text:span><text:span text:style-name="T696"><office:annotation-end office:name="4"/></text:span><text:span text:style-name="T697">aan deze fijne kennismaking. Roodkapje geeft de jager haar<text:s/></text:span><text:span text:style-name="T698"><office:annotation office:name="5" xml:id="1008842749"><dc:creator>Slagter</dc:creator><meta:creator-initials>J.R.</meta:creator-initials><text:p text:style-name="CommentText"><text:page-number text:fixed="false">Pagina: 1</text:page-number>De jager verhult zijn teleurstelling</text:p></office:annotation>sokjes</text:span><text:span text:style-name="T699"><office:annotation-end office:name="5"/></text:span><text:span text:style-name="T700">. Het bospad is immers zacht en de sokjes worden toch alleen maar smerig. De jager wuift roodkapje lang na en verdwijnt dan gehaast <text:s/>het bos in.</text:span></text:p>
      <text:p text:style-name="BodyText"><text:span text:style-name="T701">In haar sas door deze prettige eerste ontmoeting met de jagers, voor wie roodkapjes moeder juist vaak heeft gewaarschuwd, huppelt roodkapje verder. Opeens hoort ze een geroezemoes vanuit de bosjes. Het lijkt net of mensen stilletjes met elkaar aan het praten zijn. Als roodkapje dichterbij komt dan stopt het gefluister en stapt een jager uit de bosjes. Ook hij vraagt een kleine gunst. Roodkapje zegt al haar lekkers aan een andere jager te hebben gegeven. De jager zegt dat ze toch nog veel lekkers aan te bieden heeft. Roodkapje kijkt de jager eerst verward aan. Ze volgt de ogen van de jager die roodkapje van top tot teen opnemen. Dan begrijpt ze wat de jager bedoelt. Ze laat de jager haar lekkers<text:s/></text:span><text:span text:style-name="T702"><office:annotation office:name="6" xml:id="1008842192"><dc:creator>Slagter</dc:creator><meta:creator-initials>J.R.</meta:creator-initials><text:p text:style-name="CommentText"><text:page-number text:fixed="false">Pagina: 1</text:page-number>Roodkapje moet ze uitkleden</text:p></office:annotation>zien</text:span><text:span text:style-name="T703"><office:annotation-end office:name="6"/></text:span><text:span text:style-name="T704">,<text:s/></text:span><text:span text:style-name="T705"><office:annotation office:name="7" xml:id="1008842164"><dc:creator>Slagter</dc:creator><meta:creator-initials>J.R.</meta:creator-initials><text:p text:style-name="CommentText"><text:page-number text:fixed="false">Pagina: 1</text:page-number>Alles wordt betast en de vinger wordt in haar poes gestoken</text:p></office:annotation>voelen<text:s/></text:span><text:span text:style-name="T706"><office:annotation-end office:name="7"/></text:span><text:span text:style-name="T707">en<text:s/></text:span><text:span text:style-name="T708"><office:annotation office:name="8" xml:id="1008842141"><dc:creator>Slagter</dc:creator><meta:creator-initials>J.R.</meta:creator-initials><text:p text:style-name="CommentText"><text:page-number text:fixed="false">Pagina: 1</text:page-number>De jager likt haar intieme delen tot ze beschaamd klaar komt</text:p></office:annotation>proeven</text:span><text:span text:style-name="T709"><office:annotation-end office:name="8"/></text:span><text:span text:style-name="T710">. Naderhand wil ook deze jager graag een aandenken. Roodkapje protesteert. Zonder jurkje is ze bang andere geïnteresseerden te lokken. En bovendien is het bos kil. Uiteindelijk besluit ze met tegenzin haar onderboekje achter te laten. Gelukkig is haar jurkje net lang genoeg om haar kuisheid te bewaren. De opgetogen jager wuift met zijn<text:s/></text:span><text:span text:style-name="T711"><office:annotation office:name="9" xml:id="1008842115"><dc:creator>Slagter</dc:creator><meta:creator-initials>J.R.</meta:creator-initials><text:p text:style-name="CommentText"><text:page-number text:fixed="false">Pagina: 1</text:page-number>Onderbroekje</text:p></office:annotation>trofee<text:s/></text:span><text:span text:style-name="T712"><office:annotation-end office:name="9"/></text:span><text:span text:style-name="T713">roodkapje zegevierend na terwijl zij haar weg vervolgt.</text:span></text:p>
      <text:p text:style-name="BodyText"><text:span text:style-name="T714">De ontmoeting met deze jager heeft een heel andere indruk achter gelaten dan bij de eerste jager. Roodkapje is niet meer vrolijk en blij. Ze neemt haar moeders waarschuwing nu wel serieus en besluit voorzichtig en minder luidruchtig haar pad te vervolgen. Dit alles in de hoop niet nog meer jagers aan te trekken. Vermoeid van alle opwinding neemt roodkapje uiteindelijk even rust. Onder een grote eikenboom gaat ze languit<text:s/></text:span><text:span text:style-name="T715"><office:annotation office:name="10" xml:id="1008842094"><dc:creator>Slagter</dc:creator><meta:creator-initials>J.R.</meta:creator-initials><text:p text:style-name="CommentText"><text:page-number text:fixed="false">Pagina: 1</text:page-number>Haar kutje is net te zien</text:p></office:annotation>liggen<text:s/></text:span><text:span text:style-name="T716"><office:annotation-end office:name="10"/></text:span><text:span text:style-name="T717">en sluit ze haar ogen. Wat volgt is een diepe slaap.<text:s/></text:span></text:p>
      <text:p text:style-name="BodyText"><text:span text:style-name="T718">Dan wordt ze plots wakker. Een fors gebouwde grimmige jager buigt zich over haar heen. Zijn<text:s/></text:span><text:span text:style-name="T719"><office:annotation office:name="11" xml:id="1008842053"><dc:creator>Slagter</dc:creator><meta:creator-initials>J.R.</meta:creator-initials><text:p text:style-name="CommentText"><text:page-number text:fixed="false">Pagina: 1</text:page-number>Ze heeft geen onderbroekje aan</text:p></office:annotation>vermoeden<text:s/></text:span><text:span text:style-name="T720"><office:annotation-end office:name="11"/></text:span><text:span text:style-name="T721">wordt bevestigd als hij zijn hand onder haar jurk laat glijden. Roodkapje begrijpt direct wat de jager<text:s/></text:span><text:span text:style-name="T722"><office:annotation office:name="12" xml:id="1008842071"><dc:creator>Slagter</dc:creator><meta:creator-initials>J.R.</meta:creator-initials><text:p text:style-name="CommentText"><text:page-number text:fixed="false">Pagina: 1</text:page-number>Een seksuele gunst</text:p></office:annotation>wil</text:span><text:span text:style-name="T723"><office:annotation-end office:name="12"/></text:span><text:span text:style-name="T724">. Weer bedenkt ze een<text:s/></text:span><text:span text:style-name="T725"><office:annotation office:name="13" xml:id="1008841944"><dc:creator>Slagter</dc:creator><meta:creator-initials>J.R.</meta:creator-initials><text:p text:style-name="CommentText"><text:page-number text:fixed="false">Pagina: 1</text:page-number>Dezelfde gunst als bij de tweede jager</text:p></office:annotation>gunst</text:span><text:span text:style-name="T726"><office:annotation-end office:name="13"/></text:span><text:span text:style-name="T727">. Deze jager wil echter alleen zijn wensen gerealiseerd zien. Nu is het roodkapje zelf die moet<text:s/></text:span><text:span text:style-name="T728"><office:annotation office:name="14" xml:id="1008842029"><dc:creator>Slagter</dc:creator><meta:creator-initials>J.R.</meta:creator-initials><text:p text:style-name="CommentText"><text:page-number text:fixed="false">Pagina: 1</text:page-number>De jager laat zijn pik zien</text:p></office:annotation>zien</text:span><text:span text:style-name="T729"><office:annotation-end office:name="14"/></text:span><text:span text:style-name="T730">,<text:s/></text:span><text:span text:style-name="T731"><office:annotation office:name="15" xml:id="1008842004"><dc:creator>Slagter</dc:creator><meta:creator-initials>J.R.</meta:creator-initials><text:p text:style-name="CommentText"><text:page-number text:fixed="false">Pagina: 1</text:page-number>Ze trek hem af</text:p></office:annotation>voelen<text:s/></text:span><text:span text:style-name="T732"><office:annotation-end office:name="15"/></text:span><text:span text:style-name="T733">en<text:s/></text:span><text:span text:style-name="T734"><office:annotation office:name="16" xml:id="1008841985"><dc:creator>Slagter</dc:creator><meta:creator-initials>J.R.</meta:creator-initials><text:p text:style-name="CommentText"><text:page-number text:fixed="false">Pagina: 1</text:page-number>Ze moet zijn tong afzuigen, hem vervolgens pijpen en het sperma doorslikken</text:p></office:annotation>proeven</text:span><text:span text:style-name="T735"><office:annotation-end office:name="16"/></text:span><text:span text:style-name="T736">. Als ze de wensen van de jager heeft ingewilligd wil ze snel weer haar weg vervolgen. De jager eist nog een aandenken en zonder haar te vragen rukt hij het jurkje van haar lijf. Daarbij valt de snor van de jager zijn gezicht. Roodkapje herkent de eerste jager. Voordat ze echter verontwaardigt kan<text:s/></text:span><text:span text:style-name="T737"><office:annotation office:name="17" xml:id="1008841913"><dc:creator>Slagter</dc:creator><meta:creator-initials>J.R.</meta:creator-initials><text:p text:style-name="CommentText"><text:page-number text:fixed="false">Pagina: 1</text:page-number>De jager heeft twee keer een gunst genomen</text:p></office:annotation>reageren<text:s/></text:span><text:span text:style-name="T738"><office:annotation-end office:name="17"/></text:span><text:span text:style-name="T739">pakt hij haar stevig bij de arm en leidt haar het bos uit. Ze vraagt nog smekend op haar knieën om haar jurkje. Zo kan ze toch niet haar weg vervolgen. De jager keert al lachend en zonder omkijken terug het bos in, waar hij wordt opgewacht door de tweede jager. Onthutst ziet roodkapje nog steeds deze jager honend en triomfantelijk haar onderbroekje omhooghouden.<text:s/></text:span><text:span text:style-name="T740"><office:annotation office:name="18" xml:id="1008842283"><dc:creator>Slagter</dc:creator><meta:creator-initials>J.R.</meta:creator-initials><text:p text:style-name="CommentText"><text:page-number text:fixed="false">Pagina: 1</text:page-number>De jagers hebben samengewerkt om haar te misbruiken</text:p></office:annotation>Bedrogen<text:s/></text:span><text:span text:style-name="T741"><office:annotation-end office:name="18"/></text:span><text:span text:style-name="T742">draait roodkapje zich om en vervolgt haar weg.</text:span></text:p>
      <text:p text:style-name="P743"><text:span text:style-name="T744">Kwaad en verdrietig rent roodkapje de open weiden in die leiden naar het huisje van haar grootmoeder. Wat roodkapje echter niet weet is dat grootmoeder is overvallen door de grote boze wolf. De jagers hebben hun werk goed gedaan en de wolf uit het bos verdreven. De wolf die noodgedwongen moest zoeken naar een ander onderkomen koos daarvoor het huisje van grootmoeder. Grootmoeders schrik was groot toen ze de wolf in haar deuropening zag staan. De wolf duwde haar voordat ze een kreet kan slaken het huis terug in. De wolf had door de hevige jacht een intense honger. Grootmoeder is weliswaar taai maar stilt zijn honger. Toch blijft een<text:s/></text:span><text:span text:style-name="T745"><office:annotation office:name="19" xml:id="1008841875"><dc:creator>Slagter</dc:creator><meta:creator-initials>J.R.</meta:creator-initials><text:p text:style-name="CommentText"><text:page-number text:fixed="false">Pagina: 1</text:page-number>Seksueel onbevredigd</text:p></office:annotation>onvoldaan<text:s/></text:span><text:span text:style-name="T746"><office:annotation-end office:name="19"/></text:span><text:span text:style-name="T747">gevoel bij de wolf achter. Al peinzend over dit onbevredigde gevoel, ijsbeert de wolf door de slaapkamer van grootmoeder. Dan hoort hij kloppen aan de deur. Verschrikt bedenkt hij zich niet en trekt grootmoeders badjas aan.<text:s/></text:span></text:p>
      <text:p text:style-name="P748"><text:span text:style-name="T749">Roodkapje blijft kloppen. Dan hoort ze een hoge stem die haar naar binnen roept. Als roodkapje de kamer binnen komt, roept ze haar oma. De wolf zucht van opluchting, dit is niet de stem van een jager. Hij ziet door een spleet in de half openstaande slaapkamerdeur roodkapje in vol<text:s/></text:span><text:span text:style-name="T750"><office:annotation office:name="20" xml:id="1008841860"><dc:creator>Slagter</dc:creator><meta:creator-initials>J.R.</meta:creator-initials><text:p text:style-name="CommentText"><text:page-number text:fixed="false">Pagina: 1</text:page-number>Naakt</text:p></office:annotation>ornaat<text:s/></text:span><text:span text:style-name="T751"><office:annotation-end office:name="20"/></text:span><text:span text:style-name="T752">staan. Nu weet de wolf wat hem nog ontbreekt. Met een nog hoger piepstemmetje roept hij roodkapje de slaapkamer in. Intussen blijft de wolf achter de deur verstopt. Als roodkapje binnenstapt grijpt hij haar en smijt haar op grootmoeders bed. De wolf begint waar de jagers<text:s/></text:span><text:span text:style-name="T753"><office:annotation office:name="21" xml:id="1008841391"><dc:creator>Slagter</dc:creator><meta:creator-initials>J.R.</meta:creator-initials><text:p text:style-name="CommentText"><text:page-number text:fixed="false">Pagina: 1</text:page-number>Pijpen</text:p></office:annotation>eindigden</text:span><text:span text:style-name="T754"><office:annotation-end office:name="21"/></text:span><text:span text:style-name="T755">. Alle frustratie over de ongelijke jacht<text:s/></text:span><text:span text:style-name="T756"><office:annotation office:name="22" xml:id="1008841838"><dc:creator>Slagter</dc:creator><meta:creator-initials>J.R.</meta:creator-initials><text:p text:style-name="CommentText"><text:page-number text:fixed="false">Pagina: 1</text:page-number>Hard neuken</text:p></office:annotation>viert<text:s/></text:span><text:span text:style-name="T757"><office:annotation-end office:name="22"/></text:span><text:span text:style-name="T758">hij bot op het onschuldige meisje. De<text:s/></text:span><text:span text:style-name="T759"><office:annotation office:name="23" xml:id="1008842444"><dc:creator>Slagter</dc:creator><meta:creator-initials>J.R.</meta:creator-initials><text:p text:style-name="CommentText"><text:page-number text:fixed="false">Pagina: 1</text:page-number>In haar kutje klaarkomen</text:p></office:annotation>bevrediging<text:s/></text:span><text:span text:style-name="T760"><office:annotation-end office:name="23"/></text:span><text:span text:style-name="T761">voor de wolf is dan ook zo groot dat hij in een diepe slaap valt. Zijn gezicht is voor het eerst sinds tijden weer ontspannen en tevreden.<text:s/></text:span></text:p>
      <text:p text:style-name="P762"><text:span text:style-name="T763">Het duurt even voordat roodkapje haar zinnen weer bijeen heeft. Ze rent het huis uit, zo snel als ze kan naar huis toe. In het bos springen ineens de twee jagers voor haar neus. Hun ogen zijn veelzeggend. Roodkapje staat nog een<text:s/></text:span><text:span text:style-name="T764"><office:annotation office:name="24" xml:id="1008842519"><dc:creator>Slagter</dc:creator><meta:creator-initials>J.R.</meta:creator-initials><text:p text:style-name="CommentText"><text:page-number text:fixed="false">Pagina: 1</text:page-number>Eerst de eerste jager dan de tweede jager</text:p></office:annotation>dubbele<text:s/></text:span><text:span text:style-name="T765"><office:annotation-end office:name="24"/></text:span><text:span text:style-name="T766">opgave te volbrengen. Er rest nog een<text:s/></text:span><text:span text:style-name="T767"><office:annotation office:name="25" xml:id="1008841359"><dc:creator>Slagter</dc:creator><meta:creator-initials>J.R.</meta:creator-initials><text:p text:style-name="CommentText"><text:page-number text:fixed="false">Pagina: 1</text:page-number>Neuken</text:p></office:annotation>gunst<text:s/></text:span><text:span text:style-name="T768"><office:annotation-end office:name="25"/></text:span><text:span text:style-name="T769">dat de jagers nog niet is verleend. Dit keer laten de jagers een persoonlijk<text:s/></text:span><text:span text:style-name="T770"><office:annotation office:name="26" xml:id="1008841309"><dc:creator>Slagter</dc:creator><meta:creator-initials>J.R.</meta:creator-initials><text:p text:style-name="CommentText"><text:page-number text:fixed="false">Pagina: 1</text:page-number><text:s/>Sperma op haar poesje (jager 1) en haar gezicht (jager 2)</text:p><text:p text:style-name="CommentText"/></office:annotation>aandenken<text:s/></text:span><text:span text:style-name="T771"><office:annotation-end office:name="26"/></text:span><text:span text:style-name="T772">achter. De jagers leren roodkapje de wijze les dat wolven en jagers qua uiterlijk weliswaar verschillen maar qua innerlijk veel op elkaar lijken.<text:s/></text:span></text:p>
      <text:soft-page-break/>
      <text:p text:style-name="P773"><text:s/></text:p>
      <text:p text:style-name="P774"/>
      <text:p text:style-name="P775"/>
      <text:p text:style-name="P776"/>
      <text:p text:style-name="P777"/>
      <text:p text:style-name="P778"/>
      <text:p text:style-name="P779"/>
      <text:p text:style-name="P780"/>
      <text:p text:style-name="P781"/>
      <text:h text:style-name="P782" text:outline-level="1"/>
      <text:p text:style-name="P783"/>
      <text:p text:style-name="P784"/>
      <text:h text:style-name="P785" text:outline-level="1"><text:bookmark-start text:name="_Toc489630083"/>Cleopatra<text:bookmark-end text:name="_Toc489630083"/></text:h>
      <text:p text:style-name="P786"/>
      <text:p text:style-name="Normal"><text:span text:style-name="T787">Cleopatra is uitgenodigd voor een gala in het Kurhaus te Scheveningen. Ze heeft haar persoonlijke staf ontboden. Deze bestaat uit twee mannelijke slaven en een adviseur. Twee slaven omdat de intense verzorging die Cleopatra dag en nacht eist alleen door zeer potente en uitgeruste slaven kan worden gegeven. Bij aankomst van haar staf klaagt Cleopatra dat ze te laat zijn aangekomen. Ze verlangt erg naar het nemen van een melkbad. <text:s/>De dienstdoende slaaf wacht niet langer en ontkleedt zich snel. En biedt vervolgens zijn<text:s/></text:span><text:span text:style-name="T788"><office:annotation office:name="27" xml:id="1008949758"><dc:creator>Slagter</dc:creator><meta:creator-initials>J.R.</meta:creator-initials><text:p text:style-name="CommentText"><text:page-number text:fixed="false">Pagina: 1</text:page-number>Knielend en voeten kussend</text:p></office:annotation>excuses<text:s/></text:span><text:span text:style-name="T789"><office:annotation-end office:name="27"/></text:span><text:span text:style-name="T790">aan. Slaven mogen immers nooit gekleed zijn in aanwezigheid van hare hoogheid.<text:s/></text:span></text:p>
      <text:p text:style-name="P791"/>
      <text:p text:style-name="Normal"><text:span text:style-name="T792">Cleopatra is een vrouw van stand. Haar kuise kledingstukken worden door een slaaf daarom<text:s/></text:span><text:span text:style-name="T793"><office:annotation office:name="28" xml:id="1009003251"><dc:creator>Slagter</dc:creator><meta:creator-initials>J.R.</meta:creator-initials><text:p text:style-name="CommentText"><text:page-number text:fixed="false">Pagina: 1</text:page-number>Met de mond worden de kledingstukken verwijderd</text:p></office:annotation>hoffelijk</text:span><text:span text:style-name="T794"><office:annotation-end office:name="28"/><text:s/>verwijderd</text:span><text:span text:style-name="T795"/><text:span text:style-name="T796">. Een uitgebreide<text:s/></text:span><text:span text:style-name="T797"><office:annotation office:name="29" xml:id="1009003734"><dc:creator>Slagter</dc:creator><meta:creator-initials>J.R.</meta:creator-initials><text:p text:style-name="CommentText"><text:page-number text:fixed="false">Pagina: 1</text:page-number>Een uitgebreide massage met de handen</text:p></office:annotation>massage<text:s/></text:span><text:span text:style-name="T798"><office:annotation-end office:name="29"/></text:span><text:span text:style-name="T799">bereidt haar lichaam voor op het hemelse bad. De slaaf die zich duidelijk voor zijn taak wil drukken, wordt door Cleopatra<text:s/></text:span><text:span text:style-name="T800"><office:annotation office:name="30" xml:id="1009003841"><dc:creator>Slagter</dc:creator><meta:creator-initials>J.R.</meta:creator-initials><text:p text:style-name="CommentText"><text:page-number text:fixed="false">Pagina: 1</text:page-number>Ze sommeert hem haar klaar te likken</text:p></office:annotation>terecht<text:s/></text:span><text:span text:style-name="T801"><office:annotation-end office:name="30"/></text:span><text:span text:style-name="T802">gewezen. Ontspannen hijst de slaaf Cleopatra in de badjas die ze lang geleden van haar aanbidder, Julius Ceasar, heeft gekregen. Het cadeau heeft ze destijds aangenomen, zijn avances niet. Terwijl ze zich in de melk laat zakken, sluit ze haar ogen overweldigd door genot. Ze valt in een diepe slaap.</text:span></text:p>
      <text:p text:style-name="P803"/>
      <text:p text:style-name="Normal"><text:span text:style-name="T804">Dan wekt haar slaaf haar. Ze is daardoor zo ontstemd dat ze hem ondergooit met melk. Als straf moet hij de melk<text:s/></text:span><text:span text:style-name="T805"><office:annotation office:name="31" xml:id="1008951168"><dc:creator>Slagter</dc:creator><meta:creator-initials>J.R.</meta:creator-initials><text:p text:style-name="CommentText"><text:page-number text:fixed="false">Pagina: 1</text:page-number>Oplikkend</text:p></office:annotation>hoffelijk<text:s/></text:span><text:span text:style-name="T806"><office:annotation-end office:name="31"/></text:span><text:span text:style-name="T807">opruimen, hetgeen zij met veel leedvermaak gade slaat. Daarna eist ze dat haar inmiddels opgekomen dorst door hem wordt<text:s/></text:span><text:span text:style-name="T808"><office:annotation office:name="32" xml:id="1009004131"><dc:creator>Slagter</dc:creator><meta:creator-initials>J.R.</meta:creator-initials><text:p text:style-name="CommentText"><text:page-number text:fixed="false">Pagina: 1</text:page-number>De slaaf stopt zijn pik in haar mond</text:p></office:annotation>gelest</text:span><text:span text:style-name="T809"><office:annotation-end office:name="32"/></text:span><text:span text:style-name="T810">. Een dame van haar stand neemt alleen genoegen met vers gewonnen natuurlijk<text:s/></text:span><text:span text:style-name="T811"><office:annotation office:name="33" xml:id="1009004110"><dc:creator>Slagter</dc:creator><meta:creator-initials>J.R.</meta:creator-initials><text:p text:style-name="CommentText"><text:page-number text:fixed="false">Pagina: 1</text:page-number>Het sperma van de slaaf</text:p></office:annotation>vocht</text:span><text:span text:style-name="T812"><office:annotation-end office:name="33"/></text:span><text:span text:style-name="T813">. Ook hier kan ze haar neiging de slaaf te<text:s/></text:span><text:span text:style-name="T814"><office:annotation office:name="34" xml:id="1008951332"><dc:creator>Slagter</dc:creator><meta:creator-initials>J.R.</meta:creator-initials><text:p text:style-name="CommentText"><text:page-number text:fixed="false">Pagina: 1</text:page-number>Ze hoont zijn trage prestatie tot het klaarkomen</text:p></office:annotation>vernederen<text:s/></text:span><text:span text:style-name="T815"><office:annotation-end office:name="34"/></text:span><text:span text:style-name="T816">niet bedwingen. Toch wordt ze milder als ze haar drinken genuttigd heeft. Pas dan vraagt ze waarom de slaaf zo brutaal is geweest. Hij meldt haar dat ze langzamerhand haar bad moet beëindigen om vooral op tijd te zijn voor haar gala-avond. Dit is de druppel. Haar slaaf zou moeten weten dat een gast als Cleopatra zelf wel bepaalt wanneer ze klaar is voor de avond. Zoveel blunders mag een slaaf van een zo’n immense grootheid niet zonder consequenties begaan. De slaaf wordt door zijn medeslaaf vervangen en blijft in afwachting van zijn uiteindelijk lot.</text:span></text:p>
      <text:p text:style-name="P817"/>
      <text:p text:style-name="Normal"><text:span text:style-name="T818">Terugkomen van een oersaaie gala-avond is Cleopatra zeer ontstemd. Nu krijgt ze zin om het lot van de vervangen slaaf te bezegelen. Ze roept haar adviseur bij zich en bespreekt met hem haar ontevredenheid. De adviseur is verantwoordelijk voor het gedrag van de slaven. Uit angst op deze verantwoordelijkheid te worden aangesproken stelt hij een extreem zware<text:s/></text:span><text:span text:style-name="T819"><office:annotation office:name="35" xml:id="1008952622"><dc:creator>Slagter</dc:creator><meta:creator-initials>J.R.</meta:creator-initials><text:p text:style-name="CommentText"><text:page-number text:fixed="false">Pagina: 1</text:page-number>Castratie en de kerker</text:p></office:annotation>straf<text:s/></text:span><text:span text:style-name="T820"><office:annotation-end office:name="35"/></text:span><text:span text:style-name="T821">voor. Zij gaat duidelijk tevreden, ja zelfs genietend van deze genoegdoening, akkoord. Haar opwinding leidt echter niet tot het verzuim ook de adviseur aan te spreken. Gezien zijn positie verlangt zij van hem een dubbele<text:s/></text:span><text:span text:style-name="T822"><office:annotation office:name="36" xml:id="1008952906"><dc:creator>Slagter</dc:creator><meta:creator-initials>J.R.</meta:creator-initials><text:p text:style-name="CommentText"><text:page-number text:fixed="false">Pagina: 1</text:page-number>Hij likt en vervolgens vingert Cleopatra klaar</text:p></office:annotation>bijdrage<text:s/></text:span><text:span text:style-name="T823"><office:annotation-end office:name="36"/></text:span><text:span text:style-name="T824">te leveren aan haar genoegdoening.<text:s/></text:span></text:p>
      <text:p text:style-name="P825"/>
      <text:p text:style-name="Normal"><text:span text:style-name="T826">Cleopatra’s stemming is door de boetedoening door haar staf aanzienlijk verbeterd. Daarom ziet ze niet af van haar gebruikelijk slaapritueel. Haar enig overgebleven slaaf roept ze dientengevolge bij zich. Zij maakt vervolgens gretig gebruik van zijn<text:s/></text:span><text:span text:style-name="T827"><office:annotation office:name="37" xml:id="1008953271"><dc:creator>Slagter</dc:creator><meta:creator-initials>J.R.</meta:creator-initials><text:p text:style-name="CommentText"><text:page-number text:fixed="false">Pagina: 1</text:page-number>Cleopatra gaat bovenop hem zitten en neukt hem tot hij bijna klaarkomt.<text:s/></text:p></office:annotation>diensten</text:span><text:span text:style-name="T828"><office:annotation-end office:name="37"/></text:span><text:span text:style-name="T829">. Om haar tere huid tegen de nachtelijke uren te beschermen, laat ze zich nog insmeren met een zeer speciale en kostbare<text:s/></text:span><text:span text:style-name="T830"><office:annotation office:name="38" xml:id="1008953427"><dc:creator>Slagter</dc:creator><meta:creator-initials>J.R.</meta:creator-initials><text:p text:style-name="CommentText"><text:page-number text:fixed="false">Pagina: 1</text:page-number>De slaaf komt klaar op haar borsten en smeert haar vervolgens met het sperma in.</text:p></office:annotation>nachtcrème</text:span><text:span text:style-name="T831"><office:annotation-end office:name="38"/></text:span><text:span text:style-name="T832">.<text:s/></text:span></text:p>
      <text:p text:style-name="P833"/>
      <text:p text:style-name="Normal"><text:span text:style-name="T834"><text:s/>De volgende ochtend wordt ze opgeschrikt door een vervaarlijk uitziende soldaat. De soldaat trekt haar dekens van haar af, en ontdekt hoe Cleopatra de nacht<text:s/></text:span><text:span text:style-name="T835"><office:annotation office:name="39" xml:id="1008953701"><dc:creator>Slagter</dc:creator><meta:creator-initials>J.R.</meta:creator-initials><text:p text:style-name="CommentText"><text:page-number text:fixed="false">Pagina: 1</text:page-number>De slaaf ligt tussen haar binnen haar dijen te likken terwijl ze volledig naakt is.</text:p></office:annotation>doorbrengt</text:span><text:span text:style-name="T836"><office:annotation-end office:name="39"/></text:span><text:span text:style-name="T837">. Hij doodt de ontdekte slaaf. De soldaat vertelt dat hij opdracht heeft Cleopatra in gijzeling te nemen totdat zijn opdrachtgever arriveert. Hij bindt Cleopatra<text:s/></text:span><text:span text:style-name="T838"><office:annotation office:name="40" xml:id="1008954233"><dc:creator>Slagter</dc:creator><meta:creator-initials>J.R.</meta:creator-initials><text:p text:style-name="CommentText"><text:page-number text:fixed="false">Pagina: 1</text:page-number>Wijdbeens</text:p></office:annotation>vast<text:s/></text:span><text:span text:style-name="T839"><office:annotation-end office:name="40"/></text:span><text:span text:style-name="T840">en brengt de rest van haar staf ook om. Dan rest hem niet anders dan geduldig in gepaste houding op zijn baas te wachten.<text:s/></text:span></text:p>
      <text:p text:style-name="P841"/>
      <text:p text:style-name="Normal"><text:span text:style-name="T842">De soldaat heeft moeite zijn ogen strak in het gareel te houden met een aantrekkelijk vrouw als Cleopatra in zijn<text:s/></text:span><text:span text:style-name="T843"><office:annotation office:name="41" xml:id="1008954070"><dc:creator>Slagter</dc:creator><meta:creator-initials>J.R.</meta:creator-initials><text:p text:style-name="CommentText"><text:page-number text:fixed="false">Pagina: 1</text:page-number>Cleopatra ligt naakt vastgebonden.</text:p></office:annotation>zicht</text:span><text:span text:style-name="T844"><office:annotation-end office:name="41"/></text:span><text:span text:style-name="T845">. Dan houdt hij het niet langer. Zijn plichtsbesef verliest het van zijn lust. Dan bedenkt hij de<text:s/></text:span><text:span text:style-name="T846"><office:annotation office:name="42" xml:id="1008954113"><dc:creator>Slagter</dc:creator><meta:creator-initials>J.R.</meta:creator-initials><text:p text:style-name="CommentText"><text:page-number text:fixed="false">Pagina: 1</text:page-number>In haar klaarkomen zou kunnen leiden tot een kind</text:p></office:annotation>gevolgen<text:s/></text:span><text:span text:style-name="T847"><office:annotation-end office:name="42"/></text:span><text:span text:style-name="T848">die zijn<text:s/></text:span><text:span text:style-name="T849"><office:annotation office:name="43" xml:id="1008954090"><dc:creator>Slagter</dc:creator><meta:creator-initials>J.R.</meta:creator-initials><text:p text:style-name="CommentText"><text:page-number text:fixed="false">Pagina: 1</text:page-number>Hij neukt haar gewoon.</text:p></office:annotation>acties<text:s/></text:span><text:span text:style-name="T850"><office:annotation-end office:name="43"/></text:span><text:span text:style-name="T851">kunnen hebben. Op het laatste moment weet hij deze gevolgen ternauwernood te <text:s/></text:span><text:span text:style-name="T852"><office:annotation office:name="44" xml:id="1008954140"><dc:creator>Slagter</dc:creator><meta:creator-initials>J.R.</meta:creator-initials><text:p text:style-name="CommentText"><text:page-number text:fixed="false">Pagina: 1</text:page-number>Hij komt op haar kutje klaar.</text:p></office:annotation>voorkomen</text:span><text:span text:style-name="T853"><office:annotation-end office:name="44"/></text:span><text:span text:style-name="T854">. Onthutst door zijn moment van verstandsverbijstering neemt hij daarop snel weer zijn positie in.</text:span></text:p>
      <text:p text:style-name="P855"/>
      <text:p text:style-name="Normal"><text:span text:style-name="T856">Veel later arriveert zijn chef. Het is Julius Ceasar. Hij vertelt Cleopatra dat hij haar afwijzingen zat is. Daarom heeft hij besloten haar tegen haar wil te gijzelen. Als Julius daad bij woord wil plegen dan merkt hij de<text:s/></text:span><text:span text:style-name="T857"><office:annotation office:name="45" xml:id="1008954758"><dc:creator>Slagter</dc:creator><meta:creator-initials>J.R.</meta:creator-initials><text:p text:style-name="CommentText"><text:page-number text:fixed="false">Pagina: 1</text:page-number>Sperma op haar kutje</text:p></office:annotation>ontrouw<text:s/></text:span><text:span text:style-name="T858"><office:annotation-end office:name="45"/></text:span><text:span text:style-name="T859">van zijn soldaat. Begripvol voor de moeilijke situatie waarin de soldaat zich heeft begeven wil hij hem vergeven. Natuurlijk dienen de sporen wel<text:s/></text:span><text:span text:style-name="T860"><office:annotation office:name="46" xml:id="1008954691"><dc:creator>Slagter</dc:creator><meta:creator-initials>J.R.</meta:creator-initials><text:p text:style-name="CommentText"><text:page-number text:fixed="false">Pagina: 1</text:page-number>Hij likt de sperma van haar kutje, om zeker te zijn likt hij ook het kutje zelf waarop Cleopatra klaarkomt</text:p></office:annotation>uitgewist<text:s/></text:span><text:span text:style-name="T861"><office:annotation-end office:name="46"/></text:span><text:span text:style-name="T862">te worden. Andere getrouwen moeten immers niet de verkeerde boodschap krijgen. Julius blijft een strenge alleenheerser die geen aantasting van zijn autoriteit duldt.<text:s/></text:span></text:p>
      <text:p text:style-name="P863"/>
      <text:p text:style-name="Normal"><text:span text:style-name="T864">Cleopatra is inmiddels een stuk toegeeflijkere geworden. Julius besluit haar boeien te verwijderen. Als blijk van dank geeft ze Julius een<text:s/></text:span><text:span text:style-name="T865"><office:annotation office:name="47" xml:id="1008955002"><dc:creator>Slagter</dc:creator><meta:creator-initials>J.R.</meta:creator-initials><text:p text:style-name="CommentText"><text:page-number text:fixed="false">Pagina: 1</text:page-number>Dus geen gebruik van handen, alleen van andere lichaamsdelen</text:p></office:annotation>hoffelijke<text:s/></text:span><text:span text:style-name="T866"><office:annotation-end office:name="47"/></text:span><text:span text:style-name="T867">massage. Cleopatra geeft haar goddelijke heerser wat hij<text:s/></text:span><text:span text:style-name="T868"><office:annotation office:name="48" xml:id="1008954915"><dc:creator>Slagter</dc:creator><meta:creator-initials>J.R.</meta:creator-initials><text:p text:style-name="CommentText"><text:page-number text:fixed="false">Pagina: 1</text:page-number>Hij wil haar zijwaarts en op zijn hondjes neuken.</text:p></office:annotation>verlangt</text:span><text:span text:style-name="T869"><office:annotation-end office:name="48"/></text:span><text:span text:style-name="T870">. Natuurlijk<text:s/></text:span><text:soft-page-break/><text:span text:style-name="T871">zorgen beide ervoor dat er geen ongewenste<text:s/></text:span><text:span text:style-name="T872"><office:annotation office:name="49" xml:id="1008955075"><dc:creator>Slagter</dc:creator><meta:creator-initials>J.R.</meta:creator-initials><text:p text:style-name="CommentText"><text:page-number text:fixed="false">Pagina: 1</text:page-number>Cleopatra neemt zijn staaf wanneer deze gaat kloppen in haar mond en pijpt hem totdat hij in haar gezicht klaar komt.</text:p></office:annotation>gevolgen<text:s/></text:span><text:span text:style-name="T873"><office:annotation-end office:name="49"/></text:span><text:span text:style-name="T874">op kunnen treden. Nu ze haar opgelegde rol heeft geaccepteerd wordt ze door Julius als zijn pronkstuk in zijn harem gebombardeerd. Als een voleerd dienstmeisje<text:s/></text:span><text:span text:style-name="T875"><office:annotation office:name="50" xml:id="1008955271"><dc:creator>Slagter</dc:creator><meta:creator-initials>J.R.</meta:creator-initials><text:p text:style-name="CommentText"><text:page-number text:fixed="false">Pagina: 1</text:page-number>Het sperma dat op het lichaam van Julius is blijven steken likt en slikt ze op.</text:p></office:annotation>ruimt<text:s/></text:span><text:span text:style-name="T876"><office:annotation-end office:name="50"/></text:span><text:span text:style-name="T877">ze alles op.</text:span></text:p>
      <text:p text:style-name="P878"/>
      <text:p text:style-name="P879">Scène 1</text:p>
      <text:p text:style-name="P880"/>
      <text:p text:style-name="Normal"><text:span text:style-name="T881">Overgang stripes</text:span></text:p>
      <text:p text:style-name="P882">Fragment 1: Camera Slaaf; Cleopatra en het bed waarop ze ligt.</text:p>
      <text:p text:style-name="P883">Haar stemming is kwaad. Ze pakt de telefoon.</text:p>
      <text:p text:style-name="P884">Cleopatra; “Met Cleopatra, keizerin van Egypte. Waar is mijn staf?---- twee slaven en een adviseur ----- Laat een slaaf zich onmiddellijk bij mij melden.--------Als je maar opschiet”</text:p>
      <text:p text:style-name="P885"/>
      <text:p text:style-name="P886">Fragment 2: Camera Cleopatra; Deur en hal</text:p>
      <text:p text:style-name="P887">Er wordt geklopt.</text:p>
      <text:p text:style-name="P888"/>
      <text:p text:style-name="P889">Fragment 3: Camera Slaaf; Cleopatra ingezoomd</text:p>
      <text:p text:style-name="P890">Cleopatra; “Binnen!”.</text:p>
      <text:p text:style-name="P891"/>
      <text:p text:style-name="P892">Fragment 4: Camera Cleopatra; Deur en hal en bed.</text:p>
      <text:p text:style-name="P893">Slaaf komt aangekleed binnen en valt voor het bed op zijn knieën.</text:p>
      <text:p text:style-name="P894"/>
      <text:p text:style-name="P895">Fragment 5: Camera Slaaf; Cleopatra ingezoomd.</text:p>
      <text:p text:style-name="P896">Cleopatra ontzet; “Eerst te laat en dan ook nog niet in gepast kostuum!”</text:p>
      <text:p text:style-name="P897"/>
      <text:p text:style-name="P898">Fragment 6: Camera Cleopatra; Vanuit Cleopatra slaaf in vol ornaat.</text:p>
      <text:p text:style-name="P899">Slaaf trekt zich snel uit en valt weer op zijn knieën voor het bed.<text:s/></text:p>
      <text:p text:style-name="P900"/>
      <text:p text:style-name="P901">Fragment 7: Camera op steun; Cleopatra en slaaf aan haar voeten.</text:p>
      <text:p text:style-name="P902">Slaaf kust haar voeten en smeekt om vergiffenis. Cleopatra geniet zichtbaar maar niet uitgesproken van deze boetedoening.</text:p>
      <text:p text:style-name="P903"/>
      <text:p text:style-name="P904">Fragment 8: Camera Slaaf; Cleopatra bovenste lichaamshelft.</text:p>
      <text:p text:style-name="P905">Al kreunend van genot zegt Cleopatra “Het is goed als je nu direct een heerlijk melkbad voor me maakt”.</text:p>
      <text:p text:style-name="P906"/>
      <text:p text:style-name="P907">Fragment 9: Camera Cleopatra; Slaaf voor het bed en de hal.</text:p>
      <text:p text:style-name="P908">Slaaf stapt buigend en dankbaar op en begeeft zich naar de badkamer.</text:p>
      <text:p text:style-name="P909"/>
      <text:p text:style-name="P910">Fragment 10: Camera Slaaf; Cleopatra ligt ontspannen en alvast genietend van de komende verwenning op bed.</text:p>
      <text:p text:style-name="P911"/>
      <text:p text:style-name="P912"/>
      <text:p text:style-name="P913"/>
      <text:p text:style-name="P914">Scene 2</text:p>
      <text:p text:style-name="P915"/>
      <text:p text:style-name="Normal">Overgang stripes</text:p>
      <text:p text:style-name="P916">Fragment 1: Camera op steun; Andere hoek Cleopatra op bed ontspannen met de ogen dicht.<text:s/></text:p>
      <text:p text:style-name="P917">Slaaf komt met badjas en bodylotion het beeld binnen en ligt deze naast haar op een stoel. Vervolgens kleedt hij Cleopatra met zijn handen tot het ondergoed uit. Cleopatra houdt daarbij haar ogen steeds gesloten. Op het moment dat de slaaf haar onderbroek met de handen wil uit doen doet ze de ogen verwijtend open. Ze zegt “het ondergoed van een keizerin dient door haar slaaf hoffelijk te worden uitgetrokken, dus weg met die handen!”.</text:p>
      <text:p text:style-name="P918"/>
      <text:p text:style-name="P919">Fragment 2: Camera op steun; Ander hoek ingezoomd op Cleopatra en slaaf.</text:p>
      <text:p text:style-name="P920">De slaaf buigt verontschuldigend doet zijn handen op de rug en gebruikt zijn mond om het kledingstuk te verwijderen. Om dit mogelijk te maken heeft de slaaf de onderbroek al deels van haar kont getrokken, maar zonder haar kutje te ontbloten. Hetzelfde doet hij met de BH (die al los is gemaakt). Op eigen initiatief draait Cleopatra op haar buik voor het vervolg. De slaaf geeft Cleopatra die haar ogen weer sluit een uitgebreide massage met de handen. Daarbij mijdt hij eerst de intieme delen. Dan draait Cleopatra zich plots om en drukt zijn hoofd tussen haar borsten. De slaaf begint deze met de mond te strelen terwijl hij met zijn handen de massage vervolgt.<text:s/></text:p>
      <text:p text:style-name="P921"/>
      <text:p text:style-name="P922">Fragment 3: Camera op steun; Ingezoomd op kutje Cleopatra van de zijkant zodat het likken kan worden gezien.</text:p>
      <text:p text:style-name="Normal"><text:span text:style-name="T923">De slaaf zakt met zijn handen naar de dijen van Cleopatra. Op een gegeven moment wordt Cleopatra ongeduldig en drukt zijn hoofd tussen haar benen en zegt “wat denk je wel, likken!”<text:s/></text:span><text:span text:style-name="T924">(onderbreking opname)</text:span></text:p>
      <text:p text:style-name="P925"><text:s/>De slaaf begint haar te likken totdat ze klaarkomt.<text:s/></text:p>
      <text:p text:style-name="P926"/>
      <text:p text:style-name="P927">Scene 3</text:p>
      <text:p text:style-name="P928"/>
      <text:p text:style-name="Normal"><text:span text:style-name="T929">Overgang stripes</text:span></text:p>
      <text:p text:style-name="P930">Fragment 1: Camera op steun; Cleopatra en slaaf aan de rand van het bed.</text:p>
      <text:p text:style-name="P931">De slaaf doet Cleopatra voorzichtig en ontspannen de badjas aan. Onderwijl vertelt zij</text:p>
      <text:p text:style-name="P932">“He, dat is de badjas die Julius mij nog heeft gegeven. Jemig wat heeft die man een moeite gedaan mij voor zich te winnen. En wat heb ik genoten hem steeds weer af te wijzen”</text:p>
      <text:p text:style-name="P933">Dan loopt Cleopatra samen met de slaaf het beeld uit naar de badkamer.</text:p>
      <text:p text:style-name="P934"/>
      <text:p text:style-name="P935">Fragment 2: Camera op steun ; In de badkamer gericht op de deur en het bad.</text:p>
      <text:p text:style-name="P936">Cleopatra komt begeleid door haar slaaf binnen. Hij houdt haar badjas vast als zij in het bad glijdt. Dit doet ze met het gezicht naar de Camera gericht.<text:s/></text:p>
      <text:p text:style-name="P937"/>
      <text:p text:style-name="P938">Fragment 3: Camera Slaaf; Ingezoomd op gezicht Cleopatra.</text:p>
      <text:p text:style-name="P939">Terwijl ze zich in het bad laat glijden sluit ze haar ogen en valt in slaap.</text:p>
      <text:p text:style-name="P940"/>
      <text:p text:style-name="P941">Fragment 4: Camera Slaaf ; In de badkamer gericht op bad.</text:p>
      <text:p text:style-name="P942">Enkele seconden Cleopatra in vol ornaat slapend.</text:p>
      <text:p text:style-name="P943"/>
      <text:p text:style-name="P944"/>
      <text:p text:style-name="P945">Scene 4:</text:p>
      <text:p text:style-name="P946"/>
      <text:p text:style-name="Normal"><text:span text:style-name="T947">Overgang stripes</text:span></text:p>
      <text:p text:style-name="P948">Fragment 1: Camera op steun; In de badkamer gericht op de deur en het bad.</text:p>
      <text:p text:style-name="P949">De slaaf komt voorzichtig binnen en wekt Cleopatra. Zij kijkt zeer ontstemd schreeuwt “hoe durf je slaaf” en gooit hem nat met water.<text:s/></text:p>
      <text:p text:style-name="P950"/>
      <text:p text:style-name="P951">Fragment 2: Camera op de grond; Gericht op het water.</text:p>
      <text:p text:style-name="P952">Cleopatra zegt “ruim die rommel hoffelijk op”. De slaaf likt het water van de vloer.</text:p>
      <text:p text:style-name="P953"/>
      <text:p text:style-name="P954">Fragment 3: Camera op steun; Gezicht van Cleopatra ingezoomd</text:p>
      <text:p text:style-name="Normal"><text:span text:style-name="T955">Cleopatra geniet wederom zichtbaar van de vernedering die de slaaf moet doorstaan. Dan zegt ze “het is genoeg zo, les mijn dorst nu!” De slaaf komt met zijn pik in het beeld en stopt deze in de wijd geopende mond van Cleopatra. Deze begint hem afwisselend te pijpen en te trekken terwijl ze zijn trage spuiten honend bekritiseerd.<text:s/></text:span><text:span text:style-name="T956">(onderbreking opname)</text:span></text:p>
      <text:p text:style-name="P957">De slaaf komt in de mond klaar.<text:s/></text:p>
      <text:p text:style-name="P958"/>
      <text:p text:style-name="P959">Fragment 4: Camera Slaaf; Ingezoomd op mond Cleopatra.</text:p>
      <text:p text:style-name="P960">De mond wordt aangevuld met yoghurt, zodat deze volledig gevuld is.<text:s/></text:p>
      <text:p text:style-name="P961">De camera laat zien dat de geopende mond van Cleopatra vol is waarna ze de substantie duidelijk doorslikt.</text:p>
      <text:p text:style-name="P962"/>
      <text:p text:style-name="P963">Fragment 5: Camera op steun; In de badkamer gericht op de deur en het bad.</text:p>
      <text:p text:style-name="P964">Cleopatra is zichtbaar tevreden en vraagt “waarom heb je het lef gehad mij te wekken”</text:p>
      <text:p text:style-name="P965">De slaaf buigt zijn hoofd naar de grond en zegt “uwe hoogheid, als u op tijd wil zijn voor de gala-avond dan dient u nu uw bad te beëindigen”</text:p>
      <text:p text:style-name="P966">Cleopatra furieus “Wat, heb jij dan niets geleerd. Een heerseres als ik bepaalt zelf wanneer ze klaar is! Dit is de laatste blunder die ik zal tolereren. Verdwijn uit mijn ogen en laat je vervangen. Je straf zul je nog vernemen”.</text:p>
      <text:p text:style-name="P967"/>
      <text:p text:style-name="P968"/>
      <text:p text:style-name="P969">Scene 5</text:p>
      <text:p text:style-name="P970"/>
      <text:p text:style-name="Normal"><text:span text:style-name="T971">Overgang stripes</text:span></text:p>
      <text:p text:style-name="P972">Fragment 1: Camera Slaaf; gericht op deur kamer</text:p>
      <text:p text:style-name="Normal"><text:span text:style-name="T973">Cleopatra komt met een chagrijnig gezicht de kamer binnen en begint flink te mopperen over de saaie avond. <text:s/>Ze neemt plaats op bed.<text:s/></text:span><text:span text:style-name="T974">De camera volgt haar</text:span><text:span text:style-name="T975">.<text:s/></text:span></text:p>
      <text:p text:style-name="P976"/>
      <text:p text:style-name="P977">Fragment 2 : Camera op steun; <text:s/>ingezoomd op bed<text:s/></text:p>
      <text:p text:style-name="P978">Terwijl Cleopatra haar schoenen laat uitdoen door haar slaaf roept ze haar adviseur “adviseur onmiddellijk melden”.</text:p>
      <text:p text:style-name="P979"/>
      <text:p text:style-name="P980">Fragment 3 : Camera Cleopatra; gericht op deur</text:p>
      <text:p text:style-name="P981">De adviseur komt binnen en kijkt Cleopatra met een gezicht die onheil verwacht aan.<text:s/></text:p>
      <text:p text:style-name="P982"/>
      <text:p text:style-name="P983">Fragment 4 : Camera op steun; gericht op bed zodanig dat beide gezichten in beeld komen.</text:p>
      <text:p text:style-name="P984">Cleopatra die ondertussen languit op bed ligt vertelt hem “na zo’n avond ben ik echt in de stemming om na te denken over een gepast straf voor mijn incompetente slaaf, kom naast me zitten”.</text:p>
      <text:p text:style-name="P985">De adviseur neemt zittend plaats naast de liggende Cleopatra. Ze zegt tegen hem “jij bent verantwoordelijk voor het gedrag van je slaven. Dus bedenk jij nu een gepaste straf”. <text:s/>De adviseur die blij lijkt niet zelf gestraft te worden denkt hoofd knikkend en inwendig genietend na. Dan reageert hij “u noemt de slaaf terecht incompetent, misschien is een goede straf hem daarvoor impotent te maken”. “Ik stel een castratie voor gevolgd door een levenslang verblijf in de keizerlijke verblijven.” Cleopatra is zichtbaar tevreden met deze genoegdoening. Dan richt ze zich tot de adviseur. “En nu jij nog. Jij bent verantwoordelijk. Gezien jouw positie dien je een dubbele genoegdoening te plegen”. De adviseur kijkt bedenkelijk.</text:p>
      <text:p text:style-name="P986"/>
      <text:p text:style-name="P987">Fragment 5: Camera op steun; In lijn met haar lichaam gericht op haar kutje.</text:p>
      <text:p text:style-name="Normal"><text:span text:style-name="T988">Cleopatra spreidt haar benen, zodat de Camera duidelijk laat zien dat ze geen onderbroekje onder haar rokje aanheeft. Ze pakt de hand van de adviseur en leidt hem onder haar rokje.<text:s/></text:span><text:span text:style-name="T989">(onderbreking opname)</text:span></text:p>
      <text:p text:style-name="P990">De adviseur vingert Cleopatra naar een hoogtepunt.<text:s/></text:p>
      <text:p text:style-name="P991"/>
      <text:p text:style-name="P992">Fragment 6. Camera op steun; Ingezoomd op Cleopatra in vol ornaat vanaf de zijkant</text:p>
      <text:p text:style-name="Normal"><text:span text:style-name="T993">Cleopatra ligt na te genieten van haar traktatie. De adviseur wil opstaan. Dan trekt ze haar rokje terug zodat haar kutje ontbloot wordt. De adviseur kijkt haar aan begrijpt wat er van hem wordt verlangd.<text:s/></text:span><text:span text:style-name="T994">(onderbreking opname)</text:span></text:p>
      <text:p text:style-name="Normal"><text:span text:style-name="T995">Hij likt Cleopatra klaar.<text:s/></text:span></text:p>
      <text:p text:style-name="P996"/>
      <text:p text:style-name="P997"/>
      <text:p text:style-name="P998">Scene 6</text:p>
      <text:p text:style-name="P999"/>
      <text:p text:style-name="Normal"><text:span text:style-name="T1000">Overgang stripes</text:span></text:p>
      <text:p text:style-name="P1001">Fragment 1: Camera op steun; Gericht op bed.<text:s/></text:p>
      <text:p text:style-name="P1002">Cleopatra nu volledig naakt. Adviseur is niet meer aanwezig.</text:p>
      <text:p text:style-name="P1003">Ze zegt “dat deed me werkelijk alle ellende vergeten. Nu kan ik ontspannen gaan slapen. Slaaf!”</text:p>
      <text:p text:style-name="Normal"><text:span text:style-name="T1004">De slaaf verschijnt in beeld. Cleopatra “het gebruikelijk ritueel graag”. De slaaf gaat liggen. Cleopatra blinddoekt hem en gaat vervolgens hem paardje rijdend neuken. Ze past op dat de slaaf niet klaar komt. Cleopatra komt zelf wel klaar (</text:span><text:span text:style-name="T1005">gespeeld</text:span><text:span text:style-name="T1006">).</text:span></text:p>
      <text:p text:style-name="P1007"/>
      <text:p text:style-name="P1008">Fragment 2: Camera op steun; vanuit een andere hoek.<text:s/></text:p>
      <text:p text:style-name="P1009">Cleopatra laat zich van haar slaaf afglijden en gaat ontspannen op haar rug naast hem liggen. De slaaf pakt zijn kloppende pik en trekt deze ver boven haar borsten af totdat hij klaarkomt.</text:p>
      <text:p text:style-name="P1010"/>
      <text:p text:style-name="P1011">Fragment 3: Camera Slaaf; ingezoomd op borsten.</text:p>
      <text:p text:style-name="P1012">Middels bodylotion wordt de hoeveelheid sperma overdreven. Zowel wat al op de borsten ligt als <text:s/>wat er nog opdrupt.<text:s/></text:p>
      <text:p text:style-name="P1013"/>
      <text:p text:style-name="P1014">Fragment 4. Camera op slaaf en Cleopatra.</text:p>
      <text:p text:style-name="P1015">Als het sperma is aangebracht dan verschijnen de handen van de slaaf in beeld die deze over haar borsten uitsmeert. De slaaf smeert het sperma verder over haar lichaam uit. Cleopatra zegt dan “zo is het welletjes met het aanbrengen van de nachtcrème”. De slaaf legt vervolgens de deken over de naar de zij toe gedraaide Cleopatra. Ze sluit haar ogen en valt in slaap.<text:s/></text:p>
      <text:p text:style-name="P1016"/>
      <text:p text:style-name="P1017"/>
      <text:p text:style-name="P1018">Scene 7</text:p>
      <text:p text:style-name="P1019"/>
      <text:p text:style-name="Normal"><text:span text:style-name="T1020">Overgang stripes</text:span></text:p>
      <text:p text:style-name="P1021">Fragment 1: Camera soldaat; Op slapende Cleopatra.</text:p>
      <text:p text:style-name="P1022"/>
      <text:p text:style-name="P1023">Fragment 2 : Camera Cleopatra; Op gang en volgend totdat de onderste helft van de dekens zichtbaar is.</text:p>
      <text:p text:style-name="P1024">Een soldaat stapt kordaat binnen. Hij richt zijn ogen op Cleopatra en pakt het uiteinde van haar dekens en trekt deze naar zich toe.</text:p>
      <text:p text:style-name="P1025"/>
      <text:soft-page-break/>
      <text:p text:style-name="P1026">Fragment 3: Camera op steun; Op slapende naakte Cleopatra met de slaaf haar dijen likkend tussen haar benen. De dekens zijn half afgetrokken.</text:p>
      <text:p text:style-name="P1027">De soldaat en Cleopatra kijken geschrokken op. De slaaf staat in de richting van de camera op en smeert hem.</text:p>
      <text:p text:style-name="P1028"/>
      <text:p text:style-name="P1029">Fragment 4 : Camera op steun; filmt Cleopatra en de soldaat voor haar bed. Vanaf de zijkant.</text:p>
      <text:p text:style-name="P1030">Cleopatra bedekt haar naaktheid met de dekens en zegt “wat heeft dit te betekenen.” De soldaat antwoordt strak “uwe hoogheid. Mijn opdracht is uwe hoogheid te gijzelen totdat mijn opdrachtgever arriveert”. Hij pakt zijn meegebrachte touwen en begint haar te binden. Cleopatra protesteert en vraagt “wie is die opdrachtgever”. “Ik moet u dringend verzoeken uw koninklijke mond te houden.” Cleopatra blijft echter protesteren, waarop de soldaat een zakdoek in haar mond steekt en vervolgens verder gaat met het vastbinden. Eerst de armen en dan de sputterende benen. De armen boven haar hoofd de benen uit elkaar. Hij neemt vervolgens positie in tegen een zijwand.</text:p>
      <text:p text:style-name="P1031"/>
      <text:p text:style-name="P1032">Fragment 5: Camera soldaat; filmt Cleopatra die wijdbeens is vastgebonden.</text:p>
      <text:p text:style-name="P1033">Cleopatra kijkt beteuterd.</text:p>
      <text:p text:style-name="P1034"/>
      <text:p text:style-name="P1035"/>
      <text:p text:style-name="P1036">Scene 8</text:p>
      <text:p text:style-name="P1037"/>
      <text:p text:style-name="Normal"><text:span text:style-name="T1038">Overgang stripes</text:span></text:p>
      <text:p text:style-name="P1039">Fragment 1: Camera Cleopatra; De soldaat staat aan de zijwand. Het bed met haar benen is net in beeld.<text:s/></text:p>
      <text:p text:style-name="P1040">De Camera zoemt in op het gezicht van de soldaat. De soldaat kijkt strak voor zich uit. Na 5 seconden gaan zijn ogen snel even bewegen kijkend naar de kut van Cleopatra.</text:p>
      <text:p text:style-name="P1041"/>
      <text:p text:style-name="Normal"><text:span text:style-name="T1042">Fragment 2 : Camera soldaat; In lijn met de blik die de soldaat heeft op Cleopatra die wijdbeens vastgebonden ligt op het bed met haar kutje vol in beeld. Cleopatra beweegt om zich los te wringen, daarbij vooral haar kutje manoeuvrerend</text:span><text:span text:style-name="T1043">. Haar kutje is wat vochtig gemaakt om glinstering te bewerkstellingen.</text:span></text:p>
      <text:p text:style-name="P1044"/>
      <text:p text:style-name="P1045"><text:s/>Fragment 3 : Camera Cleopatra; Ingezoomd op de ogen van de soldaat.</text:p>
      <text:p text:style-name="P1046">De ogen volgen nu frequenter de bewegingen van Cleopatra. Camera zoemt uit tot bovenlichaam soldaat. De soldaat kan zich niet bedwingen en begeeft zich uit beeld in de richting van Cleopatra.</text:p>
      <text:p text:style-name="P1047"/>
      <text:p text:style-name="P1048">Fragment 4 : Camera op steun; vanaf de zijkant gericht op het bed met daarop de soldaat en Cleopatra.</text:p>
      <text:p text:style-name="P1049">De soldaat pakt zijn pik en duwt deze ruw in de kut van Cleopatra. Onderwijl protesteert Cleopatra met de prop in de mond. Als de soldaat zijn pik in haar duwt, slaakt ze een sterke kreun. De soldaat is zo opgewonden dat hij haar ruw (in een normaal standje) neukt.</text:p>
      <text:p text:style-name="P1050"/>
      <text:p text:style-name="P1051">Fragment 5: Camera op steun; ingezoomd op de kut van Cleopatra</text:p>
      <text:p text:style-name="P1052">De soldaat neukt <text:s/>haar verder.<text:s/></text:p>
      <text:p text:style-name="P1053"/>
      <text:p text:style-name="P1054">Fragment 6 : Camera op steun; De camera is vanaf de zijkant gericht op het bed met daarop de soldaat en Cleopatra.</text:p>
      <text:p text:style-name="P1055">Cleopatra’s prop flopt dan uit haar mond en ze zegt “pas op, ik wil geen kind van je”. De soldaat trekt daarop zijn pik uit de kut.<text:s/></text:p>
      <text:p text:style-name="P1056"/>
      <text:p text:style-name="P1057">Fragment 7 : Camera Cleopatra; Gericht op de soldaat en haar onderbuik.</text:p>
      <text:p text:style-name="P1058">Met de pik in zijn hand komt de soldaat klaar op de kut van Cleopatra. Cleopatra zegt “vuile viezerik, ik zal ervoor zorgen dat je opdrachtgever je hiervoor zwaar zal straffen” . De soldaat loopt zonder te reageren om het bed naar het hoofd van Cleopatra. De Camera volgt hem met als middelpunt zijn penis.<text:s/></text:p>
      <text:p text:style-name="P1059"/>
      <text:p text:style-name="Normal"><text:span text:style-name="T1060">Fragment 8 : Camera op steun; De camera is in lijn met het lichaam van Cleopatra. Daarbij is haar besmeurde kut als eerst in beeld.<text:s/></text:span><text:span text:style-name="T1061">Het sperma is aangevuld met yoghurt</text:span><text:span text:style-name="T1062">.</text:span></text:p>
      <text:p text:style-name="P1063">De soldaat veegt met de zakdoek zijn lul af, stopt de prop weer in Cleopatra’s klagende mond, doet zijn gulp dicht, bedekt haar met dekens en gaat beduusd en schuldig naast het bed in de houding staan.</text:p>
      <text:p text:style-name="P1064"/>
      <text:p text:style-name="P1065"/>
      <text:p text:style-name="P1066">Scene 9</text:p>
      <text:p text:style-name="P1067"/>
      <text:p text:style-name="Normal"><text:span text:style-name="T1068">Overgang stripes</text:span></text:p>
      <text:p text:style-name="P1069">Fragment 1 : Camera op steun; De camera is in dezelfde positie.</text:p>
      <text:soft-page-break/>
      <text:p text:style-name="P1070">Cleopatra heeft haar ogen inmiddels dicht en is in een diepe slaap. Ook de soldaat lijkt staand te slapen. Dan reageert de soldaat alsof hij een geluid hoort.</text:p>
      <text:p text:style-name="P1071"/>
      <text:p text:style-name="P1072">Fragment 2 : Camera Cleopatra; De camera is gericht naar de deur. En heeft de onderkant van Cleopatra (onder de dekens nog steeds) nog net in beeld.</text:p>
      <text:p text:style-name="P1073">Julius stapt binnen. Hij staat voor het bed en geeft de soldaat fluisterend een compliment voor het goed uitvoeren van zijn opdracht “prima gedaan soldaat, precies zoals ik heb opgedragen. Laat ik nu eens kijken naar wat ik al zolang heb willen zien”. Hij slaat de dekens terug zodat de besmeurde kut zichtbaar wordt. “Wat is dit!” zegt Julius als hij verontwaardigd de soldaat aankijkt. Dan wordt zijn blik milder. “Het is ook moeilijk bij zo’n mooie vrouw he” vervolgt Ceasar. “Ruim de sporen hoffelijk op en verdwijn, dan zal ik opnieuw binnenkomen en net doen alsof er niets gebeurt is”. Julius verlaat weer de kamer.</text:p>
      <text:p text:style-name="P1074"/>
      <text:p text:style-name="P1075">Fragment 3 : Camera op steun; De camera is vanaf de zijkant gericht op het bed met daarop de soldaat en Cleopatra.</text:p>
      <text:p text:style-name="P1076">De soldaat likt de sperma van Cleopatra’s kut. “Shit, er is ook wat in haar terecht gekomen” zegt hij fluisterend tegen zichzelf. Op het moment dat hij zijn tong in haar kut steekt wordt Cleopatra met een schok wakker. Ze kreunt en daarop schiet de prop weer uit haar mond. Ze vraagt de soldaat vooral door te gaan. De soldaat likt haar genietend van deze daad klaar.</text:p>
      <text:p text:style-name="P1077"/>
      <text:p text:style-name="P1078"/>
      <text:p text:style-name="P1079">Scene 10</text:p>
      <text:p text:style-name="P1080"/>
      <text:p text:style-name="Normal"><text:span text:style-name="T1081">Overgang stripes</text:span></text:p>
      <text:p text:style-name="P1082">Fragment 1: Camera Julius; De camera is gericht op de Cleopatra die zonder dekens op bed ligt.</text:p>
      <text:p text:style-name="P1083">Cleopatra diep in gedachten schrikt op als ze een geluid hoort.</text:p>
      <text:p text:style-name="P1084"/>
      <text:p text:style-name="P1085">Fragment 2: Camera Cleopatra; gericht op deur.</text:p>
      <text:p text:style-name="P1086">Julius komt binnen en kijkt vol tevredenheid naar Cleopatra.<text:s/></text:p>
      <text:p text:style-name="P1087"/>
      <text:p text:style-name="P1088">Fragment 3: De camera op steun; is vanaf de zijkant gericht op het bed met daarvoor Julius.</text:p>
      <text:p text:style-name="P1089">Cleopatra zegt verontwaardigd; “Gij Julius, hoe durf je”. Julius legt uit “Hoe durf jij! Een Romeinse keizer vraagt niet om gunsten maar neemt ze gewoon. Dat had je kunnen weten!”. <text:s/></text:p>
      <text:p text:style-name="P1090"/>
      <text:p text:style-name="P1091">Fragment 4: Camera Cleopatra; ingezoomd gezicht Julius</text:p>
      <text:p text:style-name="P1092">“Ik laat je nu de keus, of je stribbelt tegen en je wordt nadat ik je genomen heb een beloning voor mijn trouwe soldaten en zult een speeltje zijn voor de rest van je leven, of je wordt het pronkstuk van mijn immense harem.”<text:s/></text:p>
      <text:p text:style-name="P1093"/>
      <text:p text:style-name="P1094">Fragment 5; Camera Julius; Ingezoomd op gezicht Cleopatra</text:p>
      <text:p text:style-name="P1095">Cleopatra verbijt zich en zegt uiteindelijk “Je laat me geen keuze, vertel me wat ik moet doen om tot je harem te worden toegelaten”.<text:s/></text:p>
      <text:p text:style-name="P1096"/>
      <text:p text:style-name="P1097">Fragment 6: Camera Cleopatra; ingezoomd gezicht Julius</text:p>
      <text:p text:style-name="P1098">Julius “zweer eerst mijn sexslavin voor de rest van je leven te zullen zijn. Ik weet namelijk dat een keizerin nooit een eed zal breken”.<text:s/></text:p>
      <text:p text:style-name="P1099"/>
      <text:p text:style-name="P1100">Fragment 7; Camera Julius; Ingezoomd op gezicht Cleopatra</text:p>
      <text:p text:style-name="P1101">Cleopatra “goed, ik beloof de rest van mijn leven al je seksuele wensen te vervullen”.<text:s/></text:p>
      <text:p text:style-name="P1102"/>
      <text:p text:style-name="P1103">Fragment 8: De camera op steun; is vanaf de zijkant gericht op het bed.</text:p>
      <text:p text:style-name="P1104">Julius ontdoet haar van haar boeien en zegt “nu moet je me nog laten zien dat je me hoffelijk kunt bevredigen”. Julius gaat op zijn buik liggen en Cleopatra gebruikt haar lichaam zonder handen om hem te masseren. Dan draait Julius zich op zijn zij waarbij Cleopatra mee omvalt. Hij steekt zijn lul zijwaarts liggen in haar en begint haar te neuken.<text:s/></text:p>
      <text:p text:style-name="P1105"/>
      <text:p text:style-name="P1106">Fragment 9; Camera op steun; ingezoomd op mond julius</text:p>
      <text:p text:style-name="P1107">Zij likt inmiddels zijn tong uitgebreid af.<text:s/></text:p>
      <text:p text:style-name="P1108">Laat duidelijk zien dat Cleopatra zijn tong afzuigd.</text:p>
      <text:p text:style-name="P1109"/>
      <text:p text:style-name="P1110">Fragment 10: De camera op steun; is vanaf de zijkant gericht op het bed.</text:p>
      <text:soft-page-break/>
      <text:p text:style-name="P1111">Dan wordt Julius helemaal wild. Hij laat Cleopatra op haar handen en voeten zitten en neemt haar hard op haar hondjes. Net voordat hij klaar dreigt te komen zegt hij “laten we maar geen nakomelingen maken”<text:s/></text:p>
      <text:p text:style-name="P1112"/>
      <text:p text:style-name="P1113">Fragment 11: Camera op steun; ingezoomd op kut Cleopatra</text:p>
      <text:p text:style-name="P1114">Julius trekt zijn lul uit haar poesje.<text:s/></text:p>
      <text:p text:style-name="P1115"/>
      <text:p text:style-name="P1116">Fragment 12 : Camera Cleopatra; volgt de pik van Julius<text:s/></text:p>
      <text:p text:style-name="P1117">Hij brengt deze naar haar mond.</text:p>
      <text:p text:style-name="P1118"/>
      <text:p text:style-name="P1119">Fragment 13: De camera op steun; is vanaf de zijkant gericht op het bed.</text:p>
      <text:p text:style-name="P1120">Cleopatra pijpt Julius. Terwijl hij met zijn hand onder haar kin haar gezicht ophoudt komt hij klaar.</text:p>
      <text:p text:style-name="P1121"/>
      <text:p text:style-name="P1122">Fragment 14 : Camera Julius; Cleopatra’s gezicht en Julius penis ingezoomd.</text:p>
      <text:p text:style-name="P1123">Het sperma in hand, gezicht, tong en penis is aangevuld met yoghurt.</text:p>
      <text:p text:style-name="P1124">Cleopatra likt en slikt vervolgens het sperma van tong, penis en dan de hand.</text:p>
      <text:p text:style-name="P1125"/>
      <text:p text:style-name="P1126">Fragment 15 : Camera Cleopatra; Gezicht Julius.</text:p>
      <text:p text:style-name="P1127">Julius gezicht trekt van genot. Als hij zich langzaam ontspant dan zegt hij “nu ik mijn zinnen weer bijeen heb moet ik zeggen dat ik jouw duidelijke talenten toch niet weg wil houden van mijn soldaten. Met jou als beloning zullen ze elke oorlog voor me winnen. En je zult je nu met overgave aan hun lusten overgeven. Want je hebt immers beloofd elke seksuele wens van mij te vervullen.”<text:s/></text:p>
      <text:p text:style-name="P1128"/>
      <text:p text:style-name="P1129">Fragment 16: Camera Julius; Besmeurt gezicht Cleopatra.</text:p>
      <text:p text:style-name="P1130">Cleopatra die inderdaad nooit haar belofte zal breken en haar nieuwe rol al lijkt te accepteren reageert onderdanig “zoals u wenst mijn meester”.</text:p>
      <text:p text:style-name="P1131"/>
      <text:p text:style-name="P1132">Fragment 17: Camera op steun; bed en kleine ruimte eromheen</text:p>
      <text:p text:style-name="P1133">Julius verlaat opgetogen en tevreden het beeld.</text:p>
      <text:p text:style-name="P1134"/>
      <text:p text:style-name="P1135">Fragment 18 : Camera Julius; Inzoomen op het besmeurde en verdrietige gezicht van Cleopatra.</text:p>
      <text:p text:style-name="P1136">Cleopatra kijkt Julius na, en plaats dan verdrietig haar hand voor haar ogen. De Camera zoomt langzaam uit en de overgang naar het einde is een feit.</text:p>
      <text:p text:style-name="P1137"/>
      <text:p text:style-name="P1138"/>
      <text:p text:style-name="P1139"/>
      <text:p text:style-name="P1140"/>
      <text:soft-page-break/>
      <text:p text:style-name="P1141"><text:s/></text:p>
      <text:p text:style-name="P11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style:text-properties fo:font-weight="bold" style:font-weight-asian="bold" fo:text-shadow="0.0291in 0.0291in 0.0555in #000000" fo:color="#FF00FF" fo:hyphenate="false"/>
    </style:style>
    <style:style style:name="Heading2" style:display-name="Heading 2" style:family="paragraph" style:parent-style-name="Normal" style:next-style-name="Normal" style:auto-update="true" style:default-outline-level="2">
      <style:paragraph-properties fo:keep-with-next="always"/>
      <style:text-properties fo:font-style="italic" style:font-style-asian="italic" fo:text-shadow="0.0291in 0.0291in 0.0555in #000000" fo:color="#800080" fo:hyphenate="false"/>
    </style:style>
    <style:style style:name="Heading3" style:display-name="Heading 3" style:family="paragraph" style:parent-style-name="Normal" style:next-style-name="Normal" style:default-outline-level="3">
      <style:paragraph-properties fo:keep-with-next="always" fo:text-align="justify"/>
      <style:text-properties fo:font-style="italic" style:font-style-asian="italic" fo:hyphenate="false"/>
    </style:style>
    <style:style style:name="Heading4" style:display-name="Heading 4" style:family="paragraph" style:parent-style-name="Normal" style:next-style-name="Normal" style:default-outline-level="4">
      <style:paragraph-properties fo:keep-with-next="always" fo:text-align="center"/>
      <style:text-properties fo:font-weight="bold" style:font-weight-asian="bold" fo:font-size="24pt" style:font-size-asian="24pt" fo:hyphenate="false"/>
    </style:style>
    <style:style style:name="Normal" style:display-name="Normal" style:family="paragraph">
      <style:text-properties fo:language="nl" fo:country="NL"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style>
    <style:style style:name="CommentText" style:display-name="Comment Text" style:family="paragraph" style:parent-style-name="Normal">
      <style:text-properties fo:hyphenate="false"/>
    </style:style>
    <style:style style:name="BodyText" style:display-name="Body Text" style:family="paragraph" style:parent-style-name="Normal">
      <style:paragraph-properties fo:text-align="justify"/>
      <style:text-properties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fo:text-transform="uppercase" fo:hyphenate="false"/>
    </style:style>
    <style:style style:name="TOC2" style:display-name="TOC 2" style:family="paragraph" style:parent-style-name="Normal" style:next-style-name="Normal" style:auto-update="true">
      <style:paragraph-properties fo:margin-left="0.1388in">
        <style:tab-stops/>
      </style:paragraph-properties>
      <style:text-properties fo:font-variant="small-caps" fo:hyphenate="false"/>
    </style:style>
    <style:style style:name="TOC3" style:display-name="TOC 3" style:family="paragraph" style:parent-style-name="Normal" style:next-style-name="Normal" style:auto-update="true">
      <style:paragraph-properties fo:margin-left="0.2777in">
        <style:tab-stops/>
      </style:paragraph-properties>
      <style:text-properties fo:font-style="italic" style:font-style-asian="italic" fo:hyphenate="false"/>
    </style:style>
    <style:style style:name="TOC4" style:display-name="TOC 4" style:family="paragraph" style:parent-style-name="Normal" style:next-style-name="Normal" style:auto-update="true">
      <style:paragraph-properties fo:margin-left="0.4166in">
        <style:tab-stops/>
      </style:paragraph-properties>
      <style:text-properties fo:font-size="9pt" style:font-size-asian="9pt" fo:hyphenate="false"/>
    </style:style>
    <style:style style:name="TOC5" style:display-name="TOC 5" style:family="paragraph" style:parent-style-name="Normal" style:next-style-name="Normal" style:auto-update="true">
      <style:paragraph-properties fo:margin-left="0.5555in">
        <style:tab-stops/>
      </style:paragraph-properties>
      <style:text-properties fo:font-size="9pt" style:font-size-asian="9pt" fo:hyphenate="false"/>
    </style:style>
    <style:style style:name="TOC6" style:display-name="TOC 6" style:family="paragraph" style:parent-style-name="Normal" style:next-style-name="Normal" style:auto-update="true">
      <style:paragraph-properties fo:margin-left="0.6944in">
        <style:tab-stops/>
      </style:paragraph-properties>
      <style:text-properties fo:font-size="9pt" style:font-size-asian="9pt" fo:hyphenate="false"/>
    </style:style>
    <style:style style:name="TOC7" style:display-name="TOC 7" style:family="paragraph" style:parent-style-name="Normal" style:next-style-name="Normal" style:auto-update="true">
      <style:paragraph-properties fo:margin-left="0.8333in">
        <style:tab-stops/>
      </style:paragraph-properties>
      <style:text-properties fo:font-size="9pt" style:font-size-asian="9pt" fo:hyphenate="false"/>
    </style:style>
    <style:style style:name="TOC8" style:display-name="TOC 8" style:family="paragraph" style:parent-style-name="Normal" style:next-style-name="Normal" style:auto-update="true">
      <style:paragraph-properties fo:margin-left="0.9722in">
        <style:tab-stops/>
      </style:paragraph-properties>
      <style:text-properties fo:font-size="9pt" style:font-size-asian="9pt" fo:hyphenate="false"/>
    </style:style>
    <style:style style:name="TOC9" style:display-name="TOC 9" style:family="paragraph" style:parent-style-name="Normal" style:next-style-name="Normal" style:auto-update="true">
      <style:paragraph-properties fo:margin-left="1.1111in">
        <style:tab-stops/>
      </style:paragraph-properties>
      <style:text-properties fo:font-size="9pt" style:font-size-asian="9pt" fo:hyphenate="false"/>
    </style:style>
    <style:style style:name="BodyText2" style:display-name="Body Text 2" style:family="paragraph" style:parent-style-name="Normal">
      <style:paragraph-properties fo:text-align="justify"/>
      <style:text-properties fo:font-style="italic" style:font-style-asian="italic" fo:hyphenate="false"/>
    </style:style>
    <style:style style:name="BodyText3" style:display-name="Body Text 3" style:family="paragraph" style:parent-style-name="Normal">
      <style:text-properties fo:color="#80008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e cursus</dc:title>
    <dc:subject/>
    <meta:initial-creator>Slagter</meta:initial-creator>
    <dc:creator>Rob Slagter</dc:creator>
    <meta:creation-date>2025-07-30T14:33:00Z</meta:creation-date>
    <dc:date>2025-07-30T14:33:00Z</dc:date>
    <meta:print-date>2000-07-23T15:39:00Z</meta:print-date>
    <meta:template xlink:href="Normal.dotm" xlink:type="simple"/>
    <meta:editing-cycles>2</meta:editing-cycles>
    <meta:editing-duration>PT60S</meta:editing-duration>
    <meta:document-statistic meta:page-count="52" meta:paragraph-count="384" meta:word-count="28755" meta:character-count="192275" meta:row-count="1365" meta:non-whitespace-character-count="163904"/>
  </office:meta>
</office:document-meta>
</file>